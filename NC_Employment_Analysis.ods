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tmp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Times" svg:font-family="Time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color="#000000" style:font-name="Times" style:font-name-asian="Times" style:font-name-complex="Times" fo:font-size="13pt" style:font-size-asian="13pt" style:font-size-complex="13pt"/>
    </style:style>
    <style:style style:name="co1" style:family="table-column">
      <style:table-column-properties fo:break-before="auto" style:column-width="1.64041666666667cm"/>
    </style:style>
    <style:style style:name="co2" style:family="table-column">
      <style:table-column-properties fo:break-before="auto" style:column-width="2.72520833333333cm"/>
    </style:style>
    <style:style style:name="co3" style:family="table-column">
      <style:table-column-properties fo:break-before="auto" style:column-width="2.301875cm"/>
    </style:style>
    <style:style style:name="co4" style:family="table-column">
      <style:table-column-properties fo:break-before="auto" style:column-width="3.254375cm"/>
    </style:style>
    <style:style style:name="co5" style:family="table-column">
      <style:table-column-properties fo:break-before="auto" style:column-width="3.91583333333333cm"/>
    </style:style>
    <style:style style:name="co6" style:family="table-column">
      <style:table-column-properties fo:break-before="auto" style:column-width="2.80458333333333cm"/>
    </style:style>
    <style:style style:name="co7" style:family="table-column">
      <style:table-column-properties fo:break-before="auto" style:column-width="2.67229166666667cm"/>
    </style:style>
    <style:style style:name="co8" style:family="table-column">
      <style:table-column-properties fo:break-before="auto" style:column-width="2.936875cm"/>
    </style:style>
    <style:style style:name="co9" style:family="table-column">
      <style:table-column-properties fo:break-before="auto" style:column-width="3.095625cm"/>
    </style:style>
    <style:style style:name="co10" style:family="table-column">
      <style:table-column-properties fo:break-before="auto" style:column-width="3.96875cm"/>
    </style:style>
    <style:style style:name="co11" style:family="table-column">
      <style:table-column-properties fo:break-before="auto" style:column-width="2.91041666666667cm"/>
    </style:style>
    <style:style style:name="co12" style:family="table-column">
      <style:table-column-properties fo:break-before="auto" style:column-width="3.01625cm"/>
    </style:style>
    <style:style style:name="co13" style:family="table-column">
      <style:table-column-properties fo:break-before="auto" style:column-width="3.4925cm"/>
    </style:style>
    <style:style style:name="co14" style:family="table-column">
      <style:table-column-properties fo:break-before="auto" style:column-width="3.22791666666667cm"/>
    </style:style>
    <style:style style:name="co15" style:family="table-column">
      <style:table-column-properties fo:break-before="auto" style:column-width="2.8575cm"/>
    </style:style>
    <style:style style:name="co16" style:family="table-column">
      <style:table-column-properties fo:break-before="auto" style:column-width="1.71979166666667cm"/>
    </style:style>
    <style:style style:name="co17" style:family="table-column">
      <style:table-column-properties fo:break-before="auto" style:column-width="2.48708333333333cm"/>
    </style:style>
    <style:style style:name="co18" style:family="table-column">
      <style:table-column-properties fo:break-before="auto" style:column-width="2.98979166666667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751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riginal_Data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Employment</text:p>
          </table:table-cell>
          <table:table-cell office:value-type="string" table:style-name="ce2">
            <text:p>Unemployment</text:p>
          </table:table-cell>
          <table:table-cell office:value-type="string" table:style-name="ce2">
            <text:p>Unemployment_rate</text:p>
          </table:table-cell>
          <table:table-cell office:value-type="string" table:style-name="ce2">
            <text:p>Average_Hourly_Earnings</text:p>
          </table:table-cell>
          <table:table-cell office:value-type="string" table:style-name="ce2">
            <text:p>Employment_Change_Level</text:p>
          </table:table-cell>
          <table:table-cell office:value-type="string" table:style-name="ce2">
            <text:p>Wage_Growth_Rate</text:p>
          </table:table-cell>
          <table:table-cell office:value-type="string" table:style-name="ce2">
            <text:p>Unemployment_Change</text:p>
          </table:table-cell>
          <table:table-cell office:value-type="string" table:style-name="ce2">
            <text:p>Time_Index</text:p>
          </table:table-cell>
          <table:table-cell office:value-type="string" table:style-name="ce2">
            <text:p>Economic_cycle</text:p>
          </table:table-cell>
          <table:table-cell table:number-columns-repeated="16373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1">
            <text:p>Jan</text:p>
          </table:table-cell>
          <table:table-cell office:value-type="float" office:value="4497062" table:style-name="ce1">
            <text:p>4497062</text:p>
          </table:table-cell>
          <table:table-cell office:value-type="float" office:value="251816" table:style-name="ce1">
            <text:p>251816</text:p>
          </table:table-cell>
          <table:table-cell office:value-type="float" office:value="5.3" table:style-name="ce1">
            <text:p>5.3</text:p>
          </table:table-cell>
          <table:table-cell office:value-type="float" office:value="23.01" table:style-name="ce1">
            <text:p>23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re-COVID</text:p>
          </table:table-cell>
          <table:table-cell table:number-columns-repeated="16373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1">
            <text:p>Feb</text:p>
          </table:table-cell>
          <table:table-cell office:value-type="float" office:value="4508697" table:style-name="ce1">
            <text:p>4508697</text:p>
          </table:table-cell>
          <table:table-cell office:value-type="float" office:value="248680" table:style-name="ce1">
            <text:p>248680</text:p>
          </table:table-cell>
          <table:table-cell office:value-type="float" office:value="5.2" table:style-name="ce1">
            <text:p>5.2</text:p>
          </table:table-cell>
          <table:table-cell office:value-type="float" office:value="23.22" table:style-name="ce1">
            <text:p>23.22</text:p>
          </table:table-cell>
          <table:table-cell office:value-type="float" office:value="2.587244738898418E-3" table:style-name="ce1">
            <text:p>0.002587245</text:p>
          </table:table-cell>
          <table:table-cell office:value-type="float" office:value="9.126466753585279E-3" table:style-name="ce1">
            <text:p>0.009126467</text:p>
          </table:table-cell>
          <table:table-cell office:value-type="float" office:value="-9.9999999999999645E-2" table:style-name="ce1">
            <text:p>-0.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re-COVID</text:p>
          </table:table-cell>
          <table:table-cell table:number-columns-repeated="16373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1">
            <text:p>Mar</text:p>
          </table:table-cell>
          <table:table-cell office:value-type="float" office:value="4517867" table:style-name="ce1">
            <text:p>4517867</text:p>
          </table:table-cell>
          <table:table-cell office:value-type="float" office:value="245336" table:style-name="ce1">
            <text:p>245336</text:p>
          </table:table-cell>
          <table:table-cell office:value-type="float" office:value="5.2" table:style-name="ce1">
            <text:p>5.2</text:p>
          </table:table-cell>
          <table:table-cell office:value-type="float" office:value="23.21" table:style-name="ce1">
            <text:p>23.21</text:p>
          </table:table-cell>
          <table:table-cell office:value-type="float" office:value="2.0338470294189209E-3" table:style-name="ce1">
            <text:p>0.002033847</text:p>
          </table:table-cell>
          <table:table-cell office:value-type="float" office:value="-4.3066322136081007E-4" table:style-name="ce1">
            <text:p>-0.00043066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re-COVID</text:p>
          </table:table-cell>
          <table:table-cell table:number-columns-repeated="16373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1">
            <text:p>Apr</text:p>
          </table:table-cell>
          <table:table-cell office:value-type="float" office:value="4524801" table:style-name="ce1">
            <text:p>4524801</text:p>
          </table:table-cell>
          <table:table-cell office:value-type="float" office:value="242310" table:style-name="ce1">
            <text:p>242310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23.29" table:style-name="ce1">
            <text:p>23.29</text:p>
          </table:table-cell>
          <table:table-cell office:value-type="float" office:value="1.5347950703285421E-3" table:style-name="ce1">
            <text:p>0.001534795</text:p>
          </table:table-cell>
          <table:table-cell office:value-type="float" office:value="3.4467901766479232E-3" table:style-name="ce1">
            <text:p>0.00344679</text:p>
          </table:table-cell>
          <table:table-cell office:value-type="float" office:value="-0.10000000000000051" table:style-name="ce1">
            <text:p>-0.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re-COVID</text:p>
          </table:table-cell>
          <table:table-cell table:number-columns-repeated="16373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1">
            <text:p>May</text:p>
          </table:table-cell>
          <table:table-cell office:value-type="float" office:value="4530248" table:style-name="ce1">
            <text:p>4530248</text:p>
          </table:table-cell>
          <table:table-cell office:value-type="float" office:value="240491" table:style-name="ce1">
            <text:p>240491</text:p>
          </table:table-cell>
          <table:table-cell office:value-type="float" office:value="5" table:style-name="ce1">
            <text:p>5</text:p>
          </table:table-cell>
          <table:table-cell office:value-type="float" office:value="23.48" table:style-name="ce1">
            <text:p>23.48</text:p>
          </table:table-cell>
          <table:table-cell office:value-type="float" office:value="1.2038098471070879E-3" table:style-name="ce1">
            <text:p>0.00120381</text:p>
          </table:table-cell>
          <table:table-cell office:value-type="float" office:value="8.1580077286389566E-3" table:style-name="ce1">
            <text:p>0.008158008</text:p>
          </table:table-cell>
          <table:table-cell office:value-type="float" office:value="-9.9999999999999645E-2" table:style-name="ce1">
            <text:p>-0.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re-COVID</text:p>
          </table:table-cell>
          <table:table-cell table:number-columns-repeated="16373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1">
            <text:p>Jun</text:p>
          </table:table-cell>
          <table:table-cell office:value-type="float" office:value="4534902" table:style-name="ce1">
            <text:p>4534902</text:p>
          </table:table-cell>
          <table:table-cell office:value-type="float" office:value="240173" table:style-name="ce1">
            <text:p>240173</text:p>
          </table:table-cell>
          <table:table-cell office:value-type="float" office:value="5" table:style-name="ce1">
            <text:p>5</text:p>
          </table:table-cell>
          <table:table-cell office:value-type="float" office:value="23.32" table:style-name="ce1">
            <text:p>23.32</text:p>
          </table:table-cell>
          <table:table-cell office:value-type="float" office:value="1.027316826805067E-3" table:style-name="ce1">
            <text:p>0.001027317</text:p>
          </table:table-cell>
          <table:table-cell office:value-type="float" office:value="-6.8143100511073324E-3" table:style-name="ce1">
            <text:p>-0.0068143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Pre-COVID</text:p>
          </table:table-cell>
          <table:table-cell table:number-columns-repeated="16373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1">
            <text:p>Jul</text:p>
          </table:table-cell>
          <table:table-cell office:value-type="float" office:value="4539875" table:style-name="ce1">
            <text:p>4539875</text:p>
          </table:table-cell>
          <table:table-cell office:value-type="float" office:value="240880" table:style-name="ce1">
            <text:p>240880</text:p>
          </table:table-cell>
          <table:table-cell office:value-type="float" office:value="5" table:style-name="ce1">
            <text:p>5</text:p>
          </table:table-cell>
          <table:table-cell office:value-type="float" office:value="23.29" table:style-name="ce1">
            <text:p>23.29</text:p>
          </table:table-cell>
          <table:table-cell office:value-type="float" office:value="1.0966058362451929E-3" table:style-name="ce1">
            <text:p>0.001096606</text:p>
          </table:table-cell>
          <table:table-cell office:value-type="float" office:value="-1.2864493996569951E-3" table:style-name="ce1">
            <text:p>-0.001286449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Pre-COVID</text:p>
          </table:table-cell>
          <table:table-cell table:number-columns-repeated="16373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1">
            <text:p>Aug</text:p>
          </table:table-cell>
          <table:table-cell office:value-type="float" office:value="4545676" table:style-name="ce1">
            <text:p>4545676</text:p>
          </table:table-cell>
          <table:table-cell office:value-type="float" office:value="242209" table:style-name="ce1">
            <text:p>242209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23.44" table:style-name="ce1">
            <text:p>23.44</text:p>
          </table:table-cell>
          <table:table-cell office:value-type="float" office:value="1.277788485365787E-3" table:style-name="ce1">
            <text:p>0.001277788</text:p>
          </table:table-cell>
          <table:table-cell office:value-type="float" office:value="6.4405324173465927E-3" table:style-name="ce1">
            <text:p>0.006440532</text:p>
          </table:table-cell>
          <table:table-cell office:value-type="float" office:value="9.9999999999999645E-2" table:style-name="ce1">
            <text:p>0.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re-COVID</text:p>
          </table:table-cell>
          <table:table-cell table:number-columns-repeated="16373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1">
            <text:p>Sep</text:p>
          </table:table-cell>
          <table:table-cell office:value-type="float" office:value="4552222" table:style-name="ce1">
            <text:p>4552222</text:p>
          </table:table-cell>
          <table:table-cell office:value-type="float" office:value="243851" table:style-name="ce1">
            <text:p>243851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23.51" table:style-name="ce1">
            <text:p>23.51</text:p>
          </table:table-cell>
          <table:table-cell office:value-type="float" office:value="1.4400498407717581E-3" table:style-name="ce1">
            <text:p>0.00144005</text:p>
          </table:table-cell>
          <table:table-cell office:value-type="float" office:value="2.9863481228669061E-3" table:style-name="ce1">
            <text:p>0.002986348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re-COVID</text:p>
          </table:table-cell>
          <table:table-cell table:number-columns-repeated="16373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1">
            <text:p>Oct</text:p>
          </table:table-cell>
          <table:table-cell office:value-type="float" office:value="4559430" table:style-name="ce1">
            <text:p>4559430</text:p>
          </table:table-cell>
          <table:table-cell office:value-type="float" office:value="244716" table:style-name="ce1">
            <text:p>244716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23.82" table:style-name="ce1">
            <text:p>23.82</text:p>
          </table:table-cell>
          <table:table-cell office:value-type="float" office:value="1.5834025669222639E-3" table:style-name="ce1">
            <text:p>0.001583403</text:p>
          </table:table-cell>
          <table:table-cell office:value-type="float" office:value="1.31858783496384E-2" table:style-name="ce1">
            <text:p>0.013185878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Pre-COVID</text:p>
          </table:table-cell>
          <table:table-cell table:number-columns-repeated="16373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1">
            <text:p>Nov</text:p>
          </table:table-cell>
          <table:table-cell office:value-type="float" office:value="4567649" table:style-name="ce1">
            <text:p>4567649</text:p>
          </table:table-cell>
          <table:table-cell office:value-type="float" office:value="243704" table:style-name="ce1">
            <text:p>243704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23.66" table:style-name="ce1">
            <text:p>23.66</text:p>
          </table:table-cell>
          <table:table-cell office:value-type="float" office:value="1.8026376104030551E-3" table:style-name="ce1">
            <text:p>0.001802638</text:p>
          </table:table-cell>
          <table:table-cell office:value-type="float" office:value="-6.7170445004198212E-3" table:style-name="ce1">
            <text:p>-0.006717045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Pre-COVID</text:p>
          </table:table-cell>
          <table:table-cell table:number-columns-repeated="16373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1">
            <text:p>Dec</text:p>
          </table:table-cell>
          <table:table-cell office:value-type="float" office:value="4577097" table:style-name="ce1">
            <text:p>4577097</text:p>
          </table:table-cell>
          <table:table-cell office:value-type="float" office:value="240671" table:style-name="ce1">
            <text:p>240671</text:p>
          </table:table-cell>
          <table:table-cell office:value-type="float" office:value="5" table:style-name="ce1">
            <text:p>5</text:p>
          </table:table-cell>
          <table:table-cell office:value-type="float" office:value="23.56" table:style-name="ce1">
            <text:p>23.56</text:p>
          </table:table-cell>
          <table:table-cell office:value-type="float" office:value="2.0684601640800328E-3" table:style-name="ce1">
            <text:p>0.00206846</text:p>
          </table:table-cell>
          <table:table-cell office:value-type="float" office:value="-4.2265426880812099E-3" table:style-name="ce1">
            <text:p>-0.004226543</text:p>
          </table:table-cell>
          <table:table-cell office:value-type="float" office:value="-9.9999999999999645E-2" table:style-name="ce1">
            <text:p>-0.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Pre-COVID</text:p>
          </table:table-cell>
          <table:table-cell table:number-columns-repeated="16373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Jan</text:p>
          </table:table-cell>
          <table:table-cell office:value-type="float" office:value="4587484" table:style-name="ce1">
            <text:p>4587484</text:p>
          </table:table-cell>
          <table:table-cell office:value-type="float" office:value="236118" table:style-name="ce1">
            <text:p>236118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23.97" table:style-name="ce1">
            <text:p>23.97</text:p>
          </table:table-cell>
          <table:table-cell office:value-type="float" office:value="2.269342336419788E-3" table:style-name="ce1">
            <text:p>0.002269342</text:p>
          </table:table-cell>
          <table:table-cell office:value-type="float" office:value="1.7402376910016989E-2" table:style-name="ce1">
            <text:p>0.017402377</text:p>
          </table:table-cell>
          <table:table-cell office:value-type="float" office:value="-9.9999999999999645E-2" table:style-name="ce1">
            <text:p>-0.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Pre-COVID</text:p>
          </table:table-cell>
          <table:table-cell table:number-columns-repeated="16373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Feb</text:p>
          </table:table-cell>
          <table:table-cell office:value-type="float" office:value="4598476" table:style-name="ce1">
            <text:p>4598476</text:p>
          </table:table-cell>
          <table:table-cell office:value-type="float" office:value="230611" table:style-name="ce1">
            <text:p>230611</text:p>
          </table:table-cell>
          <table:table-cell office:value-type="float" office:value="4.8" table:style-name="ce1">
            <text:p>4.8</text:p>
          </table:table-cell>
          <table:table-cell office:value-type="float" office:value="23.84" table:style-name="ce1">
            <text:p>23.84</text:p>
          </table:table-cell>
          <table:table-cell office:value-type="float" office:value="2.3960846511944241E-3" table:style-name="ce1">
            <text:p>0.002396085</text:p>
          </table:table-cell>
          <table:table-cell office:value-type="float" office:value="-5.423445974134293E-3" table:style-name="ce1">
            <text:p>-0.005423446</text:p>
          </table:table-cell>
          <table:table-cell office:value-type="float" office:value="-0.10000000000000051" table:style-name="ce1">
            <text:p>-0.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Pre-COVID</text:p>
          </table:table-cell>
          <table:table-cell table:number-columns-repeated="16373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Mar</text:p>
          </table:table-cell>
          <table:table-cell office:value-type="float" office:value="4609099" table:style-name="ce1">
            <text:p>4609099</text:p>
          </table:table-cell>
          <table:table-cell office:value-type="float" office:value="225431" table:style-name="ce1">
            <text:p>225431</text:p>
          </table:table-cell>
          <table:table-cell office:value-type="float" office:value="4.7" table:style-name="ce1">
            <text:p>4.7</text:p>
          </table:table-cell>
          <table:table-cell office:value-type="float" office:value="23.88" table:style-name="ce1">
            <text:p>23.88</text:p>
          </table:table-cell>
          <table:table-cell office:value-type="float" office:value="2.3101131766263428E-3" table:style-name="ce1">
            <text:p>0.002310113</text:p>
          </table:table-cell>
          <table:table-cell office:value-type="float" office:value="1.677852348993253E-3" table:style-name="ce1">
            <text:p>0.001677852</text:p>
          </table:table-cell>
          <table:table-cell office:value-type="float" office:value="-9.9999999999999645E-2" table:style-name="ce1">
            <text:p>-0.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re-COVID</text:p>
          </table:table-cell>
          <table:table-cell table:number-columns-repeated="16373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Apr</text:p>
          </table:table-cell>
          <table:table-cell office:value-type="float" office:value="4619674" table:style-name="ce1">
            <text:p>4619674</text:p>
          </table:table-cell>
          <table:table-cell office:value-type="float" office:value="221563" table:style-name="ce1">
            <text:p>221563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24.21" table:style-name="ce1">
            <text:p>24.21</text:p>
          </table:table-cell>
          <table:table-cell office:value-type="float" office:value="2.2943746706243461E-3" table:style-name="ce1">
            <text:p>0.002294375</text:p>
          </table:table-cell>
          <table:table-cell office:value-type="float" office:value="1.381909547738701E-2" table:style-name="ce1">
            <text:p>0.013819095</text:p>
          </table:table-cell>
          <table:table-cell office:value-type="float" office:value="-0.10000000000000051" table:style-name="ce1">
            <text:p>-0.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Pre-COVID</text:p>
          </table:table-cell>
          <table:table-cell table:number-columns-repeated="16373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May</text:p>
          </table:table-cell>
          <table:table-cell office:value-type="float" office:value="4630715" table:style-name="ce1">
            <text:p>4630715</text:p>
          </table:table-cell>
          <table:table-cell office:value-type="float" office:value="218986" table:style-name="ce1">
            <text:p>218986</text:p>
          </table:table-cell>
          <table:table-cell office:value-type="float" office:value="4.5" table:style-name="ce1">
            <text:p>4.5</text:p>
          </table:table-cell>
          <table:table-cell office:value-type="float" office:value="23.82" table:style-name="ce1">
            <text:p>23.82</text:p>
          </table:table-cell>
          <table:table-cell office:value-type="float" office:value="2.3899954845298609E-3" table:style-name="ce1">
            <text:p>0.002389995</text:p>
          </table:table-cell>
          <table:table-cell office:value-type="float" office:value="-1.610904584882282E-2" table:style-name="ce1">
            <text:p>-0.016109046</text:p>
          </table:table-cell>
          <table:table-cell office:value-type="float" office:value="-9.9999999999999645E-2" table:style-name="ce1">
            <text:p>-0.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Pre-COVID</text:p>
          </table:table-cell>
          <table:table-cell table:number-columns-repeated="16373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Jun</text:p>
          </table:table-cell>
          <table:table-cell office:value-type="float" office:value="4641518" table:style-name="ce1">
            <text:p>4641518</text:p>
          </table:table-cell>
          <table:table-cell office:value-type="float" office:value="217707" table:style-name="ce1">
            <text:p>217707</text:p>
          </table:table-cell>
          <table:table-cell office:value-type="float" office:value="4.5" table:style-name="ce1">
            <text:p>4.5</text:p>
          </table:table-cell>
          <table:table-cell office:value-type="float" office:value="23.64" table:style-name="ce1">
            <text:p>23.64</text:p>
          </table:table-cell>
          <table:table-cell office:value-type="float" office:value="2.3329010746720542E-3" table:style-name="ce1">
            <text:p>0.002332901</text:p>
          </table:table-cell>
          <table:table-cell office:value-type="float" office:value="-7.5566750629722798E-3" table:style-name="ce1">
            <text:p>-0.007556675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Pre-COVID</text:p>
          </table:table-cell>
          <table:table-cell table:number-columns-repeated="16373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Jul</text:p>
          </table:table-cell>
          <table:table-cell office:value-type="float" office:value="4650878" table:style-name="ce1">
            <text:p>4650878</text:p>
          </table:table-cell>
          <table:table-cell office:value-type="float" office:value="217681" table:style-name="ce1">
            <text:p>217681</text:p>
          </table:table-cell>
          <table:table-cell office:value-type="float" office:value="4.5" table:style-name="ce1">
            <text:p>4.5</text:p>
          </table:table-cell>
          <table:table-cell office:value-type="float" office:value="24.05" table:style-name="ce1">
            <text:p>24.05</text:p>
          </table:table-cell>
          <table:table-cell office:value-type="float" office:value="2.0165816441948519E-3" table:style-name="ce1">
            <text:p>0.002016582</text:p>
          </table:table-cell>
          <table:table-cell office:value-type="float" office:value="1.7343485617597298E-2" table:style-name="ce1">
            <text:p>0.017343486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Pre-COVID</text:p>
          </table:table-cell>
          <table:table-cell table:number-columns-repeated="16373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Aug</text:p>
          </table:table-cell>
          <table:table-cell office:value-type="float" office:value="4657816" table:style-name="ce1">
            <text:p>4657816</text:p>
          </table:table-cell>
          <table:table-cell office:value-type="float" office:value="217881" table:style-name="ce1">
            <text:p>217881</text:p>
          </table:table-cell>
          <table:table-cell office:value-type="float" office:value="4.5" table:style-name="ce1">
            <text:p>4.5</text:p>
          </table:table-cell>
          <table:table-cell office:value-type="float" office:value="23.86" table:style-name="ce1">
            <text:p>23.86</text:p>
          </table:table-cell>
          <table:table-cell office:value-type="float" office:value="1.491761340546882E-3" table:style-name="ce1">
            <text:p>0.001491761</text:p>
          </table:table-cell>
          <table:table-cell office:value-type="float" office:value="-7.9002079002079527E-3" table:style-name="ce1">
            <text:p>-0.007900208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Pre-COVID</text:p>
          </table:table-cell>
          <table:table-cell table:number-columns-repeated="16373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Sep</text:p>
          </table:table-cell>
          <table:table-cell office:value-type="float" office:value="4661948" table:style-name="ce1">
            <text:p>4661948</text:p>
          </table:table-cell>
          <table:table-cell office:value-type="float" office:value="217463" table:style-name="ce1">
            <text:p>217463</text:p>
          </table:table-cell>
          <table:table-cell office:value-type="float" office:value="4.5" table:style-name="ce1">
            <text:p>4.5</text:p>
          </table:table-cell>
          <table:table-cell office:value-type="float" office:value="24.1" table:style-name="ce1">
            <text:p>24.1</text:p>
          </table:table-cell>
          <table:table-cell office:value-type="float" office:value="8.8711104088267973E-4" table:style-name="ce1">
            <text:p>0.000887111</text:p>
          </table:table-cell>
          <table:table-cell office:value-type="float" office:value="1.0058675607711729E-2" table:style-name="ce1">
            <text:p>0.010058676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Pre-COVID</text:p>
          </table:table-cell>
          <table:table-cell table:number-columns-repeated="16373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Oct</text:p>
          </table:table-cell>
          <table:table-cell office:value-type="float" office:value="4663602" table:style-name="ce1">
            <text:p>4663602</text:p>
          </table:table-cell>
          <table:table-cell office:value-type="float" office:value="216041" table:style-name="ce1">
            <text:p>216041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24.4" table:style-name="ce1">
            <text:p>24.4</text:p>
          </table:table-cell>
          <table:table-cell office:value-type="float" office:value="3.5478731208499111E-4" table:style-name="ce1">
            <text:p>0.000354787</text:p>
          </table:table-cell>
          <table:table-cell office:value-type="float" office:value="1.244813278008287E-2" table:style-name="ce1">
            <text:p>0.012448133</text:p>
          </table:table-cell>
          <table:table-cell office:value-type="float" office:value="-9.9999999999999645E-2" table:style-name="ce1">
            <text:p>-0.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Pre-COVID</text:p>
          </table:table-cell>
          <table:table-cell table:number-columns-repeated="16373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Nov</text:p>
          </table:table-cell>
          <table:table-cell office:value-type="float" office:value="4663855" table:style-name="ce1">
            <text:p>4663855</text:p>
          </table:table-cell>
          <table:table-cell office:value-type="float" office:value="213735" table:style-name="ce1">
            <text:p>213735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24.14" table:style-name="ce1">
            <text:p>24.14</text:p>
          </table:table-cell>
          <table:table-cell office:value-type="float" office:value="5.4249912406761982E-5" table:style-name="ce1">
            <text:p>5.42499E-05</text:p>
          </table:table-cell>
          <table:table-cell office:value-type="float" office:value="-1.0655737704917951E-2" table:style-name="ce1">
            <text:p>-0.010655738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Pre-COVID</text:p>
          </table:table-cell>
          <table:table-cell table:number-columns-repeated="16373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Dec</text:p>
          </table:table-cell>
          <table:table-cell office:value-type="float" office:value="4665504" table:style-name="ce1">
            <text:p>4665504</text:p>
          </table:table-cell>
          <table:table-cell office:value-type="float" office:value="210424" table:style-name="ce1">
            <text:p>210424</text:p>
          </table:table-cell>
          <table:table-cell office:value-type="float" office:value="4.3" table:style-name="ce1">
            <text:p>4.3</text:p>
          </table:table-cell>
          <table:table-cell office:value-type="float" office:value="24.3" table:style-name="ce1">
            <text:p>24.3</text:p>
          </table:table-cell>
          <table:table-cell office:value-type="float" office:value="3.5357016888389541E-4" table:style-name="ce1">
            <text:p>0.00035357</text:p>
          </table:table-cell>
          <table:table-cell office:value-type="float" office:value="6.6280033140016627E-3" table:style-name="ce1">
            <text:p>0.006628003</text:p>
          </table:table-cell>
          <table:table-cell office:value-type="float" office:value="-0.10000000000000051" table:style-name="ce1">
            <text:p>-0.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Pre-COVID</text:p>
          </table:table-cell>
          <table:table-cell table:number-columns-repeated="16373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1">
            <text:p>Jan</text:p>
          </table:table-cell>
          <table:table-cell office:value-type="float" office:value="4670755" table:style-name="ce1">
            <text:p>4670755</text:p>
          </table:table-cell>
          <table:table-cell office:value-type="float" office:value="206559" table:style-name="ce1">
            <text:p>206559</text:p>
          </table:table-cell>
          <table:table-cell office:value-type="float" office:value="4.2" table:style-name="ce1">
            <text:p>4.2</text:p>
          </table:table-cell>
          <table:table-cell office:value-type="float" office:value="24.79" table:style-name="ce1">
            <text:p>24.79</text:p>
          </table:table-cell>
          <table:table-cell office:value-type="float" office:value="1.125494694678217E-3" table:style-name="ce1">
            <text:p>0.001125495</text:p>
          </table:table-cell>
          <table:table-cell office:value-type="float" office:value="2.016460905349788E-2" table:style-name="ce1">
            <text:p>0.020164609</text:p>
          </table:table-cell>
          <table:table-cell office:value-type="float" office:value="-9.9999999999999645E-2" table:style-name="ce1">
            <text:p>-0.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e-COVID</text:p>
          </table:table-cell>
          <table:table-cell table:number-columns-repeated="16373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1">
            <text:p>Feb</text:p>
          </table:table-cell>
          <table:table-cell office:value-type="float" office:value="4680170" table:style-name="ce1">
            <text:p>4680170</text:p>
          </table:table-cell>
          <table:table-cell office:value-type="float" office:value="202655" table:style-name="ce1">
            <text:p>202655</text:p>
          </table:table-cell>
          <table:table-cell office:value-type="float" office:value="4.2" table:style-name="ce1">
            <text:p>4.2</text:p>
          </table:table-cell>
          <table:table-cell office:value-type="float" office:value="24.81" table:style-name="ce1">
            <text:p>24.81</text:p>
          </table:table-cell>
          <table:table-cell office:value-type="float" office:value="2.0157340729710718E-3" table:style-name="ce1">
            <text:p>0.002015734</text:p>
          </table:table-cell>
          <table:table-cell office:value-type="float" office:value="8.0677692617989411E-4" table:style-name="ce1">
            <text:p>0.000806777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Pre-COVID</text:p>
          </table:table-cell>
          <table:table-cell table:number-columns-repeated="16373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1">
            <text:p>Mar</text:p>
          </table:table-cell>
          <table:table-cell office:value-type="float" office:value="4692280" table:style-name="ce1">
            <text:p>4692280</text:p>
          </table:table-cell>
          <table:table-cell office:value-type="float" office:value="198985" table:style-name="ce1">
            <text:p>198985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24.76" table:style-name="ce1">
            <text:p>24.76</text:p>
          </table:table-cell>
          <table:table-cell office:value-type="float" office:value="2.587512846755566E-3" table:style-name="ce1">
            <text:p>0.002587513</text:p>
          </table:table-cell>
          <table:table-cell office:value-type="float" office:value="-2.01531640467542E-3" table:style-name="ce1">
            <text:p>-0.002015316</text:p>
          </table:table-cell>
          <table:table-cell office:value-type="float" office:value="-0.10000000000000051" table:style-name="ce1">
            <text:p>-0.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Pre-COVID</text:p>
          </table:table-cell>
          <table:table-cell table:number-columns-repeated="16373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1">
            <text:p>Apr</text:p>
          </table:table-cell>
          <table:table-cell office:value-type="float" office:value="4703477" table:style-name="ce1">
            <text:p>4703477</text:p>
          </table:table-cell>
          <table:table-cell office:value-type="float" office:value="195790" table:style-name="ce1">
            <text:p>195790</text:p>
          </table:table-cell>
          <table:table-cell office:value-type="float" office:value="4" table:style-name="ce1">
            <text:p>4</text:p>
          </table:table-cell>
          <table:table-cell office:value-type="float" office:value="25.01" table:style-name="ce1">
            <text:p>25.01</text:p>
          </table:table-cell>
          <table:table-cell office:value-type="float" office:value="2.3862599844851539E-3" table:style-name="ce1">
            <text:p>0.00238626</text:p>
          </table:table-cell>
          <table:table-cell office:value-type="float" office:value="1.009693053311793E-2" table:style-name="ce1">
            <text:p>0.010096931</text:p>
          </table:table-cell>
          <table:table-cell office:value-type="float" office:value="-9.9999999999999645E-2" table:style-name="ce1">
            <text:p>-0.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Pre-COVID</text:p>
          </table:table-cell>
          <table:table-cell table:number-columns-repeated="16373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1">
            <text:p>May</text:p>
          </table:table-cell>
          <table:table-cell office:value-type="float" office:value="4710781" table:style-name="ce1">
            <text:p>4710781</text:p>
          </table:table-cell>
          <table:table-cell office:value-type="float" office:value="193643" table:style-name="ce1">
            <text:p>193643</text:p>
          </table:table-cell>
          <table:table-cell office:value-type="float" office:value="3.9" table:style-name="ce1">
            <text:p>3.9</text:p>
          </table:table-cell>
          <table:table-cell office:value-type="float" office:value="24.76" table:style-name="ce1">
            <text:p>24.76</text:p>
          </table:table-cell>
          <table:table-cell office:value-type="float" office:value="1.552893742225167E-3" table:style-name="ce1">
            <text:p>0.001552894</text:p>
          </table:table-cell>
          <table:table-cell office:value-type="float" office:value="-9.996001599360255E-3" table:style-name="ce1">
            <text:p>-0.009996002</text:p>
          </table:table-cell>
          <table:table-cell office:value-type="float" office:value="-0.1000000000000001" table:style-name="ce1">
            <text:p>-0.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Pre-COVID</text:p>
          </table:table-cell>
          <table:table-cell table:number-columns-repeated="16373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1">
            <text:p>Jun</text:p>
          </table:table-cell>
          <table:table-cell office:value-type="float" office:value="4714182" table:style-name="ce1">
            <text:p>4714182</text:p>
          </table:table-cell>
          <table:table-cell office:value-type="float" office:value="192576" table:style-name="ce1">
            <text:p>192576</text:p>
          </table:table-cell>
          <table:table-cell office:value-type="float" office:value="3.9" table:style-name="ce1">
            <text:p>3.9</text:p>
          </table:table-cell>
          <table:table-cell office:value-type="float" office:value="24.61" table:style-name="ce1">
            <text:p>24.61</text:p>
          </table:table-cell>
          <table:table-cell office:value-type="float" office:value="7.2196096570823398E-4" table:style-name="ce1">
            <text:p>0.000721961</text:p>
          </table:table-cell>
          <table:table-cell office:value-type="float" office:value="-6.0581583198708452E-3" table:style-name="ce1">
            <text:p>-0.006058158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Pre-COVID</text:p>
          </table:table-cell>
          <table:table-cell table:number-columns-repeated="16373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1">
            <text:p>Jul</text:p>
          </table:table-cell>
          <table:table-cell office:value-type="float" office:value="4714462" table:style-name="ce1">
            <text:p>4714462</text:p>
          </table:table-cell>
          <table:table-cell office:value-type="float" office:value="192364" table:style-name="ce1">
            <text:p>192364</text:p>
          </table:table-cell>
          <table:table-cell office:value-type="float" office:value="3.9" table:style-name="ce1">
            <text:p>3.9</text:p>
          </table:table-cell>
          <table:table-cell office:value-type="float" office:value="24.92" table:style-name="ce1">
            <text:p>24.92</text:p>
          </table:table-cell>
          <table:table-cell office:value-type="float" office:value="5.9395246089353359E-5" table:style-name="ce1">
            <text:p>5.93952E-05</text:p>
          </table:table-cell>
          <table:table-cell office:value-type="float" office:value="1.259650548557506E-2" table:style-name="ce1">
            <text:p>0.012596505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Pre-COVID</text:p>
          </table:table-cell>
          <table:table-cell table:number-columns-repeated="16373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1">
            <text:p>Aug</text:p>
          </table:table-cell>
          <table:table-cell office:value-type="float" office:value="4713811" table:style-name="ce1">
            <text:p>4713811</text:p>
          </table:table-cell>
          <table:table-cell office:value-type="float" office:value="193336" table:style-name="ce1">
            <text:p>193336</text:p>
          </table:table-cell>
          <table:table-cell office:value-type="float" office:value="3.9" table:style-name="ce1">
            <text:p>3.9</text:p>
          </table:table-cell>
          <table:table-cell office:value-type="float" office:value="24.84" table:style-name="ce1">
            <text:p>24.84</text:p>
          </table:table-cell>
          <table:table-cell office:value-type="float" office:value="-1.380857455209099E-4" table:style-name="ce1">
            <text:p>-0.000138086</text:p>
          </table:table-cell>
          <table:table-cell office:value-type="float" office:value="-3.2102728731942952E-3" table:style-name="ce1">
            <text:p>-0.003210273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Pre-COVID</text:p>
          </table:table-cell>
          <table:table-cell table:number-columns-repeated="16373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1">
            <text:p>Sep</text:p>
          </table:table-cell>
          <table:table-cell office:value-type="float" office:value="4715051" table:style-name="ce1">
            <text:p>4715051</text:p>
          </table:table-cell>
          <table:table-cell office:value-type="float" office:value="195299" table:style-name="ce1">
            <text:p>195299</text:p>
          </table:table-cell>
          <table:table-cell office:value-type="float" office:value="4" table:style-name="ce1">
            <text:p>4</text:p>
          </table:table-cell>
          <table:table-cell office:value-type="float" office:value="25.52" table:style-name="ce1">
            <text:p>25.52</text:p>
          </table:table-cell>
          <table:table-cell office:value-type="float" office:value="2.630567920521209E-4" table:style-name="ce1">
            <text:p>0.000263057</text:p>
          </table:table-cell>
          <table:table-cell office:value-type="float" office:value="2.737520128824476E-2" table:style-name="ce1">
            <text:p>0.027375201</text:p>
          </table:table-cell>
          <table:table-cell office:value-type="float" office:value="0.1000000000000001" table:style-name="ce1">
            <text:p>0.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Pre-COVID</text:p>
          </table:table-cell>
          <table:table-cell table:number-columns-repeated="16373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1">
            <text:p>Oct</text:p>
          </table:table-cell>
          <table:table-cell office:value-type="float" office:value="4720133" table:style-name="ce1">
            <text:p>4720133</text:p>
          </table:table-cell>
          <table:table-cell office:value-type="float" office:value="197421" table:style-name="ce1">
            <text:p>197421</text:p>
          </table:table-cell>
          <table:table-cell office:value-type="float" office:value="4" table:style-name="ce1">
            <text:p>4</text:p>
          </table:table-cell>
          <table:table-cell office:value-type="float" office:value="25.04" table:style-name="ce1">
            <text:p>25.04</text:p>
          </table:table-cell>
          <table:table-cell office:value-type="float" office:value="1.077825033069632E-3" table:style-name="ce1">
            <text:p>0.001077825</text:p>
          </table:table-cell>
          <table:table-cell office:value-type="float" office:value="-1.88087774294671E-2" table:style-name="ce1">
            <text:p>-0.018808777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Pre-COVID</text:p>
          </table:table-cell>
          <table:table-cell table:number-columns-repeated="16373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1">
            <text:p>Nov</text:p>
          </table:table-cell>
          <table:table-cell office:value-type="float" office:value="4729048" table:style-name="ce1">
            <text:p>4729048</text:p>
          </table:table-cell>
          <table:table-cell office:value-type="float" office:value="198895" table:style-name="ce1">
            <text:p>198895</text:p>
          </table:table-cell>
          <table:table-cell office:value-type="float" office:value="4" table:style-name="ce1">
            <text:p>4</text:p>
          </table:table-cell>
          <table:table-cell office:value-type="float" office:value="25.21" table:style-name="ce1">
            <text:p>25.21</text:p>
          </table:table-cell>
          <table:table-cell office:value-type="float" office:value="1.88871796620985E-3" table:style-name="ce1">
            <text:p>0.001888718</text:p>
          </table:table-cell>
          <table:table-cell office:value-type="float" office:value="6.7891373801917624E-3" table:style-name="ce1">
            <text:p>0.006789137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Pre-COVID</text:p>
          </table:table-cell>
          <table:table-cell table:number-columns-repeated="16373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1">
            <text:p>Dec</text:p>
          </table:table-cell>
          <table:table-cell office:value-type="float" office:value="4740426" table:style-name="ce1">
            <text:p>4740426</text:p>
          </table:table-cell>
          <table:table-cell office:value-type="float" office:value="199172" table:style-name="ce1">
            <text:p>199172</text:p>
          </table:table-cell>
          <table:table-cell office:value-type="float" office:value="4" table:style-name="ce1">
            <text:p>4</text:p>
          </table:table-cell>
          <table:table-cell office:value-type="float" office:value="25.67" table:style-name="ce1">
            <text:p>25.67</text:p>
          </table:table-cell>
          <table:table-cell office:value-type="float" office:value="2.4059810769524858E-3" table:style-name="ce1">
            <text:p>0.002405981</text:p>
          </table:table-cell>
          <table:table-cell office:value-type="float" office:value="1.824672748909166E-2" table:style-name="ce1">
            <text:p>0.018246727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Pre-COVID</text:p>
          </table:table-cell>
          <table:table-cell table:number-columns-repeated="16373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1">
            <text:p>Jan</text:p>
          </table:table-cell>
          <table:table-cell office:value-type="float" office:value="4751946" table:style-name="ce1">
            <text:p>4751946</text:p>
          </table:table-cell>
          <table:table-cell office:value-type="float" office:value="198216" table:style-name="ce1">
            <text:p>198216</text:p>
          </table:table-cell>
          <table:table-cell office:value-type="float" office:value="4" table:style-name="ce1">
            <text:p>4</text:p>
          </table:table-cell>
          <table:table-cell office:value-type="float" office:value="25.44" table:style-name="ce1">
            <text:p>25.44</text:p>
          </table:table-cell>
          <table:table-cell office:value-type="float" office:value="2.4301613399302091E-3" table:style-name="ce1">
            <text:p>0.002430161</text:p>
          </table:table-cell>
          <table:table-cell office:value-type="float" office:value="-8.9598753408648389E-3" table:style-name="ce1">
            <text:p>-0.008959875</text:p>
          </table:table-cell>
          <table:table-cell office:value-type="float" office:value="0" table:style-name="ce1">
            <text:p>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Pre-COVID</text:p>
          </table:table-cell>
          <table:table-cell table:number-columns-repeated="16373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1">
            <text:p>Feb</text:p>
          </table:table-cell>
          <table:table-cell office:value-type="float" office:value="4762008" table:style-name="ce1">
            <text:p>4762008</text:p>
          </table:table-cell>
          <table:table-cell office:value-type="float" office:value="195936" table:style-name="ce1">
            <text:p>195936</text:p>
          </table:table-cell>
          <table:table-cell office:value-type="float" office:value="4" table:style-name="ce1">
            <text:p>4</text:p>
          </table:table-cell>
          <table:table-cell office:value-type="float" office:value="25.34" table:style-name="ce1">
            <text:p>25.34</text:p>
          </table:table-cell>
          <table:table-cell office:value-type="float" office:value="2.117448304336792E-3" table:style-name="ce1">
            <text:p>0.002117448</text:p>
          </table:table-cell>
          <table:table-cell office:value-type="float" office:value="-3.9308176100629486E-3" table:style-name="ce1">
            <text:p>-0.003930818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Pre-COVID</text:p>
          </table:table-cell>
          <table:table-cell table:number-columns-repeated="16373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1">
            <text:p>Mar</text:p>
          </table:table-cell>
          <table:table-cell office:value-type="float" office:value="4769753" table:style-name="ce1">
            <text:p>4769753</text:p>
          </table:table-cell>
          <table:table-cell office:value-type="float" office:value="193366" table:style-name="ce1">
            <text:p>193366</text:p>
          </table:table-cell>
          <table:table-cell office:value-type="float" office:value="3.9" table:style-name="ce1">
            <text:p>3.9</text:p>
          </table:table-cell>
          <table:table-cell office:value-type="float" office:value="25.23" table:style-name="ce1">
            <text:p>25.23</text:p>
          </table:table-cell>
          <table:table-cell office:value-type="float" office:value="1.626414739328451E-3" table:style-name="ce1">
            <text:p>0.001626415</text:p>
          </table:table-cell>
          <table:table-cell office:value-type="float" office:value="-4.3409629044987939E-3" table:style-name="ce1">
            <text:p>-0.004340963</text:p>
          </table:table-cell>
          <table:table-cell office:value-type="float" office:value="-0.1000000000000001" table:style-name="ce1">
            <text:p>-0.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Pre-COVID</text:p>
          </table:table-cell>
          <table:table-cell table:number-columns-repeated="16373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1">
            <text:p>Apr</text:p>
          </table:table-cell>
          <table:table-cell office:value-type="float" office:value="4775947" table:style-name="ce1">
            <text:p>4775947</text:p>
          </table:table-cell>
          <table:table-cell office:value-type="float" office:value="191471" table:style-name="ce1">
            <text:p>191471</text:p>
          </table:table-cell>
          <table:table-cell office:value-type="float" office:value="3.9" table:style-name="ce1">
            <text:p>3.9</text:p>
          </table:table-cell>
          <table:table-cell office:value-type="float" office:value="25.24" table:style-name="ce1">
            <text:p>25.24</text:p>
          </table:table-cell>
          <table:table-cell office:value-type="float" office:value="1.2985997388124709E-3" table:style-name="ce1">
            <text:p>0.0012986</text:p>
          </table:table-cell>
          <table:table-cell office:value-type="float" office:value="3.9635354736417011E-4" table:style-name="ce1">
            <text:p>0.000396354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Pre-COVID</text:p>
          </table:table-cell>
          <table:table-cell table:number-columns-repeated="16373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1">
            <text:p>May</text:p>
          </table:table-cell>
          <table:table-cell office:value-type="float" office:value="4781384" table:style-name="ce1">
            <text:p>4781384</text:p>
          </table:table-cell>
          <table:table-cell office:value-type="float" office:value="190923" table:style-name="ce1">
            <text:p>190923</text:p>
          </table:table-cell>
          <table:table-cell office:value-type="float" office:value="3.8" table:style-name="ce1">
            <text:p>3.8</text:p>
          </table:table-cell>
          <table:table-cell office:value-type="float" office:value="25.2" table:style-name="ce1">
            <text:p>25.2</text:p>
          </table:table-cell>
          <table:table-cell office:value-type="float" office:value="1.1384129681506099E-3" table:style-name="ce1">
            <text:p>0.001138413</text:p>
          </table:table-cell>
          <table:table-cell office:value-type="float" office:value="-1.5847860538826921E-3" table:style-name="ce1">
            <text:p>-0.001584786</text:p>
          </table:table-cell>
          <table:table-cell office:value-type="float" office:value="-0.1000000000000001" table:style-name="ce1">
            <text:p>-0.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Pre-COVID</text:p>
          </table:table-cell>
          <table:table-cell table:number-columns-repeated="16373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1">
            <text:p>Jun</text:p>
          </table:table-cell>
          <table:table-cell office:value-type="float" office:value="4786799" table:style-name="ce1">
            <text:p>4786799</text:p>
          </table:table-cell>
          <table:table-cell office:value-type="float" office:value="191786" table:style-name="ce1">
            <text:p>191786</text:p>
          </table:table-cell>
          <table:table-cell office:value-type="float" office:value="3.9" table:style-name="ce1">
            <text:p>3.9</text:p>
          </table:table-cell>
          <table:table-cell office:value-type="float" office:value="25.29" table:style-name="ce1">
            <text:p>25.29</text:p>
          </table:table-cell>
          <table:table-cell office:value-type="float" office:value="1.132517279515722E-3" table:style-name="ce1">
            <text:p>0.001132517</text:p>
          </table:table-cell>
          <table:table-cell office:value-type="float" office:value="3.5714285714285661E-3" table:style-name="ce1">
            <text:p>0.003571429</text:p>
          </table:table-cell>
          <table:table-cell office:value-type="float" office:value="0.1000000000000001" table:style-name="ce1">
            <text:p>0.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Pre-COVID</text:p>
          </table:table-cell>
          <table:table-cell table:number-columns-repeated="16373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1">
            <text:p>Jul</text:p>
          </table:table-cell>
          <table:table-cell office:value-type="float" office:value="4792965" table:style-name="ce1">
            <text:p>4792965</text:p>
          </table:table-cell>
          <table:table-cell office:value-type="float" office:value="193401" table:style-name="ce1">
            <text:p>193401</text:p>
          </table:table-cell>
          <table:table-cell office:value-type="float" office:value="3.9" table:style-name="ce1">
            <text:p>3.9</text:p>
          </table:table-cell>
          <table:table-cell office:value-type="float" office:value="25.18" table:style-name="ce1">
            <text:p>25.18</text:p>
          </table:table-cell>
          <table:table-cell office:value-type="float" office:value="1.288125948050043E-3" table:style-name="ce1">
            <text:p>0.001288126</text:p>
          </table:table-cell>
          <table:table-cell office:value-type="float" office:value="-4.3495452748121563E-3" table:style-name="ce1">
            <text:p>-0.004349545</text:p>
          </table:table-cell>
          <table:table-cell office:value-type="float" office:value="0" table:style-name="ce1">
            <text:p>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Pre-COVID</text:p>
          </table:table-cell>
          <table:table-cell table:number-columns-repeated="16373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1">
            <text:p>Aug</text:p>
          </table:table-cell>
          <table:table-cell office:value-type="float" office:value="4800148" table:style-name="ce1">
            <text:p>4800148</text:p>
          </table:table-cell>
          <table:table-cell office:value-type="float" office:value="194507" table:style-name="ce1">
            <text:p>194507</text:p>
          </table:table-cell>
          <table:table-cell office:value-type="float" office:value="3.9" table:style-name="ce1">
            <text:p>3.9</text:p>
          </table:table-cell>
          <table:table-cell office:value-type="float" office:value="25.39" table:style-name="ce1">
            <text:p>25.39</text:p>
          </table:table-cell>
          <table:table-cell office:value-type="float" office:value="1.498654799273519E-3" table:style-name="ce1">
            <text:p>0.001498655</text:p>
          </table:table-cell>
          <table:table-cell office:value-type="float" office:value="8.3399523431295017E-3" table:style-name="ce1">
            <text:p>0.008339952</text:p>
          </table:table-cell>
          <table:table-cell office:value-type="float" office:value="0" table:style-name="ce1">
            <text:p>0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Pre-COVID</text:p>
          </table:table-cell>
          <table:table-cell table:number-columns-repeated="16373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1">
            <text:p>Sep</text:p>
          </table:table-cell>
          <table:table-cell office:value-type="float" office:value="4809111" table:style-name="ce1">
            <text:p>4809111</text:p>
          </table:table-cell>
          <table:table-cell office:value-type="float" office:value="193538" table:style-name="ce1">
            <text:p>193538</text:p>
          </table:table-cell>
          <table:table-cell office:value-type="float" office:value="3.9" table:style-name="ce1">
            <text:p>3.9</text:p>
          </table:table-cell>
          <table:table-cell office:value-type="float" office:value="25.53" table:style-name="ce1">
            <text:p>25.53</text:p>
          </table:table-cell>
          <table:table-cell office:value-type="float" office:value="1.8672340936154469E-3" table:style-name="ce1">
            <text:p>0.001867234</text:p>
          </table:table-cell>
          <table:table-cell office:value-type="float" office:value="5.513981882630979E-3" table:style-name="ce1">
            <text:p>0.005513982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Pre-COVID</text:p>
          </table:table-cell>
          <table:table-cell table:number-columns-repeated="16373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1">
            <text:p>Oct</text:p>
          </table:table-cell>
          <table:table-cell office:value-type="float" office:value="4818362" table:style-name="ce1">
            <text:p>4818362</text:p>
          </table:table-cell>
          <table:table-cell office:value-type="float" office:value="191252" table:style-name="ce1">
            <text:p>191252</text:p>
          </table:table-cell>
          <table:table-cell office:value-type="float" office:value="3.8" table:style-name="ce1">
            <text:p>3.8</text:p>
          </table:table-cell>
          <table:table-cell office:value-type="float" office:value="25.47" table:style-name="ce1">
            <text:p>25.47</text:p>
          </table:table-cell>
          <table:table-cell office:value-type="float" office:value="1.923640356814388E-3" table:style-name="ce1">
            <text:p>0.00192364</text:p>
          </table:table-cell>
          <table:table-cell office:value-type="float" office:value="-2.3501762632198299E-3" table:style-name="ce1">
            <text:p>-0.002350176</text:p>
          </table:table-cell>
          <table:table-cell office:value-type="float" office:value="-0.1000000000000001" table:style-name="ce1">
            <text:p>-0.1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Pre-COVID</text:p>
          </table:table-cell>
          <table:table-cell table:number-columns-repeated="16373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1">
            <text:p>Nov</text:p>
          </table:table-cell>
          <table:table-cell office:value-type="float" office:value="4826118" table:style-name="ce1">
            <text:p>4826118</text:p>
          </table:table-cell>
          <table:table-cell office:value-type="float" office:value="188926" table:style-name="ce1">
            <text:p>188926</text:p>
          </table:table-cell>
          <table:table-cell office:value-type="float" office:value="3.8" table:style-name="ce1">
            <text:p>3.8</text:p>
          </table:table-cell>
          <table:table-cell office:value-type="float" office:value="25.89" table:style-name="ce1">
            <text:p>25.89</text:p>
          </table:table-cell>
          <table:table-cell office:value-type="float" office:value="1.6096756532614201E-3" table:style-name="ce1">
            <text:p>0.001609676</text:p>
          </table:table-cell>
          <table:table-cell office:value-type="float" office:value="1.648998822143705E-2" table:style-name="ce1">
            <text:p>0.016489988</text:p>
          </table:table-cell>
          <table:table-cell office:value-type="float" office:value="0" table:style-name="ce1">
            <text:p>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Pre-COVID</text:p>
          </table:table-cell>
          <table:table-cell table:number-columns-repeated="16373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1">
            <text:p>Dec</text:p>
          </table:table-cell>
          <table:table-cell office:value-type="float" office:value="4828806" table:style-name="ce1">
            <text:p>4828806</text:p>
          </table:table-cell>
          <table:table-cell office:value-type="float" office:value="187776" table:style-name="ce1">
            <text:p>187776</text:p>
          </table:table-cell>
          <table:table-cell office:value-type="float" office:value="3.7" table:style-name="ce1">
            <text:p>3.7</text:p>
          </table:table-cell>
          <table:table-cell office:value-type="float" office:value="26" table:style-name="ce1">
            <text:p>26</text:p>
          </table:table-cell>
          <table:table-cell office:value-type="float" office:value="5.5696939030500288E-4" table:style-name="ce1">
            <text:p>0.000556969</text:p>
          </table:table-cell>
          <table:table-cell office:value-type="float" office:value="4.2487446890691156E-3" table:style-name="ce1">
            <text:p>0.004248745</text:p>
          </table:table-cell>
          <table:table-cell office:value-type="float" office:value="-9.9999999999999645E-2" table:style-name="ce1">
            <text:p>-0.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Pre-COVID</text:p>
          </table:table-cell>
          <table:table-cell table:number-columns-repeated="16373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1">
            <text:p>Jan</text:p>
          </table:table-cell>
          <table:table-cell office:value-type="float" office:value="4825728" table:style-name="ce1">
            <text:p>4825728</text:p>
          </table:table-cell>
          <table:table-cell office:value-type="float" office:value="188048" table:style-name="ce1">
            <text:p>188048</text:p>
          </table:table-cell>
          <table:table-cell office:value-type="float" office:value="3.8" table:style-name="ce1">
            <text:p>3.8</text:p>
          </table:table-cell>
          <table:table-cell office:value-type="float" office:value="25.89" table:style-name="ce1">
            <text:p>25.89</text:p>
          </table:table-cell>
          <table:table-cell office:value-type="float" office:value="-6.3742465528745617E-4" table:style-name="ce1">
            <text:p>-0.000637425</text:p>
          </table:table-cell>
          <table:table-cell office:value-type="float" office:value="-4.230769230769209E-3" table:style-name="ce1">
            <text:p>-0.004230769</text:p>
          </table:table-cell>
          <table:table-cell office:value-type="float" office:value="9.9999999999999645E-2" table:style-name="ce1">
            <text:p>0.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COVID</text:p>
          </table:table-cell>
          <table:table-cell table:number-columns-repeated="16373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1">
            <text:p>Feb</text:p>
          </table:table-cell>
          <table:table-cell office:value-type="float" office:value="4819159" table:style-name="ce1">
            <text:p>4819159</text:p>
          </table:table-cell>
          <table:table-cell office:value-type="float" office:value="189758" table:style-name="ce1">
            <text:p>189758</text:p>
          </table:table-cell>
          <table:table-cell office:value-type="float" office:value="3.8" table:style-name="ce1">
            <text:p>3.8</text:p>
          </table:table-cell>
          <table:table-cell office:value-type="float" office:value="26.11" table:style-name="ce1">
            <text:p>26.11</text:p>
          </table:table-cell>
          <table:table-cell office:value-type="float" office:value="-1.3612453913689291E-3" table:style-name="ce1">
            <text:p>-0.001361245</text:p>
          </table:table-cell>
          <table:table-cell office:value-type="float" office:value="8.497489378138233E-3" table:style-name="ce1">
            <text:p>0.008497489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OVID</text:p>
          </table:table-cell>
          <table:table-cell table:number-columns-repeated="16373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1">
            <text:p>Mar</text:p>
          </table:table-cell>
          <table:table-cell office:value-type="float" office:value="4594402" table:style-name="ce1">
            <text:p>4594402</text:p>
          </table:table-cell>
          <table:table-cell office:value-type="float" office:value="190616" table:style-name="ce1">
            <text:p>190616</text:p>
          </table:table-cell>
          <table:table-cell office:value-type="float" office:value="4" table:style-name="ce1">
            <text:p>4</text:p>
          </table:table-cell>
          <table:table-cell office:value-type="float" office:value="26.05" table:style-name="ce1">
            <text:p>26.05</text:p>
          </table:table-cell>
          <table:table-cell office:value-type="float" office:value="-4.6638220486188563E-2" table:style-name="ce1">
            <text:p>-0.04663822</text:p>
          </table:table-cell>
          <table:table-cell office:value-type="float" office:value="-2.2979701263883081E-3" table:style-name="ce1">
            <text:p>-0.00229797</text:p>
          </table:table-cell>
          <table:table-cell office:value-type="float" office:value="0.20000000000000021" table:style-name="ce1">
            <text:p>0.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COVID</text:p>
          </table:table-cell>
          <table:table-cell table:number-columns-repeated="16373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1">
            <text:p>Apr</text:p>
          </table:table-cell>
          <table:table-cell office:value-type="float" office:value="3969148" table:style-name="ce1">
            <text:p>3969148</text:p>
          </table:table-cell>
          <table:table-cell office:value-type="float" office:value="655990" table:style-name="ce1">
            <text:p>655990</text:p>
          </table:table-cell>
          <table:table-cell office:value-type="float" office:value="14.2" table:style-name="ce1">
            <text:p>14.2</text:p>
          </table:table-cell>
          <table:table-cell office:value-type="float" office:value="26.98" table:style-name="ce1">
            <text:p>26.98</text:p>
          </table:table-cell>
          <table:table-cell office:value-type="float" office:value="-0.13609039870694811" table:style-name="ce1">
            <text:p>-0.136090399</text:p>
          </table:table-cell>
          <table:table-cell office:value-type="float" office:value="3.5700575815738947E-2" table:style-name="ce1">
            <text:p>0.035700576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COVID</text:p>
          </table:table-cell>
          <table:table-cell table:number-columns-repeated="16373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1">
            <text:p>May</text:p>
          </table:table-cell>
          <table:table-cell office:value-type="float" office:value="4208981" table:style-name="ce1">
            <text:p>4208981</text:p>
          </table:table-cell>
          <table:table-cell office:value-type="float" office:value="554524" table:style-name="ce1">
            <text:p>554524</text:p>
          </table:table-cell>
          <table:table-cell office:value-type="float" office:value="11.6" table:style-name="ce1">
            <text:p>11.6</text:p>
          </table:table-cell>
          <table:table-cell office:value-type="float" office:value="26.5" table:style-name="ce1">
            <text:p>26.5</text:p>
          </table:table-cell>
          <table:table-cell office:value-type="float" office:value="6.0424302646310997E-2" table:style-name="ce1">
            <text:p>0.060424303</text:p>
          </table:table-cell>
          <table:table-cell office:value-type="float" office:value="-1.7790956263899201E-2" table:style-name="ce1">
            <text:p>-0.017790956</text:p>
          </table:table-cell>
          <table:table-cell office:value-type="float" office:value="-2.6" table:style-name="ce1">
            <text:p>-2.6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COVID</text:p>
          </table:table-cell>
          <table:table-cell table:number-columns-repeated="16373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1">
            <text:p>Jun</text:p>
          </table:table-cell>
          <table:table-cell office:value-type="float" office:value="4299641" table:style-name="ce1">
            <text:p>4299641</text:p>
          </table:table-cell>
          <table:table-cell office:value-type="float" office:value="465189" table:style-name="ce1">
            <text:p>465189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26.04" table:style-name="ce1">
            <text:p>26.04</text:p>
          </table:table-cell>
          <table:table-cell office:value-type="float" office:value="2.1539655322749141E-2" table:style-name="ce1">
            <text:p>0.021539655</text:p>
          </table:table-cell>
          <table:table-cell office:value-type="float" office:value="-1.7358490566037769E-2" table:style-name="ce1">
            <text:p>-0.017358491</text:p>
          </table:table-cell>
          <table:table-cell office:value-type="float" office:value="-1.7999999999999989" table:style-name="ce1">
            <text:p>-1.8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COVID</text:p>
          </table:table-cell>
          <table:table-cell table:number-columns-repeated="16373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1">
            <text:p>Jul</text:p>
          </table:table-cell>
          <table:table-cell office:value-type="float" office:value="4388197" table:style-name="ce1">
            <text:p>4388197</text:p>
          </table:table-cell>
          <table:table-cell office:value-type="float" office:value="419450" table:style-name="ce1">
            <text:p>419450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26.42" table:style-name="ce1">
            <text:p>26.42</text:p>
          </table:table-cell>
          <table:table-cell office:value-type="float" office:value="2.0596138142696101E-2" table:style-name="ce1">
            <text:p>0.020596138</text:p>
          </table:table-cell>
          <table:table-cell office:value-type="float" office:value="1.459293394777276E-2" table:style-name="ce1">
            <text:p>0.014592934</text:p>
          </table:table-cell>
          <table:table-cell office:value-type="float" office:value="-1.100000000000001" table:style-name="ce1">
            <text:p>-1.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COVID</text:p>
          </table:table-cell>
          <table:table-cell table:number-columns-repeated="16373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1">
            <text:p>Aug</text:p>
          </table:table-cell>
          <table:table-cell office:value-type="float" office:value="4456139" table:style-name="ce1">
            <text:p>4456139</text:p>
          </table:table-cell>
          <table:table-cell office:value-type="float" office:value="354082" table:style-name="ce1">
            <text:p>354082</text:p>
          </table:table-cell>
          <table:table-cell office:value-type="float" office:value="7.4" table:style-name="ce1">
            <text:p>7.4</text:p>
          </table:table-cell>
          <table:table-cell office:value-type="float" office:value="26.71" table:style-name="ce1">
            <text:p>26.71</text:p>
          </table:table-cell>
          <table:table-cell office:value-type="float" office:value="1.548289650624163E-2" table:style-name="ce1">
            <text:p>0.015482897</text:p>
          </table:table-cell>
          <table:table-cell office:value-type="float" office:value="1.097653292959876E-2" table:style-name="ce1">
            <text:p>0.010976533</text:p>
          </table:table-cell>
          <table:table-cell office:value-type="float" office:value="-1.2999999999999989" table:style-name="ce1">
            <text:p>-1.3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COVID</text:p>
          </table:table-cell>
          <table:table-cell table:number-columns-repeated="16373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1">
            <text:p>Sep</text:p>
          </table:table-cell>
          <table:table-cell office:value-type="float" office:value="4511928" table:style-name="ce1">
            <text:p>4511928</text:p>
          </table:table-cell>
          <table:table-cell office:value-type="float" office:value="328890" table:style-name="ce1">
            <text:p>328890</text:p>
          </table:table-cell>
          <table:table-cell office:value-type="float" office:value="6.8" table:style-name="ce1">
            <text:p>6.8</text:p>
          </table:table-cell>
          <table:table-cell office:value-type="float" office:value="26.69" table:style-name="ce1">
            <text:p>26.69</text:p>
          </table:table-cell>
          <table:table-cell office:value-type="float" office:value="1.2519582535464001E-2" table:style-name="ce1">
            <text:p>0.012519583</text:p>
          </table:table-cell>
          <table:table-cell office:value-type="float" office:value="-7.4878322725569347E-4" table:style-name="ce1">
            <text:p>-0.000748783</text:p>
          </table:table-cell>
          <table:table-cell office:value-type="float" office:value="-0.60000000000000053" table:style-name="ce1">
            <text:p>-0.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COVID</text:p>
          </table:table-cell>
          <table:table-cell table:number-columns-repeated="16373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1">
            <text:p>Oct</text:p>
          </table:table-cell>
          <table:table-cell office:value-type="float" office:value="4546022" table:style-name="ce1">
            <text:p>4546022</text:p>
          </table:table-cell>
          <table:table-cell office:value-type="float" office:value="295007" table:style-name="ce1">
            <text:p>295007</text:p>
          </table:table-cell>
          <table:table-cell office:value-type="float" office:value="6.1" table:style-name="ce1">
            <text:p>6.1</text:p>
          </table:table-cell>
          <table:table-cell office:value-type="float" office:value="26.84" table:style-name="ce1">
            <text:p>26.84</text:p>
          </table:table-cell>
          <table:table-cell office:value-type="float" office:value="7.5564149073300817E-3" table:style-name="ce1">
            <text:p>0.007556415</text:p>
          </table:table-cell>
          <table:table-cell office:value-type="float" office:value="5.6200824278755564E-3" table:style-name="ce1">
            <text:p>0.005620082</text:p>
          </table:table-cell>
          <table:table-cell office:value-type="float" office:value="-0.70000000000000018" table:style-name="ce1">
            <text:p>-0.7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COVID</text:p>
          </table:table-cell>
          <table:table-cell table:number-columns-repeated="16373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1">
            <text:p>Nov</text:p>
          </table:table-cell>
          <table:table-cell office:value-type="float" office:value="4568785" table:style-name="ce1">
            <text:p>4568785</text:p>
          </table:table-cell>
          <table:table-cell office:value-type="float" office:value="284107" table:style-name="ce1">
            <text:p>284107</text:p>
          </table:table-cell>
          <table:table-cell office:value-type="float" office:value="5.9" table:style-name="ce1">
            <text:p>5.9</text:p>
          </table:table-cell>
          <table:table-cell office:value-type="float" office:value="27.19" table:style-name="ce1">
            <text:p>27.19</text:p>
          </table:table-cell>
          <table:table-cell office:value-type="float" office:value="5.0072348967954844E-3" table:style-name="ce1">
            <text:p>0.005007235</text:p>
          </table:table-cell>
          <table:table-cell office:value-type="float" office:value="1.304023845007457E-2" table:style-name="ce1">
            <text:p>0.013040238</text:p>
          </table:table-cell>
          <table:table-cell office:value-type="float" office:value="-0.19999999999999929" table:style-name="ce1">
            <text:p>-0.2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COVID</text:p>
          </table:table-cell>
          <table:table-cell table:number-columns-repeated="16373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1">
            <text:p>Dec</text:p>
          </table:table-cell>
          <table:table-cell office:value-type="float" office:value="4581569" table:style-name="ce1">
            <text:p>4581569</text:p>
          </table:table-cell>
          <table:table-cell office:value-type="float" office:value="284412" table:style-name="ce1">
            <text:p>284412</text:p>
          </table:table-cell>
          <table:table-cell office:value-type="float" office:value="5.8" table:style-name="ce1">
            <text:p>5.8</text:p>
          </table:table-cell>
          <table:table-cell office:value-type="float" office:value="27.2" table:style-name="ce1">
            <text:p>27.2</text:p>
          </table:table-cell>
          <table:table-cell office:value-type="float" office:value="2.798118099232071E-3" table:style-name="ce1">
            <text:p>0.002798118</text:p>
          </table:table-cell>
          <table:table-cell office:value-type="float" office:value="3.6778227289437331E-4" table:style-name="ce1">
            <text:p>0.000367782</text:p>
          </table:table-cell>
          <table:table-cell office:value-type="float" office:value="-0.10000000000000051" table:style-name="ce1">
            <text:p>-0.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OVID</text:p>
          </table:table-cell>
          <table:table-cell table:number-columns-repeated="16373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1">
            <text:p>Jan</text:p>
          </table:table-cell>
          <table:table-cell office:value-type="float" office:value="4598477" table:style-name="ce1">
            <text:p>4598477</text:p>
          </table:table-cell>
          <table:table-cell office:value-type="float" office:value="274707" table:style-name="ce1">
            <text:p>274707</text:p>
          </table:table-cell>
          <table:table-cell office:value-type="float" office:value="5.6" table:style-name="ce1">
            <text:p>5.6</text:p>
          </table:table-cell>
          <table:table-cell office:value-type="float" office:value="27.24" table:style-name="ce1">
            <text:p>27.24</text:p>
          </table:table-cell>
          <table:table-cell office:value-type="float" office:value="3.690438799459312E-3" table:style-name="ce1">
            <text:p>0.003690439</text:p>
          </table:table-cell>
          <table:table-cell office:value-type="float" office:value="1.470588235294086E-3" table:style-name="ce1">
            <text:p>0.001470588</text:p>
          </table:table-cell>
          <table:table-cell office:value-type="float" office:value="-0.20000000000000021" table:style-name="ce1">
            <text:p>-0.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Recovery</text:p>
          </table:table-cell>
          <table:table-cell table:number-columns-repeated="16373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1">
            <text:p>Feb</text:p>
          </table:table-cell>
          <table:table-cell office:value-type="float" office:value="4604632" table:style-name="ce1">
            <text:p>4604632</text:p>
          </table:table-cell>
          <table:table-cell office:value-type="float" office:value="268651" table:style-name="ce1">
            <text:p>268651</text:p>
          </table:table-cell>
          <table:table-cell office:value-type="float" office:value="5.5" table:style-name="ce1">
            <text:p>5.5</text:p>
          </table:table-cell>
          <table:table-cell office:value-type="float" office:value="27.36" table:style-name="ce1">
            <text:p>27.36</text:p>
          </table:table-cell>
          <table:table-cell office:value-type="float" office:value="1.3384866337267749E-3" table:style-name="ce1">
            <text:p>0.001338487</text:p>
          </table:table-cell>
          <table:table-cell office:value-type="float" office:value="4.4052863436123716E-3" table:style-name="ce1">
            <text:p>0.004405286</text:p>
          </table:table-cell>
          <table:table-cell office:value-type="float" office:value="-9.9999999999999645E-2" table:style-name="ce1">
            <text:p>-0.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Recovery</text:p>
          </table:table-cell>
          <table:table-cell table:number-columns-repeated="16373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1">
            <text:p>Mar</text:p>
          </table:table-cell>
          <table:table-cell office:value-type="float" office:value="4613408" table:style-name="ce1">
            <text:p>4613408</text:p>
          </table:table-cell>
          <table:table-cell office:value-type="float" office:value="263940" table:style-name="ce1">
            <text:p>263940</text:p>
          </table:table-cell>
          <table:table-cell office:value-type="float" office:value="5.4" table:style-name="ce1">
            <text:p>5.4</text:p>
          </table:table-cell>
          <table:table-cell office:value-type="float" office:value="26.92" table:style-name="ce1">
            <text:p>26.92</text:p>
          </table:table-cell>
          <table:table-cell office:value-type="float" office:value="1.9059069215520369E-3" table:style-name="ce1">
            <text:p>0.001905907</text:p>
          </table:table-cell>
          <table:table-cell office:value-type="float" office:value="-1.6081871345029159E-2" table:style-name="ce1">
            <text:p>-0.016081871</text:p>
          </table:table-cell>
          <table:table-cell office:value-type="float" office:value="-9.9999999999999645E-2" table:style-name="ce1">
            <text:p>-0.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Recovery</text:p>
          </table:table-cell>
          <table:table-cell table:number-columns-repeated="16373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1">
            <text:p>Apr</text:p>
          </table:table-cell>
          <table:table-cell office:value-type="float" office:value="4623125" table:style-name="ce1">
            <text:p>4623125</text:p>
          </table:table-cell>
          <table:table-cell office:value-type="float" office:value="258355" table:style-name="ce1">
            <text:p>258355</text:p>
          </table:table-cell>
          <table:table-cell office:value-type="float" office:value="5.3" table:style-name="ce1">
            <text:p>5.3</text:p>
          </table:table-cell>
          <table:table-cell office:value-type="float" office:value="27.32" table:style-name="ce1">
            <text:p>27.32</text:p>
          </table:table-cell>
          <table:table-cell office:value-type="float" office:value="2.1062520375392771E-3" table:style-name="ce1">
            <text:p>0.002106252</text:p>
          </table:table-cell>
          <table:table-cell office:value-type="float" office:value="1.4858841010401131E-2" table:style-name="ce1">
            <text:p>0.014858841</text:p>
          </table:table-cell>
          <table:table-cell office:value-type="float" office:value="-0.10000000000000051" table:style-name="ce1">
            <text:p>-0.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Recovery</text:p>
          </table:table-cell>
          <table:table-cell table:number-columns-repeated="16373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1">
            <text:p>May</text:p>
          </table:table-cell>
          <table:table-cell office:value-type="float" office:value="4633224" table:style-name="ce1">
            <text:p>4633224</text:p>
          </table:table-cell>
          <table:table-cell office:value-type="float" office:value="251475" table:style-name="ce1">
            <text:p>251475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27.81" table:style-name="ce1">
            <text:p>27.81</text:p>
          </table:table-cell>
          <table:table-cell office:value-type="float" office:value="2.184453156685143E-3" table:style-name="ce1">
            <text:p>0.002184453</text:p>
          </table:table-cell>
          <table:table-cell office:value-type="float" office:value="1.793557833089306E-2" table:style-name="ce1">
            <text:p>0.017935578</text:p>
          </table:table-cell>
          <table:table-cell office:value-type="float" office:value="-0.20000000000000021" table:style-name="ce1">
            <text:p>-0.2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Recovery</text:p>
          </table:table-cell>
          <table:table-cell table:number-columns-repeated="16373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1">
            <text:p>Jun</text:p>
          </table:table-cell>
          <table:table-cell office:value-type="float" office:value="4668688" table:style-name="ce1">
            <text:p>4668688</text:p>
          </table:table-cell>
          <table:table-cell office:value-type="float" office:value="248450" table:style-name="ce1">
            <text:p>248450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27.73" table:style-name="ce1">
            <text:p>27.73</text:p>
          </table:table-cell>
          <table:table-cell office:value-type="float" office:value="7.6542813384373387E-3" table:style-name="ce1">
            <text:p>0.007654281</text:p>
          </table:table-cell>
          <table:table-cell office:value-type="float" office:value="-2.8766630708377669E-3" table:style-name="ce1">
            <text:p>-0.002876663</text:p>
          </table:table-cell>
          <table:table-cell office:value-type="float" office:value="0" table:style-name="ce1">
            <text:p>0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Recovery</text:p>
          </table:table-cell>
          <table:table-cell table:number-columns-repeated="16373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1">
            <text:p>Jul</text:p>
          </table:table-cell>
          <table:table-cell office:value-type="float" office:value="4703754" table:style-name="ce1">
            <text:p>4703754</text:p>
          </table:table-cell>
          <table:table-cell office:value-type="float" office:value="240458" table:style-name="ce1">
            <text:p>240458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28.05" table:style-name="ce1">
            <text:p>28.05</text:p>
          </table:table-cell>
          <table:table-cell office:value-type="float" office:value="7.5108895689752668E-3" table:style-name="ce1">
            <text:p>0.00751089</text:p>
          </table:table-cell>
          <table:table-cell office:value-type="float" office:value="1.153984853948793E-2" table:style-name="ce1">
            <text:p>0.011539849</text:p>
          </table:table-cell>
          <table:table-cell office:value-type="float" office:value="-0.19999999999999929" table:style-name="ce1">
            <text:p>-0.2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Recovery</text:p>
          </table:table-cell>
          <table:table-cell table:number-columns-repeated="16373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1">
            <text:p>Aug</text:p>
          </table:table-cell>
          <table:table-cell office:value-type="float" office:value="4741545" table:style-name="ce1">
            <text:p>4741545</text:p>
          </table:table-cell>
          <table:table-cell office:value-type="float" office:value="233532" table:style-name="ce1">
            <text:p>233532</text:p>
          </table:table-cell>
          <table:table-cell office:value-type="float" office:value="4.7" table:style-name="ce1">
            <text:p>4.7</text:p>
          </table:table-cell>
          <table:table-cell office:value-type="float" office:value="28.54" table:style-name="ce1">
            <text:p>28.54</text:p>
          </table:table-cell>
          <table:table-cell office:value-type="float" office:value="8.0342211773830018E-3" table:style-name="ce1">
            <text:p>0.008034221</text:p>
          </table:table-cell>
          <table:table-cell office:value-type="float" office:value="1.7468805704099769E-2" table:style-name="ce1">
            <text:p>0.017468806</text:p>
          </table:table-cell>
          <table:table-cell office:value-type="float" office:value="-0.20000000000000021" table:style-name="ce1">
            <text:p>-0.2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Recovery</text:p>
          </table:table-cell>
          <table:table-cell table:number-columns-repeated="16373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1">
            <text:p>Sep</text:p>
          </table:table-cell>
          <table:table-cell office:value-type="float" office:value="4781795" table:style-name="ce1">
            <text:p>4781795</text:p>
          </table:table-cell>
          <table:table-cell office:value-type="float" office:value="223116" table:style-name="ce1">
            <text:p>223116</text:p>
          </table:table-cell>
          <table:table-cell office:value-type="float" office:value="4.5" table:style-name="ce1">
            <text:p>4.5</text:p>
          </table:table-cell>
          <table:table-cell office:value-type="float" office:value="28.48" table:style-name="ce1">
            <text:p>28.48</text:p>
          </table:table-cell>
          <table:table-cell office:value-type="float" office:value="8.4887942643168002E-3" table:style-name="ce1">
            <text:p>0.008488794</text:p>
          </table:table-cell>
          <table:table-cell office:value-type="float" office:value="-2.1023125437981331E-3" table:style-name="ce1">
            <text:p>-0.002102313</text:p>
          </table:table-cell>
          <table:table-cell office:value-type="float" office:value="-0.20000000000000021" table:style-name="ce1">
            <text:p>-0.2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Recovery</text:p>
          </table:table-cell>
          <table:table-cell table:number-columns-repeated="16373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1">
            <text:p>Oct</text:p>
          </table:table-cell>
          <table:table-cell office:value-type="float" office:value="4826655" table:style-name="ce1">
            <text:p>4826655</text:p>
          </table:table-cell>
          <table:table-cell office:value-type="float" office:value="214212" table:style-name="ce1">
            <text:p>214212</text:p>
          </table:table-cell>
          <table:table-cell office:value-type="float" office:value="4.2" table:style-name="ce1">
            <text:p>4.2</text:p>
          </table:table-cell>
          <table:table-cell office:value-type="float" office:value="28.68" table:style-name="ce1">
            <text:p>28.68</text:p>
          </table:table-cell>
          <table:table-cell office:value-type="float" office:value="9.381414301533211E-3" table:style-name="ce1">
            <text:p>0.009381414</text:p>
          </table:table-cell>
          <table:table-cell office:value-type="float" office:value="7.0224719101123342E-3" table:style-name="ce1">
            <text:p>0.007022472</text:p>
          </table:table-cell>
          <table:table-cell office:value-type="float" office:value="-0.29999999999999982" table:style-name="ce1">
            <text:p>-0.3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Recovery</text:p>
          </table:table-cell>
          <table:table-cell table:number-columns-repeated="16373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1">
            <text:p>Nov</text:p>
          </table:table-cell>
          <table:table-cell office:value-type="float" office:value="4873013" table:style-name="ce1">
            <text:p>4873013</text:p>
          </table:table-cell>
          <table:table-cell office:value-type="float" office:value="205268" table:style-name="ce1">
            <text:p>205268</text:p>
          </table:table-cell>
          <table:table-cell office:value-type="float" office:value="4" table:style-name="ce1">
            <text:p>4</text:p>
          </table:table-cell>
          <table:table-cell office:value-type="float" office:value="28.99" table:style-name="ce1">
            <text:p>28.99</text:p>
          </table:table-cell>
          <table:table-cell office:value-type="float" office:value="9.6045812265430196E-3" table:style-name="ce1">
            <text:p>0.009604581</text:p>
          </table:table-cell>
          <table:table-cell office:value-type="float" office:value="1.080892608089256E-2" table:style-name="ce1">
            <text:p>0.010808926</text:p>
          </table:table-cell>
          <table:table-cell office:value-type="float" office:value="-0.20000000000000021" table:style-name="ce1">
            <text:p>-0.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Recovery</text:p>
          </table:table-cell>
          <table:table-cell table:number-columns-repeated="16373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1">
            <text:p>Dec</text:p>
          </table:table-cell>
          <table:table-cell office:value-type="float" office:value="4919430" table:style-name="ce1">
            <text:p>4919430</text:p>
          </table:table-cell>
          <table:table-cell office:value-type="float" office:value="196514" table:style-name="ce1">
            <text:p>196514</text:p>
          </table:table-cell>
          <table:table-cell office:value-type="float" office:value="3.8" table:style-name="ce1">
            <text:p>3.8</text:p>
          </table:table-cell>
          <table:table-cell office:value-type="float" office:value="29.17" table:style-name="ce1">
            <text:p>29.17</text:p>
          </table:table-cell>
          <table:table-cell office:value-type="float" office:value="9.5253183194873477E-3" table:style-name="ce1">
            <text:p>0.009525318</text:p>
          </table:table-cell>
          <table:table-cell office:value-type="float" office:value="6.2090375991722411E-3" table:style-name="ce1">
            <text:p>0.006209038</text:p>
          </table:table-cell>
          <table:table-cell office:value-type="float" office:value="-0.20000000000000021" table:style-name="ce1">
            <text:p>-0.2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Recovery</text:p>
          </table:table-cell>
          <table:table-cell table:number-columns-repeated="16373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string" table:style-name="ce1">
            <text:p>Jan</text:p>
          </table:table-cell>
          <table:table-cell office:value-type="float" office:value="4963886" table:style-name="ce1">
            <text:p>4963886</text:p>
          </table:table-cell>
          <table:table-cell office:value-type="float" office:value="192197" table:style-name="ce1">
            <text:p>192197</text:p>
          </table:table-cell>
          <table:table-cell office:value-type="float" office:value="3.7" table:style-name="ce1">
            <text:p>3.7</text:p>
          </table:table-cell>
          <table:table-cell office:value-type="float" office:value="29.82" table:style-name="ce1">
            <text:p>29.82</text:p>
          </table:table-cell>
          <table:table-cell office:value-type="float" office:value="9.0368193063017459E-3" table:style-name="ce1">
            <text:p>0.009036819</text:p>
          </table:table-cell>
          <table:table-cell office:value-type="float" office:value="2.2283167637984179E-2" table:style-name="ce1">
            <text:p>0.022283168</text:p>
          </table:table-cell>
          <table:table-cell office:value-type="float" office:value="-9.9999999999999645E-2" table:style-name="ce1">
            <text:p>-0.1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Recovery</text:p>
          </table:table-cell>
          <table:table-cell table:number-columns-repeated="16373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string" table:style-name="ce1">
            <text:p>Feb</text:p>
          </table:table-cell>
          <table:table-cell office:value-type="float" office:value="4977770" table:style-name="ce1">
            <text:p>4977770</text:p>
          </table:table-cell>
          <table:table-cell office:value-type="float" office:value="187842" table:style-name="ce1">
            <text:p>187842</text:p>
          </table:table-cell>
          <table:table-cell office:value-type="float" office:value="3.6" table:style-name="ce1">
            <text:p>3.6</text:p>
          </table:table-cell>
          <table:table-cell office:value-type="float" office:value="29.42" table:style-name="ce1">
            <text:p>29.42</text:p>
          </table:table-cell>
          <table:table-cell office:value-type="float" office:value="2.7970021873991459E-3" table:style-name="ce1">
            <text:p>0.002797002</text:p>
          </table:table-cell>
          <table:table-cell office:value-type="float" office:value="-1.3413816230717589E-2" table:style-name="ce1">
            <text:p>-0.013413816</text:p>
          </table:table-cell>
          <table:table-cell office:value-type="float" office:value="-0.1000000000000001" table:style-name="ce1">
            <text:p>-0.1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Recovery</text:p>
          </table:table-cell>
          <table:table-cell table:number-columns-repeated="16373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string" table:style-name="ce1">
            <text:p>Mar</text:p>
          </table:table-cell>
          <table:table-cell office:value-type="float" office:value="4987806" table:style-name="ce1">
            <text:p>4987806</text:p>
          </table:table-cell>
          <table:table-cell office:value-type="float" office:value="186004" table:style-name="ce1">
            <text:p>186004</text:p>
          </table:table-cell>
          <table:table-cell office:value-type="float" office:value="3.6" table:style-name="ce1">
            <text:p>3.6</text:p>
          </table:table-cell>
          <table:table-cell office:value-type="float" office:value="29.57" table:style-name="ce1">
            <text:p>29.57</text:p>
          </table:table-cell>
          <table:table-cell office:value-type="float" office:value="2.0161638645417521E-3" table:style-name="ce1">
            <text:p>0.002016164</text:p>
          </table:table-cell>
          <table:table-cell office:value-type="float" office:value="5.0985723997280276E-3" table:style-name="ce1">
            <text:p>0.005098572</text:p>
          </table:table-cell>
          <table:table-cell office:value-type="float" office:value="0" table:style-name="ce1">
            <text:p>0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Recovery</text:p>
          </table:table-cell>
          <table:table-cell table:number-columns-repeated="16373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string" table:style-name="ce1">
            <text:p>Apr</text:p>
          </table:table-cell>
          <table:table-cell office:value-type="float" office:value="4995004" table:style-name="ce1">
            <text:p>4995004</text:p>
          </table:table-cell>
          <table:table-cell office:value-type="float" office:value="186150" table:style-name="ce1">
            <text:p>186150</text:p>
          </table:table-cell>
          <table:table-cell office:value-type="float" office:value="3.6" table:style-name="ce1">
            <text:p>3.6</text:p>
          </table:table-cell>
          <table:table-cell office:value-type="float" office:value="29.32" table:style-name="ce1">
            <text:p>29.32</text:p>
          </table:table-cell>
          <table:table-cell office:value-type="float" office:value="1.443119479787305E-3" table:style-name="ce1">
            <text:p>0.001443119</text:p>
          </table:table-cell>
          <table:table-cell office:value-type="float" office:value="-8.4545147108555964E-3" table:style-name="ce1">
            <text:p>-0.008454515</text:p>
          </table:table-cell>
          <table:table-cell office:value-type="float" office:value="0" table:style-name="ce1">
            <text:p>0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Recovery</text:p>
          </table:table-cell>
          <table:table-cell table:number-columns-repeated="16373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string" table:style-name="ce1">
            <text:p>May</text:p>
          </table:table-cell>
          <table:table-cell office:value-type="float" office:value="5000217" table:style-name="ce1">
            <text:p>5000217</text:p>
          </table:table-cell>
          <table:table-cell office:value-type="float" office:value="187901" table:style-name="ce1">
            <text:p>187901</text:p>
          </table:table-cell>
          <table:table-cell office:value-type="float" office:value="3.6" table:style-name="ce1">
            <text:p>3.6</text:p>
          </table:table-cell>
          <table:table-cell office:value-type="float" office:value="29.63" table:style-name="ce1">
            <text:p>29.63</text:p>
          </table:table-cell>
          <table:table-cell office:value-type="float" office:value="1.043642807893647E-3" table:style-name="ce1">
            <text:p>0.001043643</text:p>
          </table:table-cell>
          <table:table-cell office:value-type="float" office:value="1.0572987721691631E-2" table:style-name="ce1">
            <text:p>0.010572988</text:p>
          </table:table-cell>
          <table:table-cell office:value-type="float" office:value="0" table:style-name="ce1">
            <text:p>0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Recovery</text:p>
          </table:table-cell>
          <table:table-cell table:number-columns-repeated="16373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string" table:style-name="ce1">
            <text:p>Jun</text:p>
          </table:table-cell>
          <table:table-cell office:value-type="float" office:value="5002915" table:style-name="ce1">
            <text:p>5002915</text:p>
          </table:table-cell>
          <table:table-cell office:value-type="float" office:value="190408" table:style-name="ce1">
            <text:p>190408</text:p>
          </table:table-cell>
          <table:table-cell office:value-type="float" office:value="3.7" table:style-name="ce1">
            <text:p>3.7</text:p>
          </table:table-cell>
          <table:table-cell office:value-type="float" office:value="29.3" table:style-name="ce1">
            <text:p>29.3</text:p>
          </table:table-cell>
          <table:table-cell office:value-type="float" office:value="5.3957658237632484E-4" table:style-name="ce1">
            <text:p>0.000539577</text:p>
          </table:table-cell>
          <table:table-cell office:value-type="float" office:value="-1.1137360782990159E-2" table:style-name="ce1">
            <text:p>-0.011137361</text:p>
          </table:table-cell>
          <table:table-cell office:value-type="float" office:value="0.1000000000000001" table:style-name="ce1">
            <text:p>0.1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Recovery</text:p>
          </table:table-cell>
          <table:table-cell table:number-columns-repeated="16373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string" table:style-name="ce1">
            <text:p>Jul</text:p>
          </table:table-cell>
          <table:table-cell office:value-type="float" office:value="5002637" table:style-name="ce1">
            <text:p>5002637</text:p>
          </table:table-cell>
          <table:table-cell office:value-type="float" office:value="192935" table:style-name="ce1">
            <text:p>192935</text:p>
          </table:table-cell>
          <table:table-cell office:value-type="float" office:value="3.7" table:style-name="ce1">
            <text:p>3.7</text:p>
          </table:table-cell>
          <table:table-cell office:value-type="float" office:value="29.96" table:style-name="ce1">
            <text:p>29.96</text:p>
          </table:table-cell>
          <table:table-cell office:value-type="float" office:value="-5.5567604086817378E-5" table:style-name="ce1">
            <text:p>-5.55676E-05</text:p>
          </table:table-cell>
          <table:table-cell office:value-type="float" office:value="2.2525597269624581E-2" table:style-name="ce1">
            <text:p>0.022525597</text:p>
          </table:table-cell>
          <table:table-cell office:value-type="float" office:value="0" table:style-name="ce1">
            <text:p>0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Recovery</text:p>
          </table:table-cell>
          <table:table-cell table:number-columns-repeated="16373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string" table:style-name="ce1">
            <text:p>Aug</text:p>
          </table:table-cell>
          <table:table-cell office:value-type="float" office:value="5001656" table:style-name="ce1">
            <text:p>5001656</text:p>
          </table:table-cell>
          <table:table-cell office:value-type="float" office:value="195403" table:style-name="ce1">
            <text:p>195403</text:p>
          </table:table-cell>
          <table:table-cell office:value-type="float" office:value="3.8" table:style-name="ce1">
            <text:p>3.8</text:p>
          </table:table-cell>
          <table:table-cell office:value-type="float" office:value="30.21" table:style-name="ce1">
            <text:p>30.21</text:p>
          </table:table-cell>
          <table:table-cell office:value-type="float" office:value="-1.9609657866441241E-4" table:style-name="ce1">
            <text:p>-0.000196097</text:p>
          </table:table-cell>
          <table:table-cell office:value-type="float" office:value="8.3444592790387177E-3" table:style-name="ce1">
            <text:p>0.008344459</text:p>
          </table:table-cell>
          <table:table-cell office:value-type="float" office:value="9.9999999999999645E-2" table:style-name="ce1">
            <text:p>0.1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Recovery</text:p>
          </table:table-cell>
          <table:table-cell table:number-columns-repeated="16373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string" table:style-name="ce1">
            <text:p>Sep</text:p>
          </table:table-cell>
          <table:table-cell office:value-type="float" office:value="5003001" table:style-name="ce1">
            <text:p>5003001</text:p>
          </table:table-cell>
          <table:table-cell office:value-type="float" office:value="195556" table:style-name="ce1">
            <text:p>195556</text:p>
          </table:table-cell>
          <table:table-cell office:value-type="float" office:value="3.8" table:style-name="ce1">
            <text:p>3.8</text:p>
          </table:table-cell>
          <table:table-cell office:value-type="float" office:value="30.22" table:style-name="ce1">
            <text:p>30.22</text:p>
          </table:table-cell>
          <table:table-cell office:value-type="float" office:value="2.6891093669776571E-4" table:style-name="ce1">
            <text:p>0.000268911</text:p>
          </table:table-cell>
          <table:table-cell office:value-type="float" office:value="3.3101621979470409E-4" table:style-name="ce1">
            <text:p>0.000331016</text:p>
          </table:table-cell>
          <table:table-cell office:value-type="float" office:value="0" table:style-name="ce1">
            <text:p>0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Recovery</text:p>
          </table:table-cell>
          <table:table-cell table:number-columns-repeated="16373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string" table:style-name="ce1">
            <text:p>Oct</text:p>
          </table:table-cell>
          <table:table-cell office:value-type="float" office:value="5008217" table:style-name="ce1">
            <text:p>5008217</text:p>
          </table:table-cell>
          <table:table-cell office:value-type="float" office:value="194928" table:style-name="ce1">
            <text:p>194928</text:p>
          </table:table-cell>
          <table:table-cell office:value-type="float" office:value="3.7" table:style-name="ce1">
            <text:p>3.7</text:p>
          </table:table-cell>
          <table:table-cell office:value-type="float" office:value="30.8" table:style-name="ce1">
            <text:p>30.8</text:p>
          </table:table-cell>
          <table:table-cell office:value-type="float" office:value="1.0425742469369881E-3" table:style-name="ce1">
            <text:p>0.001042574</text:p>
          </table:table-cell>
          <table:table-cell office:value-type="float" office:value="1.919258769027141E-2" table:style-name="ce1">
            <text:p>0.019192588</text:p>
          </table:table-cell>
          <table:table-cell office:value-type="float" office:value="-9.9999999999999645E-2" table:style-name="ce1">
            <text:p>-0.1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Recovery</text:p>
          </table:table-cell>
          <table:table-cell table:number-columns-repeated="16373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string" table:style-name="ce1">
            <text:p>Nov</text:p>
          </table:table-cell>
          <table:table-cell office:value-type="float" office:value="5017693" table:style-name="ce1">
            <text:p>5017693</text:p>
          </table:table-cell>
          <table:table-cell office:value-type="float" office:value="192694" table:style-name="ce1">
            <text:p>192694</text:p>
          </table:table-cell>
          <table:table-cell office:value-type="float" office:value="3.7" table:style-name="ce1">
            <text:p>3.7</text:p>
          </table:table-cell>
          <table:table-cell office:value-type="float" office:value="30.49" table:style-name="ce1">
            <text:p>30.49</text:p>
          </table:table-cell>
          <table:table-cell office:value-type="float" office:value="1.8920905384091781E-3" table:style-name="ce1">
            <text:p>0.001892091</text:p>
          </table:table-cell>
          <table:table-cell office:value-type="float" office:value="-1.0064935064935139E-2" table:style-name="ce1">
            <text:p>-0.010064935</text:p>
          </table:table-cell>
          <table:table-cell office:value-type="float" office:value="0" table:style-name="ce1">
            <text:p>0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Recovery</text:p>
          </table:table-cell>
          <table:table-cell table:number-columns-repeated="16373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string" table:style-name="ce1">
            <text:p>Dec</text:p>
          </table:table-cell>
          <table:table-cell office:value-type="float" office:value="5030574" table:style-name="ce1">
            <text:p>5030574</text:p>
          </table:table-cell>
          <table:table-cell office:value-type="float" office:value="189474" table:style-name="ce1">
            <text:p>189474</text:p>
          </table:table-cell>
          <table:table-cell office:value-type="float" office:value="3.6" table:style-name="ce1">
            <text:p>3.6</text:p>
          </table:table-cell>
          <table:table-cell office:value-type="float" office:value="30.62" table:style-name="ce1">
            <text:p>30.62</text:p>
          </table:table-cell>
          <table:table-cell office:value-type="float" office:value="2.567116003310685E-3" table:style-name="ce1">
            <text:p>0.002567116</text:p>
          </table:table-cell>
          <table:table-cell office:value-type="float" office:value="4.2636930141030684E-3" table:style-name="ce1">
            <text:p>0.004263693</text:p>
          </table:table-cell>
          <table:table-cell office:value-type="float" office:value="-0.1000000000000001" table:style-name="ce1">
            <text:p>-0.1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Recovery</text:p>
          </table:table-cell>
          <table:table-cell table:number-columns-repeated="16373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string" table:style-name="ce1">
            <text:p>Jan</text:p>
          </table:table-cell>
          <table:table-cell office:value-type="float" office:value="5045218" table:style-name="ce1">
            <text:p>5045218</text:p>
          </table:table-cell>
          <table:table-cell office:value-type="float" office:value="186396" table:style-name="ce1">
            <text:p>186396</text:p>
          </table:table-cell>
          <table:table-cell office:value-type="float" office:value="3.6" table:style-name="ce1">
            <text:p>3.6</text:p>
          </table:table-cell>
          <table:table-cell office:value-type="float" office:value="31.11" table:style-name="ce1">
            <text:p>31.11</text:p>
          </table:table-cell>
          <table:table-cell office:value-type="float" office:value="2.9109998183109919E-3" table:style-name="ce1">
            <text:p>0.002911</text:p>
          </table:table-cell>
          <table:table-cell office:value-type="float" office:value="1.6002612671456511E-2" table:style-name="ce1">
            <text:p>0.016002613</text:p>
          </table:table-cell>
          <table:table-cell office:value-type="float" office:value="0" table:style-name="ce1">
            <text:p>0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Post_Recovery</text:p>
          </table:table-cell>
          <table:table-cell table:number-columns-repeated="16373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string" table:style-name="ce1">
            <text:p>Feb</text:p>
          </table:table-cell>
          <table:table-cell office:value-type="float" office:value="5060084" table:style-name="ce1">
            <text:p>5060084</text:p>
          </table:table-cell>
          <table:table-cell office:value-type="float" office:value="183865" table:style-name="ce1">
            <text:p>183865</text:p>
          </table:table-cell>
          <table:table-cell office:value-type="float" office:value="3.5" table:style-name="ce1">
            <text:p>3.5</text:p>
          </table:table-cell>
          <table:table-cell office:value-type="float" office:value="31.07" table:style-name="ce1">
            <text:p>31.07</text:p>
          </table:table-cell>
          <table:table-cell office:value-type="float" office:value="2.9465525572928658E-3" table:style-name="ce1">
            <text:p>0.002946553</text:p>
          </table:table-cell>
          <table:table-cell office:value-type="float" office:value="-1.2857602057216051E-3" table:style-name="ce1">
            <text:p>-0.00128576</text:p>
          </table:table-cell>
          <table:table-cell office:value-type="float" office:value="-0.1000000000000001" table:style-name="ce1">
            <text:p>-0.1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Post_Recovery</text:p>
          </table:table-cell>
          <table:table-cell table:number-columns-repeated="16373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string" table:style-name="ce1">
            <text:p>Mar</text:p>
          </table:table-cell>
          <table:table-cell office:value-type="float" office:value="5072643" table:style-name="ce1">
            <text:p>5072643</text:p>
          </table:table-cell>
          <table:table-cell office:value-type="float" office:value="181986" table:style-name="ce1">
            <text:p>181986</text:p>
          </table:table-cell>
          <table:table-cell office:value-type="float" office:value="3.5" table:style-name="ce1">
            <text:p>3.5</text:p>
          </table:table-cell>
          <table:table-cell office:value-type="float" office:value="30.8" table:style-name="ce1">
            <text:p>30.8</text:p>
          </table:table-cell>
          <table:table-cell office:value-type="float" office:value="2.481974607536159E-3" table:style-name="ce1">
            <text:p>0.002481975</text:p>
          </table:table-cell>
          <table:table-cell office:value-type="float" office:value="-8.6900547151593042E-3" table:style-name="ce1">
            <text:p>-0.008690055</text:p>
          </table:table-cell>
          <table:table-cell office:value-type="float" office:value="0" table:style-name="ce1">
            <text:p>0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Post_Recovery</text:p>
          </table:table-cell>
          <table:table-cell table:number-columns-repeated="16373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string" table:style-name="ce1">
            <text:p>Apr</text:p>
          </table:table-cell>
          <table:table-cell office:value-type="float" office:value="5081770" table:style-name="ce1">
            <text:p>5081770</text:p>
          </table:table-cell>
          <table:table-cell office:value-type="float" office:value="180785" table:style-name="ce1">
            <text:p>180785</text:p>
          </table:table-cell>
          <table:table-cell office:value-type="float" office:value="3.4" table:style-name="ce1">
            <text:p>3.4</text:p>
          </table:table-cell>
          <table:table-cell office:value-type="float" office:value="31.25" table:style-name="ce1">
            <text:p>31.25</text:p>
          </table:table-cell>
          <table:table-cell office:value-type="float" office:value="1.799259281601327E-3" table:style-name="ce1">
            <text:p>0.001799259</text:p>
          </table:table-cell>
          <table:table-cell office:value-type="float" office:value="1.4610389610389589E-2" table:style-name="ce1">
            <text:p>0.01461039</text:p>
          </table:table-cell>
          <table:table-cell office:value-type="float" office:value="-0.1000000000000001" table:style-name="ce1">
            <text:p>-0.1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Post_Recovery</text:p>
          </table:table-cell>
          <table:table-cell table:number-columns-repeated="16373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string" table:style-name="ce1">
            <text:p>May</text:p>
          </table:table-cell>
          <table:table-cell office:value-type="float" office:value="5087440" table:style-name="ce1">
            <text:p>5087440</text:p>
          </table:table-cell>
          <table:table-cell office:value-type="float" office:value="180740" table:style-name="ce1">
            <text:p>180740</text:p>
          </table:table-cell>
          <table:table-cell office:value-type="float" office:value="3.4" table:style-name="ce1">
            <text:p>3.4</text:p>
          </table:table-cell>
          <table:table-cell office:value-type="float" office:value="30.69" table:style-name="ce1">
            <text:p>30.69</text:p>
          </table:table-cell>
          <table:table-cell office:value-type="float" office:value="1.1157529758332231E-3" table:style-name="ce1">
            <text:p>0.001115753</text:p>
          </table:table-cell>
          <table:table-cell office:value-type="float" office:value="-1.791999999999996E-2" table:style-name="ce1">
            <text:p>-0.01792</text:p>
          </table:table-cell>
          <table:table-cell office:value-type="float" office:value="0" table:style-name="ce1">
            <text:p>0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Post_Recovery</text:p>
          </table:table-cell>
          <table:table-cell table:number-columns-repeated="16373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string" table:style-name="ce1">
            <text:p>Jun</text:p>
          </table:table-cell>
          <table:table-cell office:value-type="float" office:value="5091631" table:style-name="ce1">
            <text:p>5091631</text:p>
          </table:table-cell>
          <table:table-cell office:value-type="float" office:value="181124" table:style-name="ce1">
            <text:p>181124</text:p>
          </table:table-cell>
          <table:table-cell office:value-type="float" office:value="3.4" table:style-name="ce1">
            <text:p>3.4</text:p>
          </table:table-cell>
          <table:table-cell office:value-type="float" office:value="30.51" table:style-name="ce1">
            <text:p>30.51</text:p>
          </table:table-cell>
          <table:table-cell office:value-type="float" office:value="8.2379349928451246E-4" table:style-name="ce1">
            <text:p>0.000823793</text:p>
          </table:table-cell>
          <table:table-cell office:value-type="float" office:value="-5.8651026392961781E-3" table:style-name="ce1">
            <text:p>-0.005865103</text:p>
          </table:table-cell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Post_Recovery</text:p>
          </table:table-cell>
          <table:table-cell table:number-columns-repeated="16373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string" table:style-name="ce1">
            <text:p>Jul</text:p>
          </table:table-cell>
          <table:table-cell office:value-type="float" office:value="5095803" table:style-name="ce1">
            <text:p>5095803</text:p>
          </table:table-cell>
          <table:table-cell office:value-type="float" office:value="182081" table:style-name="ce1">
            <text:p>182081</text:p>
          </table:table-cell>
          <table:table-cell office:value-type="float" office:value="3.4" table:style-name="ce1">
            <text:p>3.4</text:p>
          </table:table-cell>
          <table:table-cell office:value-type="float" office:value="31.35" table:style-name="ce1">
            <text:p>31.35</text:p>
          </table:table-cell>
          <table:table-cell office:value-type="float" office:value="8.1938380844959115E-4" table:style-name="ce1">
            <text:p>0.000819384</text:p>
          </table:table-cell>
          <table:table-cell office:value-type="float" office:value="2.7531956735496549E-2" table:style-name="ce1">
            <text:p>0.027531957</text:p>
          </table:table-cell>
          <table:table-cell office:value-type="float" office:value="0" table:style-name="ce1">
            <text:p>0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Post_Recovery</text:p>
          </table:table-cell>
          <table:table-cell table:number-columns-repeated="16373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string" table:style-name="ce1">
            <text:p>Aug</text:p>
          </table:table-cell>
          <table:table-cell office:value-type="float" office:value="5099611" table:style-name="ce1">
            <text:p>5099611</text:p>
          </table:table-cell>
          <table:table-cell office:value-type="float" office:value="183552" table:style-name="ce1">
            <text:p>183552</text:p>
          </table:table-cell>
          <table:table-cell office:value-type="float" office:value="3.5" table:style-name="ce1">
            <text:p>3.5</text:p>
          </table:table-cell>
          <table:table-cell office:value-type="float" office:value="31.38" table:style-name="ce1">
            <text:p>31.38</text:p>
          </table:table-cell>
          <table:table-cell office:value-type="float" office:value="7.4728163549493578E-4" table:style-name="ce1">
            <text:p>0.000747282</text:p>
          </table:table-cell>
          <table:table-cell office:value-type="float" office:value="9.5693779904298514E-4" table:style-name="ce1">
            <text:p>0.000956938</text:p>
          </table:table-cell>
          <table:table-cell office:value-type="float" office:value="0.1000000000000001" table:style-name="ce1">
            <text:p>0.1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Post_Recovery</text:p>
          </table:table-cell>
          <table:table-cell table:number-columns-repeated="16373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string" table:style-name="ce1">
            <text:p>Sep</text:p>
          </table:table-cell>
          <table:table-cell office:value-type="float" office:value="5102232" table:style-name="ce1">
            <text:p>5102232</text:p>
          </table:table-cell>
          <table:table-cell office:value-type="float" office:value="184916" table:style-name="ce1">
            <text:p>184916</text:p>
          </table:table-cell>
          <table:table-cell office:value-type="float" office:value="3.5" table:style-name="ce1">
            <text:p>3.5</text:p>
          </table:table-cell>
          <table:table-cell office:value-type="float" office:value="31.56" table:style-name="ce1">
            <text:p>31.56</text:p>
          </table:table-cell>
          <table:table-cell office:value-type="float" office:value="5.1396077073329711E-4" table:style-name="ce1">
            <text:p>0.000513961</text:p>
          </table:table-cell>
          <table:table-cell office:value-type="float" office:value="5.7361376673040068E-3" table:style-name="ce1">
            <text:p>0.005736138</text:p>
          </table:table-cell>
          <table:table-cell office:value-type="float" office:value="0" table:style-name="ce1">
            <text:p>0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Post_Recovery</text:p>
          </table:table-cell>
          <table:table-cell table:number-columns-repeated="16373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string" table:style-name="ce1">
            <text:p>Oct</text:p>
          </table:table-cell>
          <table:table-cell office:value-type="float" office:value="5103422" table:style-name="ce1">
            <text:p>5103422</text:p>
          </table:table-cell>
          <table:table-cell office:value-type="float" office:value="186049" table:style-name="ce1">
            <text:p>186049</text:p>
          </table:table-cell>
          <table:table-cell office:value-type="float" office:value="3.5" table:style-name="ce1">
            <text:p>3.5</text:p>
          </table:table-cell>
          <table:table-cell office:value-type="float" office:value="31.82" table:style-name="ce1">
            <text:p>31.82</text:p>
          </table:table-cell>
          <table:table-cell office:value-type="float" office:value="2.3323126035821191E-4" table:style-name="ce1">
            <text:p>0.000233231</text:p>
          </table:table-cell>
          <table:table-cell office:value-type="float" office:value="8.23827629911285E-3" table:style-name="ce1">
            <text:p>0.008238276</text:p>
          </table:table-cell>
          <table:table-cell office:value-type="float" office:value="0" table:style-name="ce1">
            <text:p>0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Post_Recovery</text:p>
          </table:table-cell>
          <table:table-cell table:number-columns-repeated="16373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string" table:style-name="ce1">
            <text:p>Nov</text:p>
          </table:table-cell>
          <table:table-cell office:value-type="float" office:value="5103535" table:style-name="ce1">
            <text:p>5103535</text:p>
          </table:table-cell>
          <table:table-cell office:value-type="float" office:value="186898" table:style-name="ce1">
            <text:p>186898</text:p>
          </table:table-cell>
          <table:table-cell office:value-type="float" office:value="3.5" table:style-name="ce1">
            <text:p>3.5</text:p>
          </table:table-cell>
          <table:table-cell office:value-type="float" office:value="31.49" table:style-name="ce1">
            <text:p>31.49</text:p>
          </table:table-cell>
          <table:table-cell office:value-type="float" office:value="2.214200589330061E-5" table:style-name="ce1">
            <text:p>2.2142E-05</text:p>
          </table:table-cell>
          <table:table-cell office:value-type="float" office:value="-1.037083595223136E-2" table:style-name="ce1">
            <text:p>-0.010370836</text:p>
          </table:table-cell>
          <table:table-cell office:value-type="float" office:value="0" table:style-name="ce1">
            <text:p>0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Post_Recovery</text:p>
          </table:table-cell>
          <table:table-cell table:number-columns-repeated="16373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string" table:style-name="ce1">
            <text:p>Dec</text:p>
          </table:table-cell>
          <table:table-cell office:value-type="float" office:value="5103571" table:style-name="ce1">
            <text:p>5103571</text:p>
          </table:table-cell>
          <table:table-cell office:value-type="float" office:value="187400" table:style-name="ce1">
            <text:p>187400</text:p>
          </table:table-cell>
          <table:table-cell office:value-type="float" office:value="3.5" table:style-name="ce1">
            <text:p>3.5</text:p>
          </table:table-cell>
          <table:table-cell office:value-type="float" office:value="31.92" table:style-name="ce1">
            <text:p>31.92</text:p>
          </table:table-cell>
          <table:table-cell office:value-type="float" office:value="7.0539341848346297E-6" table:style-name="ce1">
            <text:p>7.05393E-06</text:p>
          </table:table-cell>
          <table:table-cell office:value-type="float" office:value="1.365512861225796E-2" table:style-name="ce1">
            <text:p>0.013655129</text:p>
          </table:table-cell>
          <table:table-cell office:value-type="float" office:value="0" table:style-name="ce1">
            <text:p>0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Post_Recovery</text:p>
          </table:table-cell>
          <table:table-cell table:number-columns-repeated="16373"/>
        </table:table-row>
        <table:table-row table:style-name="ro1">
          <table:table-cell office:value-type="float" office:value="2024" table:style-name="ce1">
            <text:p>2024</text:p>
          </table:table-cell>
          <table:table-cell office:value-type="string" table:style-name="ce1">
            <text:p>Jan</text:p>
          </table:table-cell>
          <table:table-cell office:value-type="float" office:value="5104015" table:style-name="ce1">
            <text:p>5104015</text:p>
          </table:table-cell>
          <table:table-cell office:value-type="float" office:value="187388" table:style-name="ce1">
            <text:p>187388</text:p>
          </table:table-cell>
          <table:table-cell office:value-type="float" office:value="3.5" table:style-name="ce1">
            <text:p>3.5</text:p>
          </table:table-cell>
          <table:table-cell office:value-type="float" office:value="32.1" table:style-name="ce1">
            <text:p>32.1</text:p>
          </table:table-cell>
          <table:table-cell office:value-type="float" office:value="8.6997907935443632E-5" table:style-name="ce1">
            <text:p>8.69979E-05</text:p>
          </table:table-cell>
          <table:table-cell office:value-type="float" office:value="5.6390977443608933E-3" table:style-name="ce1">
            <text:p>0.005639098</text:p>
          </table:table-cell>
          <table:table-cell office:value-type="float" office:value="0" table:style-name="ce1">
            <text:p>0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Post_Recovery</text:p>
          </table:table-cell>
          <table:table-cell table:number-columns-repeated="16373"/>
        </table:table-row>
        <table:table-row table:style-name="ro1">
          <table:table-cell office:value-type="float" office:value="2024" table:style-name="ce1">
            <text:p>2024</text:p>
          </table:table-cell>
          <table:table-cell office:value-type="string" table:style-name="ce1">
            <text:p>Feb</text:p>
          </table:table-cell>
          <table:table-cell office:value-type="float" office:value="5104873" table:style-name="ce1">
            <text:p>5104873</text:p>
          </table:table-cell>
          <table:table-cell office:value-type="float" office:value="187706" table:style-name="ce1">
            <text:p>187706</text:p>
          </table:table-cell>
          <table:table-cell office:value-type="float" office:value="3.5" table:style-name="ce1">
            <text:p>3.5</text:p>
          </table:table-cell>
          <table:table-cell office:value-type="float" office:value="31.93" table:style-name="ce1">
            <text:p>31.93</text:p>
          </table:table-cell>
          <table:table-cell office:value-type="float" office:value="1.6810295424288531E-4" table:style-name="ce1">
            <text:p>0.000168103</text:p>
          </table:table-cell>
          <table:table-cell office:value-type="float" office:value="-5.2959501557632927E-3" table:style-name="ce1">
            <text:p>-0.00529595</text:p>
          </table:table-cell>
          <table:table-cell office:value-type="float" office:value="0" table:style-name="ce1">
            <text:p>0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Post_Recovery</text:p>
          </table:table-cell>
          <table:table-cell table:number-columns-repeated="16373"/>
        </table:table-row>
        <table:table-row table:style-name="ro1">
          <table:table-cell office:value-type="float" office:value="2024" table:style-name="ce1">
            <text:p>2024</text:p>
          </table:table-cell>
          <table:table-cell office:value-type="string" table:style-name="ce1">
            <text:p>Mar</text:p>
          </table:table-cell>
          <table:table-cell office:value-type="float" office:value="5105813" table:style-name="ce1">
            <text:p>5105813</text:p>
          </table:table-cell>
          <table:table-cell office:value-type="float" office:value="188977" table:style-name="ce1">
            <text:p>188977</text:p>
          </table:table-cell>
          <table:table-cell office:value-type="float" office:value="3.6" table:style-name="ce1">
            <text:p>3.6</text:p>
          </table:table-cell>
          <table:table-cell office:value-type="float" office:value="31.85" table:style-name="ce1">
            <text:p>31.85</text:p>
          </table:table-cell>
          <table:table-cell office:value-type="float" office:value="1.8413778364319739E-4" table:style-name="ce1">
            <text:p>0.000184138</text:p>
          </table:table-cell>
          <table:table-cell office:value-type="float" office:value="-2.5054807391167648E-3" table:style-name="ce1">
            <text:p>-0.002505481</text:p>
          </table:table-cell>
          <table:table-cell office:value-type="float" office:value="0.1000000000000001" table:style-name="ce1">
            <text:p>0.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Post_Recovery</text:p>
          </table:table-cell>
          <table:table-cell table:number-columns-repeated="16373"/>
        </table:table-row>
        <table:table-row table:style-name="ro1">
          <table:table-cell office:value-type="float" office:value="2024" table:style-name="ce1">
            <text:p>2024</text:p>
          </table:table-cell>
          <table:table-cell office:value-type="string" table:style-name="ce1">
            <text:p>Apr</text:p>
          </table:table-cell>
          <table:table-cell office:value-type="float" office:value="5106738" table:style-name="ce1">
            <text:p>5106738</text:p>
          </table:table-cell>
          <table:table-cell office:value-type="float" office:value="190718" table:style-name="ce1">
            <text:p>190718</text:p>
          </table:table-cell>
          <table:table-cell office:value-type="float" office:value="3.6" table:style-name="ce1">
            <text:p>3.6</text:p>
          </table:table-cell>
          <table:table-cell office:value-type="float" office:value="32.29" table:style-name="ce1">
            <text:p>32.29</text:p>
          </table:table-cell>
          <table:table-cell office:value-type="float" office:value="1.8116605523939091E-4" table:style-name="ce1">
            <text:p>0.000181166</text:p>
          </table:table-cell>
          <table:table-cell office:value-type="float" office:value="1.3814756671899461E-2" table:style-name="ce1">
            <text:p>0.013814757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Post_Recovery</text:p>
          </table:table-cell>
          <table:table-cell table:number-columns-repeated="16373"/>
        </table:table-row>
        <table:table-row table:style-name="ro1">
          <table:table-cell office:value-type="float" office:value="2024" table:style-name="ce1">
            <text:p>2024</text:p>
          </table:table-cell>
          <table:table-cell office:value-type="string" table:style-name="ce1">
            <text:p>May</text:p>
          </table:table-cell>
          <table:table-cell office:value-type="float" office:value="5107755" table:style-name="ce1">
            <text:p>5107755</text:p>
          </table:table-cell>
          <table:table-cell office:value-type="float" office:value="192267" table:style-name="ce1">
            <text:p>192267</text:p>
          </table:table-cell>
          <table:table-cell office:value-type="float" office:value="3.6" table:style-name="ce1">
            <text:p>3.6</text:p>
          </table:table-cell>
          <table:table-cell office:value-type="float" office:value="32.24" table:style-name="ce1">
            <text:p>32.24</text:p>
          </table:table-cell>
          <table:table-cell office:value-type="float" office:value="1.9914865418981751E-4" table:style-name="ce1">
            <text:p>0.000199149</text:p>
          </table:table-cell>
          <table:table-cell office:value-type="float" office:value="-1.5484670176524359E-3" table:style-name="ce1">
            <text:p>-0.001548467</text:p>
          </table:table-cell>
          <table:table-cell office:value-type="float" office:value="0" table:style-name="ce1">
            <text:p>0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Post_Recovery</text:p>
          </table:table-cell>
          <table:table-cell table:number-columns-repeated="16373"/>
        </table:table-row>
        <table:table-row table:style-name="ro1">
          <table:table-cell office:value-type="float" office:value="2024" table:style-name="ce1">
            <text:p>2024</text:p>
          </table:table-cell>
          <table:table-cell office:value-type="string" table:style-name="ce1">
            <text:p>Jun</text:p>
          </table:table-cell>
          <table:table-cell office:value-type="float" office:value="5107962" table:style-name="ce1">
            <text:p>5107962</text:p>
          </table:table-cell>
          <table:table-cell office:value-type="float" office:value="193449" table:style-name="ce1">
            <text:p>193449</text:p>
          </table:table-cell>
          <table:table-cell office:value-type="float" office:value="3.6" table:style-name="ce1">
            <text:p>3.6</text:p>
          </table:table-cell>
          <table:table-cell office:value-type="float" office:value="32.409999999999997" table:style-name="ce1">
            <text:p>32.41</text:p>
          </table:table-cell>
          <table:table-cell office:value-type="float" office:value="4.0526611006205271E-5" table:style-name="ce1">
            <text:p>4.05266E-05</text:p>
          </table:table-cell>
          <table:table-cell office:value-type="float" office:value="5.2729528535978469E-3" table:style-name="ce1">
            <text:p>0.005272953</text:p>
          </table:table-cell>
          <table:table-cell office:value-type="float" office:value="0" table:style-name="ce1">
            <text:p>0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Post_Recovery</text:p>
          </table:table-cell>
          <table:table-cell table:number-columns-repeated="16373"/>
        </table:table-row>
        <table:table-row table:style-name="ro1">
          <table:table-cell office:value-type="float" office:value="2024" table:style-name="ce1">
            <text:p>2024</text:p>
          </table:table-cell>
          <table:table-cell office:value-type="string" table:style-name="ce1">
            <text:p>Jul</text:p>
          </table:table-cell>
          <table:table-cell office:value-type="float" office:value="5106269" table:style-name="ce1">
            <text:p>5106269</text:p>
          </table:table-cell>
          <table:table-cell office:value-type="float" office:value="194396" table:style-name="ce1">
            <text:p>194396</text:p>
          </table:table-cell>
          <table:table-cell office:value-type="float" office:value="3.7" table:style-name="ce1">
            <text:p>3.7</text:p>
          </table:table-cell>
          <table:table-cell office:value-type="float" office:value="32.32" table:style-name="ce1">
            <text:p>32.32</text:p>
          </table:table-cell>
          <table:table-cell office:value-type="float" office:value="-3.314433427656666E-4" table:style-name="ce1">
            <text:p>-0.000331443</text:p>
          </table:table-cell>
          <table:table-cell office:value-type="float" office:value="-2.776920703486464E-3" table:style-name="ce1">
            <text:p>-0.002776921</text:p>
          </table:table-cell>
          <table:table-cell office:value-type="float" office:value="0.1000000000000001" table:style-name="ce1">
            <text:p>0.1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Post_Recovery</text:p>
          </table:table-cell>
          <table:table-cell table:number-columns-repeated="16373"/>
        </table:table-row>
        <table:table-row table:style-name="ro1">
          <table:table-cell office:value-type="float" office:value="2024" table:style-name="ce1">
            <text:p>2024</text:p>
          </table:table-cell>
          <table:table-cell office:value-type="string" table:style-name="ce1">
            <text:p>Aug</text:p>
          </table:table-cell>
          <table:table-cell office:value-type="float" office:value="5103539" table:style-name="ce1">
            <text:p>5103539</text:p>
          </table:table-cell>
          <table:table-cell office:value-type="float" office:value="195254" table:style-name="ce1">
            <text:p>195254</text:p>
          </table:table-cell>
          <table:table-cell office:value-type="float" office:value="3.7" table:style-name="ce1">
            <text:p>3.7</text:p>
          </table:table-cell>
          <table:table-cell office:value-type="float" office:value="32.53" table:style-name="ce1">
            <text:p>32.53</text:p>
          </table:table-cell>
          <table:table-cell office:value-type="float" office:value="-5.3463693354188747E-4" table:style-name="ce1">
            <text:p>-0.000534637</text:p>
          </table:table-cell>
          <table:table-cell office:value-type="float" office:value="6.4975247524752741E-3" table:style-name="ce1">
            <text:p>0.006497525</text:p>
          </table:table-cell>
          <table:table-cell office:value-type="float" office:value="0" table:style-name="ce1">
            <text:p>0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Post_Recovery</text:p>
          </table:table-cell>
          <table:table-cell table:number-columns-repeated="16373"/>
        </table:table-row>
        <table:table-row table:style-name="ro1">
          <table:table-cell office:value-type="float" office:value="2024" table:style-name="ce1">
            <text:p>2024</text:p>
          </table:table-cell>
          <table:table-cell office:value-type="string" table:style-name="ce1">
            <text:p>Sep</text:p>
          </table:table-cell>
          <table:table-cell office:value-type="float" office:value="5100699" table:style-name="ce1">
            <text:p>5100699</text:p>
          </table:table-cell>
          <table:table-cell office:value-type="float" office:value="196213" table:style-name="ce1">
            <text:p>196213</text:p>
          </table:table-cell>
          <table:table-cell office:value-type="float" office:value="3.7" table:style-name="ce1">
            <text:p>3.7</text:p>
          </table:table-cell>
          <table:table-cell office:value-type="float" office:value="33.119999999999997" table:style-name="ce1">
            <text:p>33.12</text:p>
          </table:table-cell>
          <table:table-cell office:value-type="float" office:value="-5.5647659398703531E-4" table:style-name="ce1">
            <text:p>-0.000556477</text:p>
          </table:table-cell>
          <table:table-cell office:value-type="float" office:value="1.813710421149697E-2" table:style-name="ce1">
            <text:p>0.018137104</text:p>
          </table:table-cell>
          <table:table-cell office:value-type="float" office:value="0" table:style-name="ce1">
            <text:p>0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Post_Recovery</text:p>
          </table:table-cell>
          <table:table-cell table:number-columns-repeated="16373"/>
        </table:table-row>
        <table:table-row table:style-name="ro1">
          <table:table-cell office:value-type="float" office:value="2024" table:style-name="ce1">
            <text:p>2024</text:p>
          </table:table-cell>
          <table:table-cell office:value-type="string" table:style-name="ce1">
            <text:p>Oct</text:p>
          </table:table-cell>
          <table:table-cell office:value-type="float" office:value="5097624" table:style-name="ce1">
            <text:p>5097624</text:p>
          </table:table-cell>
          <table:table-cell office:value-type="float" office:value="197111" table:style-name="ce1">
            <text:p>197111</text:p>
          </table:table-cell>
          <table:table-cell office:value-type="float" office:value="3.7" table:style-name="ce1">
            <text:p>3.7</text:p>
          </table:table-cell>
          <table:table-cell office:value-type="float" office:value="33.15" table:style-name="ce1">
            <text:p>33.15</text:p>
          </table:table-cell>
          <table:table-cell office:value-type="float" office:value="-6.0285854938705457E-4" table:style-name="ce1">
            <text:p>-0.000602859</text:p>
          </table:table-cell>
          <table:table-cell office:value-type="float" office:value="9.0579710144930974E-4" table:style-name="ce1">
            <text:p>0.000905797</text:p>
          </table:table-cell>
          <table:table-cell office:value-type="float" office:value="0" table:style-name="ce1">
            <text:p>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Post_Recovery</text:p>
          </table:table-cell>
          <table:table-cell table:number-columns-repeated="16373"/>
        </table:table-row>
        <table:table-row table:style-name="ro1">
          <table:table-cell office:value-type="float" office:value="2024" table:style-name="ce1">
            <text:p>2024</text:p>
          </table:table-cell>
          <table:table-cell office:value-type="string" table:style-name="ce1">
            <text:p>Nov</text:p>
          </table:table-cell>
          <table:table-cell office:value-type="float" office:value="5094520" table:style-name="ce1">
            <text:p>5094520</text:p>
          </table:table-cell>
          <table:table-cell office:value-type="float" office:value="198055" table:style-name="ce1">
            <text:p>198055</text:p>
          </table:table-cell>
          <table:table-cell office:value-type="float" office:value="3.7" table:style-name="ce1">
            <text:p>3.7</text:p>
          </table:table-cell>
          <table:table-cell office:value-type="float" office:value="32.93" table:style-name="ce1">
            <text:p>32.93</text:p>
          </table:table-cell>
          <table:table-cell office:value-type="float" office:value="-6.0891113193126838E-4" table:style-name="ce1">
            <text:p>-0.000608911</text:p>
          </table:table-cell>
          <table:table-cell office:value-type="float" office:value="-6.636500754147779E-3" table:style-name="ce1">
            <text:p>-0.006636501</text:p>
          </table:table-cell>
          <table:table-cell office:value-type="float" office:value="0" table:style-name="ce1">
            <text:p>0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Post_Recovery</text:p>
          </table:table-cell>
          <table:table-cell table:number-columns-repeated="16373"/>
        </table:table-row>
        <table:table-row table:style-name="ro1">
          <table:table-cell office:value-type="float" office:value="2024" table:style-name="ce1">
            <text:p>2024</text:p>
          </table:table-cell>
          <table:table-cell office:value-type="string" table:style-name="ce1">
            <text:p>Dec</text:p>
          </table:table-cell>
          <table:table-cell office:value-type="float" office:value="5091859" table:style-name="ce1">
            <text:p>5091859</text:p>
          </table:table-cell>
          <table:table-cell office:value-type="float" office:value="199305" table:style-name="ce1">
            <text:p>199305</text:p>
          </table:table-cell>
          <table:table-cell office:value-type="float" office:value="3.8" table:style-name="ce1">
            <text:p>3.8</text:p>
          </table:table-cell>
          <table:table-cell office:value-type="float" office:value="33.299999999999997" table:style-name="ce1">
            <text:p>33.3</text:p>
          </table:table-cell>
          <table:table-cell office:value-type="float" office:value="-5.2232595023672494E-4" table:style-name="ce1">
            <text:p>-0.000522326</text:p>
          </table:table-cell>
          <table:table-cell office:value-type="float" office:value="1.12359550561797E-2" table:style-name="ce1">
            <text:p>0.011235955</text:p>
          </table:table-cell>
          <table:table-cell office:value-type="float" office:value="9.9999999999999645E-2" table:style-name="ce1">
            <text:p>0.1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Post_Recovery</text:p>
          </table:table-cell>
          <table:table-cell table:number-columns-repeated="16373"/>
        </table:table-row>
        <table:table-row table:style-name="ro1">
          <table:table-cell office:value-type="float" office:value="2025" table:style-name="ce1">
            <text:p>2025</text:p>
          </table:table-cell>
          <table:table-cell office:value-type="string" table:style-name="ce1">
            <text:p>Jan</text:p>
          </table:table-cell>
          <table:table-cell office:value-type="float" office:value="5089862" table:style-name="ce1">
            <text:p>5089862</text:p>
          </table:table-cell>
          <table:table-cell office:value-type="float" office:value="200605" table:style-name="ce1">
            <text:p>200605</text:p>
          </table:table-cell>
          <table:table-cell office:value-type="float" office:value="3.8" table:style-name="ce1">
            <text:p>3.8</text:p>
          </table:table-cell>
          <table:table-cell office:value-type="float" office:value="33.409999999999997" table:style-name="ce1">
            <text:p>33.41</text:p>
          </table:table-cell>
          <table:table-cell office:value-type="float" office:value="-3.921946778180621E-4" table:style-name="ce1">
            <text:p>-0.000392195</text:p>
          </table:table-cell>
          <table:table-cell office:value-type="float" office:value="3.3033033033032871E-3" table:style-name="ce1">
            <text:p>0.003303303</text:p>
          </table:table-cell>
          <table:table-cell office:value-type="float" office:value="0" table:style-name="ce1">
            <text:p>0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Post_Recovery</text:p>
          </table:table-cell>
          <table:table-cell table:number-columns-repeated="16373"/>
        </table:table-row>
        <table:table-row table:style-name="ro1">
          <table:table-cell office:value-type="float" office:value="2025" table:style-name="ce1">
            <text:p>2025</text:p>
          </table:table-cell>
          <table:table-cell office:value-type="string" table:style-name="ce1">
            <text:p>Feb</text:p>
          </table:table-cell>
          <table:table-cell office:value-type="float" office:value="5088869" table:style-name="ce1">
            <text:p>5088869</text:p>
          </table:table-cell>
          <table:table-cell office:value-type="float" office:value="201344" table:style-name="ce1">
            <text:p>201344</text:p>
          </table:table-cell>
          <table:table-cell office:value-type="float" office:value="3.8" table:style-name="ce1">
            <text:p>3.8</text:p>
          </table:table-cell>
          <table:table-cell office:value-type="float" office:value="33.659999999999997" table:style-name="ce1">
            <text:p>33.66</text:p>
          </table:table-cell>
          <table:table-cell office:value-type="float" office:value="-1.9509369802167521E-4" table:style-name="ce1">
            <text:p>-0.000195094</text:p>
          </table:table-cell>
          <table:table-cell office:value-type="float" office:value="7.4827895839569003E-3" table:style-name="ce1">
            <text:p>0.00748279</text:p>
          </table:table-cell>
          <table:table-cell office:value-type="float" office:value="0" table:style-name="ce1">
            <text:p>0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Post_Recovery</text:p>
          </table:table-cell>
          <table:table-cell table:number-columns-repeated="16373"/>
        </table:table-row>
        <table:table-row table:style-name="ro1">
          <table:table-cell office:value-type="float" office:value="2025" table:style-name="ce1">
            <text:p>2025</text:p>
          </table:table-cell>
          <table:table-cell office:value-type="string" table:style-name="ce1">
            <text:p>Mar</text:p>
          </table:table-cell>
          <table:table-cell office:value-type="float" office:value="5088852" table:style-name="ce1">
            <text:p>5088852</text:p>
          </table:table-cell>
          <table:table-cell office:value-type="float" office:value="201222" table:style-name="ce1">
            <text:p>201222</text:p>
          </table:table-cell>
          <table:table-cell office:value-type="float" office:value="3.8" table:style-name="ce1">
            <text:p>3.8</text:p>
          </table:table-cell>
          <table:table-cell office:value-type="float" office:value="33.6" table:style-name="ce1">
            <text:p>33.6</text:p>
          </table:table-cell>
          <table:table-cell office:value-type="float" office:value="-3.3406244098639598E-6" table:style-name="ce1">
            <text:p>-3.34062E-06</text:p>
          </table:table-cell>
          <table:table-cell office:value-type="float" office:value="-1.782531194295757E-3" table:style-name="ce1">
            <text:p>-0.001782531</text:p>
          </table:table-cell>
          <table:table-cell office:value-type="float" office:value="0" table:style-name="ce1">
            <text:p>0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Post_Recovery</text:p>
          </table:table-cell>
          <table:table-cell table:number-columns-repeated="16373"/>
        </table:table-row>
        <table:table-row table:style-name="ro1">
          <table:table-cell office:value-type="float" office:value="2025" table:style-name="ce1">
            <text:p>2025</text:p>
          </table:table-cell>
          <table:table-cell office:value-type="string" table:style-name="ce1">
            <text:p>Apr</text:p>
          </table:table-cell>
          <table:table-cell office:value-type="float" office:value="5088805" table:style-name="ce1">
            <text:p>5088805</text:p>
          </table:table-cell>
          <table:table-cell office:value-type="float" office:value="201150" table:style-name="ce1">
            <text:p>201150</text:p>
          </table:table-cell>
          <table:table-cell office:value-type="float" office:value="3.8" table:style-name="ce1">
            <text:p>3.8</text:p>
          </table:table-cell>
          <table:table-cell office:value-type="float" office:value="33.67" table:style-name="ce1">
            <text:p>33.67</text:p>
          </table:table-cell>
          <table:table-cell office:value-type="float" office:value="-9.235874810271551E-6" table:style-name="ce1">
            <text:p>-9.23587E-06</text:p>
          </table:table-cell>
          <table:table-cell office:value-type="float" office:value="2.083333333333342E-3" table:style-name="ce1">
            <text:p>0.002083333</text:p>
          </table:table-cell>
          <table:table-cell office:value-type="float" office:value="0" table:style-name="ce1">
            <text:p>0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Post_Recovery</text:p>
          </table:table-cell>
          <table:table-cell table:number-columns-repeated="16373"/>
        </table:table-row>
        <table:table-row table:style-name="ro1">
          <table:table-cell office:value-type="float" office:value="2025" table:style-name="ce1">
            <text:p>2025</text:p>
          </table:table-cell>
          <table:table-cell office:value-type="string" table:style-name="ce1">
            <text:p>May</text:p>
          </table:table-cell>
          <table:table-cell office:value-type="float" office:value="5088160" table:style-name="ce1">
            <text:p>5088160</text:p>
          </table:table-cell>
          <table:table-cell office:value-type="float" office:value="201754" table:style-name="ce1">
            <text:p>201754</text:p>
          </table:table-cell>
          <table:table-cell office:value-type="float" office:value="3.8" table:style-name="ce1">
            <text:p>3.8</text:p>
          </table:table-cell>
          <table:table-cell office:value-type="float" office:value="33.57" table:style-name="ce1">
            <text:p>33.57</text:p>
          </table:table-cell>
          <table:table-cell office:value-type="float" office:value="-1.267488143090568E-4" table:style-name="ce1">
            <text:p>-0.000126749</text:p>
          </table:table-cell>
          <table:table-cell office:value-type="float" office:value="-2.9700029700030122E-3" table:style-name="ce1">
            <text:p>-0.002970003</text:p>
          </table:table-cell>
          <table:table-cell office:value-type="float" office:value="0" table:style-name="ce1">
            <text:p>0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Post_Recovery</text:p>
          </table:table-cell>
          <table:table-cell table:number-columns-repeated="16373"/>
        </table:table-row>
        <table:table-row table:style-name="ro1">
          <table:table-cell office:value-type="float" office:value="2025" table:style-name="ce1">
            <text:p>2025</text:p>
          </table:table-cell>
          <table:table-cell office:value-type="string" table:style-name="ce1">
            <text:p>Jun</text:p>
          </table:table-cell>
          <table:table-cell office:value-type="float" office:value="5088095" table:style-name="ce1">
            <text:p>5088095</text:p>
          </table:table-cell>
          <table:table-cell office:value-type="float" office:value="202847" table:style-name="ce1">
            <text:p>202847</text:p>
          </table:table-cell>
          <table:table-cell office:value-type="float" office:value="3.8" table:style-name="ce1">
            <text:p>3.8</text:p>
          </table:table-cell>
          <table:table-cell office:value-type="float" office:value="33.799999999999997" table:style-name="ce1">
            <text:p>33.8</text:p>
          </table:table-cell>
          <table:table-cell office:value-type="float" office:value="-1.2774755510832991E-5" table:style-name="ce1">
            <text:p>-1.27748E-05</text:p>
          </table:table-cell>
          <table:table-cell office:value-type="float" office:value="6.8513553768244527E-3" table:style-name="ce1">
            <text:p>0.006851355</text:p>
          </table:table-cell>
          <table:table-cell office:value-type="float" office:value="0" table:style-name="ce1">
            <text:p>0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Post_Recovery</text:p>
          </table:table-cell>
          <table:table-cell table:number-columns-repeated="16373"/>
        </table:table-row>
        <table:table-row table:style-name="ro1">
          <table:table-cell office:value-type="float" office:value="2025" table:style-name="ce1">
            <text:p>2025</text:p>
          </table:table-cell>
          <table:table-cell office:value-type="string" table:style-name="ce1">
            <text:p>Jul</text:p>
          </table:table-cell>
          <table:table-cell office:value-type="float" office:value="5090865" table:style-name="ce1">
            <text:p>5090865</text:p>
          </table:table-cell>
          <table:table-cell office:value-type="float" office:value="203872" table:style-name="ce1">
            <text:p>203872</text:p>
          </table:table-cell>
          <table:table-cell office:value-type="float" office:value="3.9" table:style-name="ce1">
            <text:p>3.9</text:p>
          </table:table-cell>
          <table:table-cell office:value-type="float" office:value="33.93" table:style-name="ce1">
            <text:p>33.93</text:p>
          </table:table-cell>
          <table:table-cell office:value-type="float" office:value="5.4440807414169747E-4" table:style-name="ce1">
            <text:p>0.000544408</text:p>
          </table:table-cell>
          <table:table-cell office:value-type="float" office:value="3.8461538461539218E-3" table:style-name="ce1">
            <text:p>0.003846154</text:p>
          </table:table-cell>
          <table:table-cell office:value-type="float" office:value="0.1000000000000001" table:style-name="ce1">
            <text:p>0.1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Post_Recovery</text:p>
          </table:table-cell>
          <table:table-cell table:number-columns-repeated="16373"/>
        </table:table-row>
        <table:table-row table:style-name="ro1">
          <table:table-cell office:value-type="float" office:value="2025" table:style-name="ce1">
            <text:p>2025</text:p>
          </table:table-cell>
          <table:table-cell office:value-type="string" table:style-name="ce1">
            <text:p>Aug</text:p>
          </table:table-cell>
          <table:table-cell office:value-type="float" office:value="5096208" table:style-name="ce1">
            <text:p>5096208</text:p>
          </table:table-cell>
          <table:table-cell office:value-type="float" office:value="204464" table:style-name="ce1">
            <text:p>204464</text:p>
          </table:table-cell>
          <table:table-cell office:value-type="float" office:value="3.9" table:style-name="ce1">
            <text:p>3.9</text:p>
          </table:table-cell>
          <table:table-cell office:value-type="float" office:value="34.049999999999997" table:style-name="ce1">
            <text:p>34.05</text:p>
          </table:table-cell>
          <table:table-cell office:value-type="float" office:value="1.049526946795879E-3" table:style-name="ce1">
            <text:p>0.001049527</text:p>
          </table:table-cell>
          <table:table-cell office:value-type="float" office:value="3.53669319186553E-3" table:style-name="ce1">
            <text:p>0.003536693</text:p>
          </table:table-cell>
          <table:table-cell office:value-type="float" office:value="0" table:style-name="ce1">
            <text:p>0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Post_Recovery</text:p>
          </table:table-cell>
          <table:table-cell table:number-columns-repeated="16373"/>
        </table:table-row>
        <table:table-row table:style-name="ro1">
          <table:table-cell office:value-type="float" office:value="2025" table:style-name="ce1">
            <text:p>2025</text:p>
          </table:table-cell>
          <table:table-cell office:value-type="string" table:style-name="ce1">
            <text:p>Sep</text:p>
          </table:table-cell>
          <table:table-cell office:value-type="float" office:value="5103463" table:style-name="ce1">
            <text:p>5103463</text:p>
          </table:table-cell>
          <table:table-cell office:value-type="float" office:value="204587" table:style-name="ce1">
            <text:p>204587</text:p>
          </table:table-cell>
          <table:table-cell office:value-type="float" office:value="3.9" table:style-name="ce1">
            <text:p>3.9</text:p>
          </table:table-cell>
          <table:table-cell office:value-type="float" office:value="34.15" table:style-name="ce1">
            <text:p>34.15</text:p>
          </table:table-cell>
          <table:table-cell office:value-type="float" office:value="1.423607513665062E-3" table:style-name="ce1">
            <text:p>0.001423608</text:p>
          </table:table-cell>
          <table:table-cell office:value-type="float" office:value="2.9368575624082651E-3" table:style-name="ce1">
            <text:p>0.002936858</text:p>
          </table:table-cell>
          <table:table-cell office:value-type="float" office:value="0" table:style-name="ce1">
            <text:p>0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Post_Recovery</text:p>
          </table:table-cell>
          <table:table-cell table:number-columns-repeated="16373"/>
        </table:table-row>
        <table:table-row table:style-name="ro1">
          <table:table-cell office:value-type="float" office:value="2025" table:style-name="ce1">
            <text:p>2025</text:p>
          </table:table-cell>
          <table:table-cell office:value-type="string" table:style-name="ce1">
            <text:p>Nov</text:p>
          </table:table-cell>
          <table:table-cell office:value-type="float" office:value="5113393" table:style-name="ce1">
            <text:p>5113393</text:p>
          </table:table-cell>
          <table:table-cell office:value-type="float" office:value="203654" table:style-name="ce1">
            <text:p>203654</text:p>
          </table:table-cell>
          <table:table-cell office:value-type="float" office:value="3.8" table:style-name="ce1">
            <text:p>3.8</text:p>
          </table:table-cell>
          <table:table-cell office:value-type="float" office:value="34.51" table:style-name="ce1">
            <text:p>34.51</text:p>
          </table:table-cell>
          <table:table-cell office:value-type="float" office:value="1.945737629527244E-3" table:style-name="ce1">
            <text:p>0.001945738</text:p>
          </table:table-cell>
          <table:table-cell office:value-type="float" office:value="1.0541727672035119E-2" table:style-name="ce1">
            <text:p>0.010541728</text:p>
          </table:table-cell>
          <table:table-cell office:value-type="float" office:value="-0.1000000000000001" table:style-name="ce1">
            <text:p>-0.1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Post_Recovery</text:p>
          </table:table-cell>
          <table:table-cell table:number-columns-repeated="16373"/>
        </table:table-row>
        <table:table-row table:style-name="ro1">
          <table:table-cell office:value-type="float" office:value="2025" table:style-name="ce1">
            <text:p>2025</text:p>
          </table:table-cell>
          <table:table-cell office:value-type="string" table:style-name="ce1">
            <text:p>Dec</text:p>
          </table:table-cell>
          <table:table-cell office:value-type="float" office:value="5113275" table:style-name="ce1">
            <text:p>5113275</text:p>
          </table:table-cell>
          <table:table-cell office:value-type="float" office:value="203385" table:style-name="ce1">
            <text:p>203385</text:p>
          </table:table-cell>
          <table:table-cell office:value-type="float" office:value="3.8" table:style-name="ce1">
            <text:p>3.8</text:p>
          </table:table-cell>
          <table:table-cell office:value-type="float" office:value="34.229999999999997" table:style-name="ce1">
            <text:p>34.23</text:p>
          </table:table-cell>
          <table:table-cell office:value-type="float" office:value="-2.3076653799150582E-5" table:style-name="ce1">
            <text:p>-2.30767E-05</text:p>
          </table:table-cell>
          <table:table-cell office:value-type="float" office:value="-8.1135902636917164E-3" table:style-name="ce1">
            <text:p>-0.00811359</text:p>
          </table:table-cell>
          <table:table-cell office:value-type="float" office:value="0" table:style-name="ce1">
            <text:p>0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Post_Recovery</text:p>
          </table:table-cell>
          <table:table-cell table:number-columns-repeated="16373"/>
        </table:table-row>
        <table:table-row table:style-name="ro1">
          <table:table-cell office:value-type="float" office:value="2026" table:style-name="ce1">
            <text:p>2026</text:p>
          </table:table-cell>
          <table:table-cell office:value-type="string" table:style-name="ce1">
            <text:p>Jan</text:p>
          </table:table-cell>
          <table:table-cell office:value-type="float" office:value="5109879" table:style-name="ce1">
            <text:p>5109879</text:p>
          </table:table-cell>
          <table:table-cell office:value-type="float" office:value="203452" table:style-name="ce1">
            <text:p>203452</text:p>
          </table:table-cell>
          <table:table-cell office:value-type="float" office:value="3.8" table:style-name="ce1">
            <text:p>3.8</text:p>
          </table:table-cell>
          <table:table-cell office:value-type="float" office:value="34.64" table:style-name="ce1">
            <text:p>34.64</text:p>
          </table:table-cell>
          <table:table-cell office:value-type="float" office:value="-6.6415360018774662E-4" table:style-name="ce1">
            <text:p>-0.000664154</text:p>
          </table:table-cell>
          <table:table-cell office:value-type="float" office:value="1.197779725387098E-2" table:style-name="ce1">
            <text:p>0.011977797</text:p>
          </table:table-cell>
          <table:table-cell office:value-type="float" office:value="0" table:style-name="ce1">
            <text:p>0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Post_Recovery</text:p>
          </table:table-cell>
          <table:table-cell table:number-columns-repeated="16373"/>
        </table:table-row>
        <table:table-row table:style-name="ro1">
          <table:table-cell office:value-type="float" office:value="2026" table:style-name="ce1">
            <text:p>2026</text:p>
          </table:table-cell>
          <table:table-cell office:value-type="string" table:style-name="ce1">
            <text:p>Feb</text:p>
          </table:table-cell>
          <table:table-cell office:value-type="float" office:value="5110580" table:style-name="ce1">
            <text:p>5110580</text:p>
          </table:table-cell>
          <table:table-cell office:value-type="float" office:value="201100" table:style-name="ce1">
            <text:p>201100</text:p>
          </table:table-cell>
          <table:table-cell office:value-type="float" office:value="3.8" table:style-name="ce1">
            <text:p>3.8</text:p>
          </table:table-cell>
          <table:table-cell office:value-type="float" office:value="34.869999999999997" table:style-name="ce1">
            <text:p>34.87</text:p>
          </table:table-cell>
          <table:table-cell office:value-type="float" office:value="1.3718524450383269E-4" table:style-name="ce1">
            <text:p>0.000137185</text:p>
          </table:table-cell>
          <table:table-cell office:value-type="float" office:value="6.6397228637412493E-3" table:style-name="ce1">
            <text:p>0.006639723</text:p>
          </table:table-cell>
          <table:table-cell office:value-type="float" office:value="0" table:style-name="ce1">
            <text:p>0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Post_Recovery</text:p>
          </table:table-cell>
          <table:table-cell table:number-columns-repeated="16373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1">
            <text:p>Unemployment rate is provided directly from source data and not recalculated</text:p>
          </table:table-cell>
          <table:table-cell table:number-columns-repeated="16379" table:style-name="ce1"/>
        </table:table-row>
        <table:table-row table:number-rows-repeated="1048449" table:style-name="ro1">
          <table:table-cell table:number-columns-repeated="16384"/>
        </table:table-row>
      </table:table>
      <table:table table:name="Clean_Data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1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Employment</text:p>
          </table:table-cell>
          <table:table-cell office:value-type="string" table:style-name="ce2">
            <text:p>Unemployment</text:p>
          </table:table-cell>
          <table:table-cell office:value-type="string" table:style-name="ce2">
            <text:p>Unemployment_rate</text:p>
          </table:table-cell>
          <table:table-cell office:value-type="string" table:style-name="ce2">
            <text:p>Average_Hourly_Earnings</text:p>
          </table:table-cell>
          <table:table-cell office:value-type="string" table:style-name="ce2">
            <text:p>Employment_Change_Level</text:p>
          </table:table-cell>
          <table:table-cell office:value-type="string" table:style-name="ce2">
            <text:p>Wage_Growth_Rate</text:p>
          </table:table-cell>
          <table:table-cell office:value-type="string" table:style-name="ce2">
            <text:p>Unemployment_Change</text:p>
          </table:table-cell>
          <table:table-cell office:value-type="string" table:style-name="ce2">
            <text:p>Time_Index</text:p>
          </table:table-cell>
          <table:table-cell office:value-type="string" table:style-name="ce2">
            <text:p>Economic_cycle</text:p>
          </table:table-cell>
          <table:table-cell office:value-type="string" table:style-name="ce2">
            <text:p>Employment_Growth_%</text:p>
          </table:table-cell>
          <table:table-cell office:value-type="string" table:style-name="ce2">
            <text:p>Wage_Growth_%</text:p>
          </table:table-cell>
          <table:table-cell table:number-columns-repeated="16371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1">
            <text:p>Jan</text:p>
          </table:table-cell>
          <table:table-cell office:value-type="float" office:value="4497062" table:style-name="ce1">
            <text:p>4497062</text:p>
          </table:table-cell>
          <table:table-cell office:value-type="float" office:value="251816" table:style-name="ce1">
            <text:p>251816</text:p>
          </table:table-cell>
          <table:table-cell office:value-type="float" office:value="5.3" table:style-name="ce1">
            <text:p>5.3</text:p>
          </table:table-cell>
          <table:table-cell office:value-type="float" office:value="23.01" table:style-name="ce1">
            <text:p>23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re-COVID</text:p>
          </table:table-cell>
          <table:table-cell table:number-columns-repeated="16373" table:style-name="ce1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1">
            <text:p>Feb</text:p>
          </table:table-cell>
          <table:table-cell office:value-type="float" office:value="4508697" table:style-name="ce1">
            <text:p>4508697</text:p>
          </table:table-cell>
          <table:table-cell office:value-type="float" office:value="248680" table:style-name="ce1">
            <text:p>248680</text:p>
          </table:table-cell>
          <table:table-cell office:value-type="float" office:value="5.2" table:style-name="ce1">
            <text:p>5.2</text:p>
          </table:table-cell>
          <table:table-cell office:value-type="float" office:value="23.22" table:style-name="ce1">
            <text:p>23.22</text:p>
          </table:table-cell>
          <table:table-cell office:value-type="float" office:value="2.587244738898418E-3" table:style-name="ce1">
            <text:p>0.002587245</text:p>
          </table:table-cell>
          <table:table-cell office:value-type="float" office:value="9.126466753585279E-3" table:style-name="ce1">
            <text:p>0.009126467</text:p>
          </table:table-cell>
          <table:table-cell office:value-type="float" office:value="-9.9999999999999645E-2" table:style-name="ce1">
            <text:p>-0.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re-COVID</text:p>
          </table:table-cell>
          <table:table-cell office:value-type="float" office:value="2.587244738898375E-3" table:style-name="ce1">
            <text:p>0.002587245</text:p>
          </table:table-cell>
          <table:table-cell office:value-type="float" office:value="9.126466753585305E-3" table:style-name="ce1">
            <text:p>0.009126467</text:p>
          </table:table-cell>
          <table:table-cell table:number-columns-repeated="16371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1">
            <text:p>Mar</text:p>
          </table:table-cell>
          <table:table-cell office:value-type="float" office:value="4517867" table:style-name="ce1">
            <text:p>4517867</text:p>
          </table:table-cell>
          <table:table-cell office:value-type="float" office:value="245336" table:style-name="ce1">
            <text:p>245336</text:p>
          </table:table-cell>
          <table:table-cell office:value-type="float" office:value="5.2" table:style-name="ce1">
            <text:p>5.2</text:p>
          </table:table-cell>
          <table:table-cell office:value-type="float" office:value="23.21" table:style-name="ce1">
            <text:p>23.21</text:p>
          </table:table-cell>
          <table:table-cell office:value-type="float" office:value="2.0338470294189209E-3" table:style-name="ce1">
            <text:p>0.002033847</text:p>
          </table:table-cell>
          <table:table-cell office:value-type="float" office:value="-4.3066322136081007E-4" table:style-name="ce1">
            <text:p>-0.00043066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re-COVID</text:p>
          </table:table-cell>
          <table:table-cell office:value-type="float" office:value="2.0338470294189999E-3" table:style-name="ce1">
            <text:p>0.002033847</text:p>
          </table:table-cell>
          <table:table-cell office:value-type="float" office:value="-4.306632213607609E-4" table:style-name="ce1">
            <text:p>-0.000430663</text:p>
          </table:table-cell>
          <table:table-cell table:number-columns-repeated="16371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1">
            <text:p>Apr</text:p>
          </table:table-cell>
          <table:table-cell office:value-type="float" office:value="4524801" table:style-name="ce1">
            <text:p>4524801</text:p>
          </table:table-cell>
          <table:table-cell office:value-type="float" office:value="242310" table:style-name="ce1">
            <text:p>242310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23.29" table:style-name="ce1">
            <text:p>23.29</text:p>
          </table:table-cell>
          <table:table-cell office:value-type="float" office:value="1.5347950703285421E-3" table:style-name="ce1">
            <text:p>0.001534795</text:p>
          </table:table-cell>
          <table:table-cell office:value-type="float" office:value="3.4467901766479232E-3" table:style-name="ce1">
            <text:p>0.00344679</text:p>
          </table:table-cell>
          <table:table-cell office:value-type="float" office:value="-0.10000000000000051" table:style-name="ce1">
            <text:p>-0.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re-COVID</text:p>
          </table:table-cell>
          <table:table-cell office:value-type="float" office:value="1.5347950703286099E-3" table:style-name="ce1">
            <text:p>0.001534795</text:p>
          </table:table-cell>
          <table:table-cell office:value-type="float" office:value="3.446790176647951E-3" table:style-name="ce1">
            <text:p>0.00344679</text:p>
          </table:table-cell>
          <table:table-cell table:number-columns-repeated="16371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1">
            <text:p>May</text:p>
          </table:table-cell>
          <table:table-cell office:value-type="float" office:value="4530248" table:style-name="ce1">
            <text:p>4530248</text:p>
          </table:table-cell>
          <table:table-cell office:value-type="float" office:value="240491" table:style-name="ce1">
            <text:p>240491</text:p>
          </table:table-cell>
          <table:table-cell office:value-type="float" office:value="5" table:style-name="ce1">
            <text:p>5</text:p>
          </table:table-cell>
          <table:table-cell office:value-type="float" office:value="23.48" table:style-name="ce1">
            <text:p>23.48</text:p>
          </table:table-cell>
          <table:table-cell office:value-type="float" office:value="1.2038098471070879E-3" table:style-name="ce1">
            <text:p>0.00120381</text:p>
          </table:table-cell>
          <table:table-cell office:value-type="float" office:value="8.1580077286389566E-3" table:style-name="ce1">
            <text:p>0.008158008</text:p>
          </table:table-cell>
          <table:table-cell office:value-type="float" office:value="-9.9999999999999645E-2" table:style-name="ce1">
            <text:p>-0.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re-COVID</text:p>
          </table:table-cell>
          <table:table-cell office:value-type="float" office:value="1.203809847106996E-3" table:style-name="ce1">
            <text:p>0.00120381</text:p>
          </table:table-cell>
          <table:table-cell office:value-type="float" office:value="8.1580077286389496E-3" table:style-name="ce1">
            <text:p>0.008158008</text:p>
          </table:table-cell>
          <table:table-cell table:number-columns-repeated="16371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1">
            <text:p>Jun</text:p>
          </table:table-cell>
          <table:table-cell office:value-type="float" office:value="4534902" table:style-name="ce1">
            <text:p>4534902</text:p>
          </table:table-cell>
          <table:table-cell office:value-type="float" office:value="240173" table:style-name="ce1">
            <text:p>240173</text:p>
          </table:table-cell>
          <table:table-cell office:value-type="float" office:value="5" table:style-name="ce1">
            <text:p>5</text:p>
          </table:table-cell>
          <table:table-cell office:value-type="float" office:value="23.32" table:style-name="ce1">
            <text:p>23.32</text:p>
          </table:table-cell>
          <table:table-cell office:value-type="float" office:value="1.027316826805067E-3" table:style-name="ce1">
            <text:p>0.001027317</text:p>
          </table:table-cell>
          <table:table-cell office:value-type="float" office:value="-6.8143100511073324E-3" table:style-name="ce1">
            <text:p>-0.0068143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Pre-COVID</text:p>
          </table:table-cell>
          <table:table-cell office:value-type="float" office:value="1.0273168268051249E-3" table:style-name="ce1">
            <text:p>0.001027317</text:p>
          </table:table-cell>
          <table:table-cell office:value-type="float" office:value="-6.8143100511073307E-3" table:style-name="ce1">
            <text:p>-0.00681431</text:p>
          </table:table-cell>
          <table:table-cell table:number-columns-repeated="16371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1">
            <text:p>Jul</text:p>
          </table:table-cell>
          <table:table-cell office:value-type="float" office:value="4539875" table:style-name="ce1">
            <text:p>4539875</text:p>
          </table:table-cell>
          <table:table-cell office:value-type="float" office:value="240880" table:style-name="ce1">
            <text:p>240880</text:p>
          </table:table-cell>
          <table:table-cell office:value-type="float" office:value="5" table:style-name="ce1">
            <text:p>5</text:p>
          </table:table-cell>
          <table:table-cell office:value-type="float" office:value="23.29" table:style-name="ce1">
            <text:p>23.29</text:p>
          </table:table-cell>
          <table:table-cell office:value-type="float" office:value="1.0966058362451929E-3" table:style-name="ce1">
            <text:p>0.001096606</text:p>
          </table:table-cell>
          <table:table-cell office:value-type="float" office:value="-1.2864493996569951E-3" table:style-name="ce1">
            <text:p>-0.001286449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Pre-COVID</text:p>
          </table:table-cell>
          <table:table-cell office:value-type="float" office:value="1.096605836245157E-3" table:style-name="ce1">
            <text:p>0.001096606</text:p>
          </table:table-cell>
          <table:table-cell office:value-type="float" office:value="-1.2864493996569411E-3" table:style-name="ce1">
            <text:p>-0.001286449</text:p>
          </table:table-cell>
          <table:table-cell table:number-columns-repeated="16371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1">
            <text:p>Aug</text:p>
          </table:table-cell>
          <table:table-cell office:value-type="float" office:value="4545676" table:style-name="ce1">
            <text:p>4545676</text:p>
          </table:table-cell>
          <table:table-cell office:value-type="float" office:value="242209" table:style-name="ce1">
            <text:p>242209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23.44" table:style-name="ce1">
            <text:p>23.44</text:p>
          </table:table-cell>
          <table:table-cell office:value-type="float" office:value="1.277788485365787E-3" table:style-name="ce1">
            <text:p>0.001277788</text:p>
          </table:table-cell>
          <table:table-cell office:value-type="float" office:value="6.4405324173465927E-3" table:style-name="ce1">
            <text:p>0.006440532</text:p>
          </table:table-cell>
          <table:table-cell office:value-type="float" office:value="9.9999999999999645E-2" table:style-name="ce1">
            <text:p>0.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re-COVID</text:p>
          </table:table-cell>
          <table:table-cell office:value-type="float" office:value="1.277788485365861E-3" table:style-name="ce1">
            <text:p>0.001277788</text:p>
          </table:table-cell>
          <table:table-cell office:value-type="float" office:value="6.440532417346656E-3" table:style-name="ce1">
            <text:p>0.006440532</text:p>
          </table:table-cell>
          <table:table-cell table:number-columns-repeated="16371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1">
            <text:p>Sep</text:p>
          </table:table-cell>
          <table:table-cell office:value-type="float" office:value="4552222" table:style-name="ce1">
            <text:p>4552222</text:p>
          </table:table-cell>
          <table:table-cell office:value-type="float" office:value="243851" table:style-name="ce1">
            <text:p>243851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23.51" table:style-name="ce1">
            <text:p>23.51</text:p>
          </table:table-cell>
          <table:table-cell office:value-type="float" office:value="1.4400498407717581E-3" table:style-name="ce1">
            <text:p>0.00144005</text:p>
          </table:table-cell>
          <table:table-cell office:value-type="float" office:value="2.9863481228669061E-3" table:style-name="ce1">
            <text:p>0.002986348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re-COVID</text:p>
          </table:table-cell>
          <table:table-cell office:value-type="float" office:value="1.4400498407718401E-3" table:style-name="ce1">
            <text:p>0.00144005</text:p>
          </table:table-cell>
          <table:table-cell office:value-type="float" office:value="2.9863481228669109E-3" table:style-name="ce1">
            <text:p>0.002986348</text:p>
          </table:table-cell>
          <table:table-cell table:number-columns-repeated="16371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1">
            <text:p>Oct</text:p>
          </table:table-cell>
          <table:table-cell office:value-type="float" office:value="4559430" table:style-name="ce1">
            <text:p>4559430</text:p>
          </table:table-cell>
          <table:table-cell office:value-type="float" office:value="244716" table:style-name="ce1">
            <text:p>244716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23.82" table:style-name="ce1">
            <text:p>23.82</text:p>
          </table:table-cell>
          <table:table-cell office:value-type="float" office:value="1.5834025669222639E-3" table:style-name="ce1">
            <text:p>0.001583403</text:p>
          </table:table-cell>
          <table:table-cell office:value-type="float" office:value="1.31858783496384E-2" table:style-name="ce1">
            <text:p>0.013185878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Pre-COVID</text:p>
          </table:table-cell>
          <table:table-cell office:value-type="float" office:value="1.5834025669223539E-3" table:style-name="ce1">
            <text:p>0.001583403</text:p>
          </table:table-cell>
          <table:table-cell office:value-type="float" office:value="1.318587834963836E-2" table:style-name="ce1">
            <text:p>0.013185878</text:p>
          </table:table-cell>
          <table:table-cell table:number-columns-repeated="16371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1">
            <text:p>Nov</text:p>
          </table:table-cell>
          <table:table-cell office:value-type="float" office:value="4567649" table:style-name="ce1">
            <text:p>4567649</text:p>
          </table:table-cell>
          <table:table-cell office:value-type="float" office:value="243704" table:style-name="ce1">
            <text:p>243704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23.66" table:style-name="ce1">
            <text:p>23.66</text:p>
          </table:table-cell>
          <table:table-cell office:value-type="float" office:value="1.8026376104030551E-3" table:style-name="ce1">
            <text:p>0.001802638</text:p>
          </table:table-cell>
          <table:table-cell office:value-type="float" office:value="-6.7170445004198212E-3" table:style-name="ce1">
            <text:p>-0.006717045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Pre-COVID</text:p>
          </table:table-cell>
          <table:table-cell office:value-type="float" office:value="1.802637610403002E-3" table:style-name="ce1">
            <text:p>0.001802638</text:p>
          </table:table-cell>
          <table:table-cell office:value-type="float" office:value="-6.7170445004197674E-3" table:style-name="ce1">
            <text:p>-0.006717045</text:p>
          </table:table-cell>
          <table:table-cell table:number-columns-repeated="16371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1">
            <text:p>Dec</text:p>
          </table:table-cell>
          <table:table-cell office:value-type="float" office:value="4577097" table:style-name="ce1">
            <text:p>4577097</text:p>
          </table:table-cell>
          <table:table-cell office:value-type="float" office:value="240671" table:style-name="ce1">
            <text:p>240671</text:p>
          </table:table-cell>
          <table:table-cell office:value-type="float" office:value="5" table:style-name="ce1">
            <text:p>5</text:p>
          </table:table-cell>
          <table:table-cell office:value-type="float" office:value="23.56" table:style-name="ce1">
            <text:p>23.56</text:p>
          </table:table-cell>
          <table:table-cell office:value-type="float" office:value="2.0684601640800328E-3" table:style-name="ce1">
            <text:p>0.00206846</text:p>
          </table:table-cell>
          <table:table-cell office:value-type="float" office:value="-4.2265426880812099E-3" table:style-name="ce1">
            <text:p>-0.004226543</text:p>
          </table:table-cell>
          <table:table-cell office:value-type="float" office:value="-9.9999999999999645E-2" table:style-name="ce1">
            <text:p>-0.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Pre-COVID</text:p>
          </table:table-cell>
          <table:table-cell office:value-type="float" office:value="2.068460164080133E-3" table:style-name="ce1">
            <text:p>0.00206846</text:p>
          </table:table-cell>
          <table:table-cell office:value-type="float" office:value="-4.2265426880812029E-3" table:style-name="ce1">
            <text:p>-0.004226543</text:p>
          </table:table-cell>
          <table:table-cell table:number-columns-repeated="16371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Jan</text:p>
          </table:table-cell>
          <table:table-cell office:value-type="float" office:value="4587484" table:style-name="ce1">
            <text:p>4587484</text:p>
          </table:table-cell>
          <table:table-cell office:value-type="float" office:value="236118" table:style-name="ce1">
            <text:p>236118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23.97" table:style-name="ce1">
            <text:p>23.97</text:p>
          </table:table-cell>
          <table:table-cell office:value-type="float" office:value="2.269342336419788E-3" table:style-name="ce1">
            <text:p>0.002269342</text:p>
          </table:table-cell>
          <table:table-cell office:value-type="float" office:value="1.7402376910016989E-2" table:style-name="ce1">
            <text:p>0.017402377</text:p>
          </table:table-cell>
          <table:table-cell office:value-type="float" office:value="-9.9999999999999645E-2" table:style-name="ce1">
            <text:p>-0.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Pre-COVID</text:p>
          </table:table-cell>
          <table:table-cell office:value-type="float" office:value="2.2693423364197329E-3" table:style-name="ce1">
            <text:p>0.002269342</text:p>
          </table:table-cell>
          <table:table-cell office:value-type="float" office:value="1.7402376910016889E-2" table:style-name="ce1">
            <text:p>0.017402377</text:p>
          </table:table-cell>
          <table:table-cell table:number-columns-repeated="16371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Feb</text:p>
          </table:table-cell>
          <table:table-cell office:value-type="float" office:value="4598476" table:style-name="ce1">
            <text:p>4598476</text:p>
          </table:table-cell>
          <table:table-cell office:value-type="float" office:value="230611" table:style-name="ce1">
            <text:p>230611</text:p>
          </table:table-cell>
          <table:table-cell office:value-type="float" office:value="4.8" table:style-name="ce1">
            <text:p>4.8</text:p>
          </table:table-cell>
          <table:table-cell office:value-type="float" office:value="23.84" table:style-name="ce1">
            <text:p>23.84</text:p>
          </table:table-cell>
          <table:table-cell office:value-type="float" office:value="2.3960846511944241E-3" table:style-name="ce1">
            <text:p>0.002396085</text:p>
          </table:table-cell>
          <table:table-cell office:value-type="float" office:value="-5.423445974134293E-3" table:style-name="ce1">
            <text:p>-0.005423446</text:p>
          </table:table-cell>
          <table:table-cell office:value-type="float" office:value="-0.10000000000000051" table:style-name="ce1">
            <text:p>-0.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Pre-COVID</text:p>
          </table:table-cell>
          <table:table-cell office:value-type="float" office:value="2.3960846511943408E-3" table:style-name="ce1">
            <text:p>0.002396085</text:p>
          </table:table-cell>
          <table:table-cell office:value-type="float" office:value="-5.4234459741342436E-3" table:style-name="ce1">
            <text:p>-0.005423446</text:p>
          </table:table-cell>
          <table:table-cell table:number-columns-repeated="16371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Mar</text:p>
          </table:table-cell>
          <table:table-cell office:value-type="float" office:value="4609099" table:style-name="ce1">
            <text:p>4609099</text:p>
          </table:table-cell>
          <table:table-cell office:value-type="float" office:value="225431" table:style-name="ce1">
            <text:p>225431</text:p>
          </table:table-cell>
          <table:table-cell office:value-type="float" office:value="4.7" table:style-name="ce1">
            <text:p>4.7</text:p>
          </table:table-cell>
          <table:table-cell office:value-type="float" office:value="23.88" table:style-name="ce1">
            <text:p>23.88</text:p>
          </table:table-cell>
          <table:table-cell office:value-type="float" office:value="2.3101131766263428E-3" table:style-name="ce1">
            <text:p>0.002310113</text:p>
          </table:table-cell>
          <table:table-cell office:value-type="float" office:value="1.677852348993253E-3" table:style-name="ce1">
            <text:p>0.001677852</text:p>
          </table:table-cell>
          <table:table-cell office:value-type="float" office:value="-9.9999999999999645E-2" table:style-name="ce1">
            <text:p>-0.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re-COVID</text:p>
          </table:table-cell>
          <table:table-cell office:value-type="float" office:value="2.3101131766263272E-3" table:style-name="ce1">
            <text:p>0.002310113</text:p>
          </table:table-cell>
          <table:table-cell office:value-type="float" office:value="1.6778523489933139E-3" table:style-name="ce1">
            <text:p>0.001677852</text:p>
          </table:table-cell>
          <table:table-cell table:number-columns-repeated="16371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Apr</text:p>
          </table:table-cell>
          <table:table-cell office:value-type="float" office:value="4619674" table:style-name="ce1">
            <text:p>4619674</text:p>
          </table:table-cell>
          <table:table-cell office:value-type="float" office:value="221563" table:style-name="ce1">
            <text:p>221563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24.21" table:style-name="ce1">
            <text:p>24.21</text:p>
          </table:table-cell>
          <table:table-cell office:value-type="float" office:value="2.2943746706243461E-3" table:style-name="ce1">
            <text:p>0.002294375</text:p>
          </table:table-cell>
          <table:table-cell office:value-type="float" office:value="1.381909547738701E-2" table:style-name="ce1">
            <text:p>0.013819095</text:p>
          </table:table-cell>
          <table:table-cell office:value-type="float" office:value="-0.10000000000000051" table:style-name="ce1">
            <text:p>-0.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Pre-COVID</text:p>
          </table:table-cell>
          <table:table-cell office:value-type="float" office:value="2.2943746706243222E-3" table:style-name="ce1">
            <text:p>0.002294375</text:p>
          </table:table-cell>
          <table:table-cell office:value-type="float" office:value="1.381909547738691E-2" table:style-name="ce1">
            <text:p>0.013819095</text:p>
          </table:table-cell>
          <table:table-cell table:number-columns-repeated="16371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May</text:p>
          </table:table-cell>
          <table:table-cell office:value-type="float" office:value="4630715" table:style-name="ce1">
            <text:p>4630715</text:p>
          </table:table-cell>
          <table:table-cell office:value-type="float" office:value="218986" table:style-name="ce1">
            <text:p>218986</text:p>
          </table:table-cell>
          <table:table-cell office:value-type="float" office:value="4.5" table:style-name="ce1">
            <text:p>4.5</text:p>
          </table:table-cell>
          <table:table-cell office:value-type="float" office:value="23.82" table:style-name="ce1">
            <text:p>23.82</text:p>
          </table:table-cell>
          <table:table-cell office:value-type="float" office:value="2.3899954845298609E-3" table:style-name="ce1">
            <text:p>0.002389995</text:p>
          </table:table-cell>
          <table:table-cell office:value-type="float" office:value="-1.610904584882282E-2" table:style-name="ce1">
            <text:p>-0.016109046</text:p>
          </table:table-cell>
          <table:table-cell office:value-type="float" office:value="-9.9999999999999645E-2" table:style-name="ce1">
            <text:p>-0.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Pre-COVID</text:p>
          </table:table-cell>
          <table:table-cell office:value-type="float" office:value="2.3899954845298939E-3" table:style-name="ce1">
            <text:p>0.002389995</text:p>
          </table:table-cell>
          <table:table-cell office:value-type="float" office:value="-1.6109045848822778E-2" table:style-name="ce1">
            <text:p>-0.016109046</text:p>
          </table:table-cell>
          <table:table-cell table:number-columns-repeated="16371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Jun</text:p>
          </table:table-cell>
          <table:table-cell office:value-type="float" office:value="4641518" table:style-name="ce1">
            <text:p>4641518</text:p>
          </table:table-cell>
          <table:table-cell office:value-type="float" office:value="217707" table:style-name="ce1">
            <text:p>217707</text:p>
          </table:table-cell>
          <table:table-cell office:value-type="float" office:value="4.5" table:style-name="ce1">
            <text:p>4.5</text:p>
          </table:table-cell>
          <table:table-cell office:value-type="float" office:value="23.64" table:style-name="ce1">
            <text:p>23.64</text:p>
          </table:table-cell>
          <table:table-cell office:value-type="float" office:value="2.3329010746720542E-3" table:style-name="ce1">
            <text:p>0.002332901</text:p>
          </table:table-cell>
          <table:table-cell office:value-type="float" office:value="-7.5566750629722798E-3" table:style-name="ce1">
            <text:p>-0.007556675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Pre-COVID</text:p>
          </table:table-cell>
          <table:table-cell office:value-type="float" office:value="2.3329010746719892E-3" table:style-name="ce1">
            <text:p>0.002332901</text:p>
          </table:table-cell>
          <table:table-cell office:value-type="float" office:value="-7.5566750629723067E-3" table:style-name="ce1">
            <text:p>-0.007556675</text:p>
          </table:table-cell>
          <table:table-cell table:number-columns-repeated="16371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Jul</text:p>
          </table:table-cell>
          <table:table-cell office:value-type="float" office:value="4650878" table:style-name="ce1">
            <text:p>4650878</text:p>
          </table:table-cell>
          <table:table-cell office:value-type="float" office:value="217681" table:style-name="ce1">
            <text:p>217681</text:p>
          </table:table-cell>
          <table:table-cell office:value-type="float" office:value="4.5" table:style-name="ce1">
            <text:p>4.5</text:p>
          </table:table-cell>
          <table:table-cell office:value-type="float" office:value="24.05" table:style-name="ce1">
            <text:p>24.05</text:p>
          </table:table-cell>
          <table:table-cell office:value-type="float" office:value="2.0165816441948519E-3" table:style-name="ce1">
            <text:p>0.002016582</text:p>
          </table:table-cell>
          <table:table-cell office:value-type="float" office:value="1.7343485617597298E-2" table:style-name="ce1">
            <text:p>0.017343486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Pre-COVID</text:p>
          </table:table-cell>
          <table:table-cell office:value-type="float" office:value="2.0165816441948259E-3" table:style-name="ce1">
            <text:p>0.002016582</text:p>
          </table:table-cell>
          <table:table-cell office:value-type="float" office:value="1.734348561759735E-2" table:style-name="ce1">
            <text:p>0.017343486</text:p>
          </table:table-cell>
          <table:table-cell table:number-columns-repeated="16371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Aug</text:p>
          </table:table-cell>
          <table:table-cell office:value-type="float" office:value="4657816" table:style-name="ce1">
            <text:p>4657816</text:p>
          </table:table-cell>
          <table:table-cell office:value-type="float" office:value="217881" table:style-name="ce1">
            <text:p>217881</text:p>
          </table:table-cell>
          <table:table-cell office:value-type="float" office:value="4.5" table:style-name="ce1">
            <text:p>4.5</text:p>
          </table:table-cell>
          <table:table-cell office:value-type="float" office:value="23.86" table:style-name="ce1">
            <text:p>23.86</text:p>
          </table:table-cell>
          <table:table-cell office:value-type="float" office:value="1.491761340546882E-3" table:style-name="ce1">
            <text:p>0.001491761</text:p>
          </table:table-cell>
          <table:table-cell office:value-type="float" office:value="-7.9002079002079527E-3" table:style-name="ce1">
            <text:p>-0.007900208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Pre-COVID</text:p>
          </table:table-cell>
          <table:table-cell office:value-type="float" office:value="1.4917613405469601E-3" table:style-name="ce1">
            <text:p>0.001491761</text:p>
          </table:table-cell>
          <table:table-cell office:value-type="float" office:value="-7.9002079002079562E-3" table:style-name="ce1">
            <text:p>-0.007900208</text:p>
          </table:table-cell>
          <table:table-cell table:number-columns-repeated="16371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Sep</text:p>
          </table:table-cell>
          <table:table-cell office:value-type="float" office:value="4661948" table:style-name="ce1">
            <text:p>4661948</text:p>
          </table:table-cell>
          <table:table-cell office:value-type="float" office:value="217463" table:style-name="ce1">
            <text:p>217463</text:p>
          </table:table-cell>
          <table:table-cell office:value-type="float" office:value="4.5" table:style-name="ce1">
            <text:p>4.5</text:p>
          </table:table-cell>
          <table:table-cell office:value-type="float" office:value="24.1" table:style-name="ce1">
            <text:p>24.1</text:p>
          </table:table-cell>
          <table:table-cell office:value-type="float" office:value="8.8711104088267973E-4" table:style-name="ce1">
            <text:p>0.000887111</text:p>
          </table:table-cell>
          <table:table-cell office:value-type="float" office:value="1.0058675607711729E-2" table:style-name="ce1">
            <text:p>0.010058676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Pre-COVID</text:p>
          </table:table-cell>
          <table:table-cell office:value-type="float" office:value="8.8711104088257109E-4" table:style-name="ce1">
            <text:p>0.000887111</text:p>
          </table:table-cell>
          <table:table-cell office:value-type="float" office:value="1.0058675607711679E-2" table:style-name="ce1">
            <text:p>0.010058676</text:p>
          </table:table-cell>
          <table:table-cell table:number-columns-repeated="16371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Oct</text:p>
          </table:table-cell>
          <table:table-cell office:value-type="float" office:value="4663602" table:style-name="ce1">
            <text:p>4663602</text:p>
          </table:table-cell>
          <table:table-cell office:value-type="float" office:value="216041" table:style-name="ce1">
            <text:p>216041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24.4" table:style-name="ce1">
            <text:p>24.4</text:p>
          </table:table-cell>
          <table:table-cell office:value-type="float" office:value="3.5478731208499111E-4" table:style-name="ce1">
            <text:p>0.000354787</text:p>
          </table:table-cell>
          <table:table-cell office:value-type="float" office:value="1.244813278008287E-2" table:style-name="ce1">
            <text:p>0.012448133</text:p>
          </table:table-cell>
          <table:table-cell office:value-type="float" office:value="-9.9999999999999645E-2" table:style-name="ce1">
            <text:p>-0.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Pre-COVID</text:p>
          </table:table-cell>
          <table:table-cell office:value-type="float" office:value="3.5478731208504749E-4" table:style-name="ce1">
            <text:p>0.000354787</text:p>
          </table:table-cell>
          <table:table-cell office:value-type="float" office:value="1.244813278008294E-2" table:style-name="ce1">
            <text:p>0.012448133</text:p>
          </table:table-cell>
          <table:table-cell table:number-columns-repeated="16371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Nov</text:p>
          </table:table-cell>
          <table:table-cell office:value-type="float" office:value="4663855" table:style-name="ce1">
            <text:p>4663855</text:p>
          </table:table-cell>
          <table:table-cell office:value-type="float" office:value="213735" table:style-name="ce1">
            <text:p>213735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24.14" table:style-name="ce1">
            <text:p>24.14</text:p>
          </table:table-cell>
          <table:table-cell office:value-type="float" office:value="5.4249912406761982E-5" table:style-name="ce1">
            <text:p>5.42499E-05</text:p>
          </table:table-cell>
          <table:table-cell office:value-type="float" office:value="-1.0655737704917951E-2" table:style-name="ce1">
            <text:p>-0.010655738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Pre-COVID</text:p>
          </table:table-cell>
          <table:table-cell office:value-type="float" office:value="5.4249912406767458E-5" table:style-name="ce1">
            <text:p>5.42499E-05</text:p>
          </table:table-cell>
          <table:table-cell office:value-type="float" office:value="-1.06557377049179E-2" table:style-name="ce1">
            <text:p>-0.010655738</text:p>
          </table:table-cell>
          <table:table-cell table:number-columns-repeated="16371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Dec</text:p>
          </table:table-cell>
          <table:table-cell office:value-type="float" office:value="4665504" table:style-name="ce1">
            <text:p>4665504</text:p>
          </table:table-cell>
          <table:table-cell office:value-type="float" office:value="210424" table:style-name="ce1">
            <text:p>210424</text:p>
          </table:table-cell>
          <table:table-cell office:value-type="float" office:value="4.3" table:style-name="ce1">
            <text:p>4.3</text:p>
          </table:table-cell>
          <table:table-cell office:value-type="float" office:value="24.3" table:style-name="ce1">
            <text:p>24.3</text:p>
          </table:table-cell>
          <table:table-cell office:value-type="float" office:value="3.5357016888389541E-4" table:style-name="ce1">
            <text:p>0.00035357</text:p>
          </table:table-cell>
          <table:table-cell office:value-type="float" office:value="6.6280033140016627E-3" table:style-name="ce1">
            <text:p>0.006628003</text:p>
          </table:table-cell>
          <table:table-cell office:value-type="float" office:value="-0.10000000000000051" table:style-name="ce1">
            <text:p>-0.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Pre-COVID</text:p>
          </table:table-cell>
          <table:table-cell office:value-type="float" office:value="3.5357016888393211E-4" table:style-name="ce1">
            <text:p>0.00035357</text:p>
          </table:table-cell>
          <table:table-cell office:value-type="float" office:value="6.6280033140015959E-3" table:style-name="ce1">
            <text:p>0.006628003</text:p>
          </table:table-cell>
          <table:table-cell table:number-columns-repeated="16371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1">
            <text:p>Jan</text:p>
          </table:table-cell>
          <table:table-cell office:value-type="float" office:value="4670755" table:style-name="ce1">
            <text:p>4670755</text:p>
          </table:table-cell>
          <table:table-cell office:value-type="float" office:value="206559" table:style-name="ce1">
            <text:p>206559</text:p>
          </table:table-cell>
          <table:table-cell office:value-type="float" office:value="4.2" table:style-name="ce1">
            <text:p>4.2</text:p>
          </table:table-cell>
          <table:table-cell office:value-type="float" office:value="24.79" table:style-name="ce1">
            <text:p>24.79</text:p>
          </table:table-cell>
          <table:table-cell office:value-type="float" office:value="1.125494694678217E-3" table:style-name="ce1">
            <text:p>0.001125495</text:p>
          </table:table-cell>
          <table:table-cell office:value-type="float" office:value="2.016460905349788E-2" table:style-name="ce1">
            <text:p>0.020164609</text:p>
          </table:table-cell>
          <table:table-cell office:value-type="float" office:value="-9.9999999999999645E-2" table:style-name="ce1">
            <text:p>-0.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e-COVID</text:p>
          </table:table-cell>
          <table:table-cell office:value-type="float" office:value="1.125494694678153E-3" table:style-name="ce1">
            <text:p>0.001125495</text:p>
          </table:table-cell>
          <table:table-cell office:value-type="float" office:value="2.0164609053497928E-2" table:style-name="ce1">
            <text:p>0.020164609</text:p>
          </table:table-cell>
          <table:table-cell table:number-columns-repeated="16371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1">
            <text:p>Feb</text:p>
          </table:table-cell>
          <table:table-cell office:value-type="float" office:value="4680170" table:style-name="ce1">
            <text:p>4680170</text:p>
          </table:table-cell>
          <table:table-cell office:value-type="float" office:value="202655" table:style-name="ce1">
            <text:p>202655</text:p>
          </table:table-cell>
          <table:table-cell office:value-type="float" office:value="4.2" table:style-name="ce1">
            <text:p>4.2</text:p>
          </table:table-cell>
          <table:table-cell office:value-type="float" office:value="24.81" table:style-name="ce1">
            <text:p>24.81</text:p>
          </table:table-cell>
          <table:table-cell office:value-type="float" office:value="2.0157340729710718E-3" table:style-name="ce1">
            <text:p>0.002015734</text:p>
          </table:table-cell>
          <table:table-cell office:value-type="float" office:value="8.0677692617989411E-4" table:style-name="ce1">
            <text:p>0.000806777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Pre-COVID</text:p>
          </table:table-cell>
          <table:table-cell office:value-type="float" office:value="2.0157340729711759E-3" table:style-name="ce1">
            <text:p>0.002015734</text:p>
          </table:table-cell>
          <table:table-cell office:value-type="float" office:value="8.0677692617991958E-4" table:style-name="ce1">
            <text:p>0.000806777</text:p>
          </table:table-cell>
          <table:table-cell table:number-columns-repeated="16371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1">
            <text:p>Mar</text:p>
          </table:table-cell>
          <table:table-cell office:value-type="float" office:value="4692280" table:style-name="ce1">
            <text:p>4692280</text:p>
          </table:table-cell>
          <table:table-cell office:value-type="float" office:value="198985" table:style-name="ce1">
            <text:p>198985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24.76" table:style-name="ce1">
            <text:p>24.76</text:p>
          </table:table-cell>
          <table:table-cell office:value-type="float" office:value="2.587512846755566E-3" table:style-name="ce1">
            <text:p>0.002587513</text:p>
          </table:table-cell>
          <table:table-cell office:value-type="float" office:value="-2.01531640467542E-3" table:style-name="ce1">
            <text:p>-0.002015316</text:p>
          </table:table-cell>
          <table:table-cell office:value-type="float" office:value="-0.10000000000000051" table:style-name="ce1">
            <text:p>-0.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Pre-COVID</text:p>
          </table:table-cell>
          <table:table-cell office:value-type="float" office:value="2.5875128467556241E-3" table:style-name="ce1">
            <text:p>0.002587513</text:p>
          </table:table-cell>
          <table:table-cell office:value-type="float" office:value="-2.015316404675449E-3" table:style-name="ce1">
            <text:p>-0.002015316</text:p>
          </table:table-cell>
          <table:table-cell table:number-columns-repeated="16371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1">
            <text:p>Apr</text:p>
          </table:table-cell>
          <table:table-cell office:value-type="float" office:value="4703477" table:style-name="ce1">
            <text:p>4703477</text:p>
          </table:table-cell>
          <table:table-cell office:value-type="float" office:value="195790" table:style-name="ce1">
            <text:p>195790</text:p>
          </table:table-cell>
          <table:table-cell office:value-type="float" office:value="4" table:style-name="ce1">
            <text:p>4</text:p>
          </table:table-cell>
          <table:table-cell office:value-type="float" office:value="25.01" table:style-name="ce1">
            <text:p>25.01</text:p>
          </table:table-cell>
          <table:table-cell office:value-type="float" office:value="2.3862599844851539E-3" table:style-name="ce1">
            <text:p>0.00238626</text:p>
          </table:table-cell>
          <table:table-cell office:value-type="float" office:value="1.009693053311793E-2" table:style-name="ce1">
            <text:p>0.010096931</text:p>
          </table:table-cell>
          <table:table-cell office:value-type="float" office:value="-9.9999999999999645E-2" table:style-name="ce1">
            <text:p>-0.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Pre-COVID</text:p>
          </table:table-cell>
          <table:table-cell office:value-type="float" office:value="2.3862599844850512E-3" table:style-name="ce1">
            <text:p>0.00238626</text:p>
          </table:table-cell>
          <table:table-cell office:value-type="float" office:value="1.0096930533118E-2" table:style-name="ce1">
            <text:p>0.010096931</text:p>
          </table:table-cell>
          <table:table-cell table:number-columns-repeated="16371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1">
            <text:p>May</text:p>
          </table:table-cell>
          <table:table-cell office:value-type="float" office:value="4710781" table:style-name="ce1">
            <text:p>4710781</text:p>
          </table:table-cell>
          <table:table-cell office:value-type="float" office:value="193643" table:style-name="ce1">
            <text:p>193643</text:p>
          </table:table-cell>
          <table:table-cell office:value-type="float" office:value="3.9" table:style-name="ce1">
            <text:p>3.9</text:p>
          </table:table-cell>
          <table:table-cell office:value-type="float" office:value="24.76" table:style-name="ce1">
            <text:p>24.76</text:p>
          </table:table-cell>
          <table:table-cell office:value-type="float" office:value="1.552893742225167E-3" table:style-name="ce1">
            <text:p>0.001552894</text:p>
          </table:table-cell>
          <table:table-cell office:value-type="float" office:value="-9.996001599360255E-3" table:style-name="ce1">
            <text:p>-0.009996002</text:p>
          </table:table-cell>
          <table:table-cell office:value-type="float" office:value="-0.1000000000000001" table:style-name="ce1">
            <text:p>-0.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Pre-COVID</text:p>
          </table:table-cell>
          <table:table-cell office:value-type="float" office:value="1.5528937422251139E-3" table:style-name="ce1">
            <text:p>0.001552894</text:p>
          </table:table-cell>
          <table:table-cell office:value-type="float" office:value="-9.9960015993602047E-3" table:style-name="ce1">
            <text:p>-0.009996002</text:p>
          </table:table-cell>
          <table:table-cell table:number-columns-repeated="16371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1">
            <text:p>Jun</text:p>
          </table:table-cell>
          <table:table-cell office:value-type="float" office:value="4714182" table:style-name="ce1">
            <text:p>4714182</text:p>
          </table:table-cell>
          <table:table-cell office:value-type="float" office:value="192576" table:style-name="ce1">
            <text:p>192576</text:p>
          </table:table-cell>
          <table:table-cell office:value-type="float" office:value="3.9" table:style-name="ce1">
            <text:p>3.9</text:p>
          </table:table-cell>
          <table:table-cell office:value-type="float" office:value="24.61" table:style-name="ce1">
            <text:p>24.61</text:p>
          </table:table-cell>
          <table:table-cell office:value-type="float" office:value="7.2196096570823398E-4" table:style-name="ce1">
            <text:p>0.000721961</text:p>
          </table:table-cell>
          <table:table-cell office:value-type="float" office:value="-6.0581583198708452E-3" table:style-name="ce1">
            <text:p>-0.006058158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Pre-COVID</text:p>
          </table:table-cell>
          <table:table-cell office:value-type="float" office:value="7.2196096570831259E-4" table:style-name="ce1">
            <text:p>0.000721961</text:p>
          </table:table-cell>
          <table:table-cell office:value-type="float" office:value="-6.0581583198708877E-3" table:style-name="ce1">
            <text:p>-0.006058158</text:p>
          </table:table-cell>
          <table:table-cell table:number-columns-repeated="16371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1">
            <text:p>Jul</text:p>
          </table:table-cell>
          <table:table-cell office:value-type="float" office:value="4714462" table:style-name="ce1">
            <text:p>4714462</text:p>
          </table:table-cell>
          <table:table-cell office:value-type="float" office:value="192364" table:style-name="ce1">
            <text:p>192364</text:p>
          </table:table-cell>
          <table:table-cell office:value-type="float" office:value="3.9" table:style-name="ce1">
            <text:p>3.9</text:p>
          </table:table-cell>
          <table:table-cell office:value-type="float" office:value="24.92" table:style-name="ce1">
            <text:p>24.92</text:p>
          </table:table-cell>
          <table:table-cell office:value-type="float" office:value="5.9395246089353359E-5" table:style-name="ce1">
            <text:p>5.93952E-05</text:p>
          </table:table-cell>
          <table:table-cell office:value-type="float" office:value="1.259650548557506E-2" table:style-name="ce1">
            <text:p>0.012596505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Pre-COVID</text:p>
          </table:table-cell>
          <table:table-cell office:value-type="float" office:value="5.9395246089444242E-5" table:style-name="ce1">
            <text:p>5.93952E-05</text:p>
          </table:table-cell>
          <table:table-cell office:value-type="float" office:value="1.2596505485575E-2" table:style-name="ce1">
            <text:p>0.012596505</text:p>
          </table:table-cell>
          <table:table-cell table:number-columns-repeated="16371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1">
            <text:p>Aug</text:p>
          </table:table-cell>
          <table:table-cell office:value-type="float" office:value="4713811" table:style-name="ce1">
            <text:p>4713811</text:p>
          </table:table-cell>
          <table:table-cell office:value-type="float" office:value="193336" table:style-name="ce1">
            <text:p>193336</text:p>
          </table:table-cell>
          <table:table-cell office:value-type="float" office:value="3.9" table:style-name="ce1">
            <text:p>3.9</text:p>
          </table:table-cell>
          <table:table-cell office:value-type="float" office:value="24.84" table:style-name="ce1">
            <text:p>24.84</text:p>
          </table:table-cell>
          <table:table-cell office:value-type="float" office:value="-1.380857455209099E-4" table:style-name="ce1">
            <text:p>-0.000138086</text:p>
          </table:table-cell>
          <table:table-cell office:value-type="float" office:value="-3.2102728731942952E-3" table:style-name="ce1">
            <text:p>-0.003210273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Pre-COVID</text:p>
          </table:table-cell>
          <table:table-cell office:value-type="float" office:value="-1.3808574552087729E-4" table:style-name="ce1">
            <text:p>-0.000138086</text:p>
          </table:table-cell>
          <table:table-cell office:value-type="float" office:value="-3.2102728731943091E-3" table:style-name="ce1">
            <text:p>-0.003210273</text:p>
          </table:table-cell>
          <table:table-cell table:number-columns-repeated="16371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1">
            <text:p>Sep</text:p>
          </table:table-cell>
          <table:table-cell office:value-type="float" office:value="4715051" table:style-name="ce1">
            <text:p>4715051</text:p>
          </table:table-cell>
          <table:table-cell office:value-type="float" office:value="195299" table:style-name="ce1">
            <text:p>195299</text:p>
          </table:table-cell>
          <table:table-cell office:value-type="float" office:value="4" table:style-name="ce1">
            <text:p>4</text:p>
          </table:table-cell>
          <table:table-cell office:value-type="float" office:value="25.52" table:style-name="ce1">
            <text:p>25.52</text:p>
          </table:table-cell>
          <table:table-cell office:value-type="float" office:value="2.630567920521209E-4" table:style-name="ce1">
            <text:p>0.000263057</text:p>
          </table:table-cell>
          <table:table-cell office:value-type="float" office:value="2.737520128824476E-2" table:style-name="ce1">
            <text:p>0.027375201</text:p>
          </table:table-cell>
          <table:table-cell office:value-type="float" office:value="0.1000000000000001" table:style-name="ce1">
            <text:p>0.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Pre-COVID</text:p>
          </table:table-cell>
          <table:table-cell office:value-type="float" office:value="2.6305679205207427E-4" table:style-name="ce1">
            <text:p>0.000263057</text:p>
          </table:table-cell>
          <table:table-cell office:value-type="float" office:value="2.737520128824467E-2" table:style-name="ce1">
            <text:p>0.027375201</text:p>
          </table:table-cell>
          <table:table-cell table:number-columns-repeated="16371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1">
            <text:p>Oct</text:p>
          </table:table-cell>
          <table:table-cell office:value-type="float" office:value="4720133" table:style-name="ce1">
            <text:p>4720133</text:p>
          </table:table-cell>
          <table:table-cell office:value-type="float" office:value="197421" table:style-name="ce1">
            <text:p>197421</text:p>
          </table:table-cell>
          <table:table-cell office:value-type="float" office:value="4" table:style-name="ce1">
            <text:p>4</text:p>
          </table:table-cell>
          <table:table-cell office:value-type="float" office:value="25.04" table:style-name="ce1">
            <text:p>25.04</text:p>
          </table:table-cell>
          <table:table-cell office:value-type="float" office:value="1.077825033069632E-3" table:style-name="ce1">
            <text:p>0.001077825</text:p>
          </table:table-cell>
          <table:table-cell office:value-type="float" office:value="-1.88087774294671E-2" table:style-name="ce1">
            <text:p>-0.018808777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Pre-COVID</text:p>
          </table:table-cell>
          <table:table-cell office:value-type="float" office:value="1.0778250330696351E-3" table:style-name="ce1">
            <text:p>0.001077825</text:p>
          </table:table-cell>
          <table:table-cell office:value-type="float" office:value="-1.8808777429467068E-2" table:style-name="ce1">
            <text:p>-0.018808777</text:p>
          </table:table-cell>
          <table:table-cell table:number-columns-repeated="16371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1">
            <text:p>Nov</text:p>
          </table:table-cell>
          <table:table-cell office:value-type="float" office:value="4729048" table:style-name="ce1">
            <text:p>4729048</text:p>
          </table:table-cell>
          <table:table-cell office:value-type="float" office:value="198895" table:style-name="ce1">
            <text:p>198895</text:p>
          </table:table-cell>
          <table:table-cell office:value-type="float" office:value="4" table:style-name="ce1">
            <text:p>4</text:p>
          </table:table-cell>
          <table:table-cell office:value-type="float" office:value="25.21" table:style-name="ce1">
            <text:p>25.21</text:p>
          </table:table-cell>
          <table:table-cell office:value-type="float" office:value="1.88871796620985E-3" table:style-name="ce1">
            <text:p>0.001888718</text:p>
          </table:table-cell>
          <table:table-cell office:value-type="float" office:value="6.7891373801917624E-3" table:style-name="ce1">
            <text:p>0.006789137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Pre-COVID</text:p>
          </table:table-cell>
          <table:table-cell office:value-type="float" office:value="1.88871796620993E-3" table:style-name="ce1">
            <text:p>0.001888718</text:p>
          </table:table-cell>
          <table:table-cell office:value-type="float" office:value="6.7891373801918231E-3" table:style-name="ce1">
            <text:p>0.006789137</text:p>
          </table:table-cell>
          <table:table-cell table:number-columns-repeated="16371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1">
            <text:p>Dec</text:p>
          </table:table-cell>
          <table:table-cell office:value-type="float" office:value="4740426" table:style-name="ce1">
            <text:p>4740426</text:p>
          </table:table-cell>
          <table:table-cell office:value-type="float" office:value="199172" table:style-name="ce1">
            <text:p>199172</text:p>
          </table:table-cell>
          <table:table-cell office:value-type="float" office:value="4" table:style-name="ce1">
            <text:p>4</text:p>
          </table:table-cell>
          <table:table-cell office:value-type="float" office:value="25.67" table:style-name="ce1">
            <text:p>25.67</text:p>
          </table:table-cell>
          <table:table-cell office:value-type="float" office:value="2.4059810769524858E-3" table:style-name="ce1">
            <text:p>0.002405981</text:p>
          </table:table-cell>
          <table:table-cell office:value-type="float" office:value="1.824672748909166E-2" table:style-name="ce1">
            <text:p>0.018246727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Pre-COVID</text:p>
          </table:table-cell>
          <table:table-cell office:value-type="float" office:value="2.4059810769525569E-3" table:style-name="ce1">
            <text:p>0.002405981</text:p>
          </table:table-cell>
          <table:table-cell office:value-type="float" office:value="1.8246727489091619E-2" table:style-name="ce1">
            <text:p>0.018246727</text:p>
          </table:table-cell>
          <table:table-cell table:number-columns-repeated="16371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1">
            <text:p>Jan</text:p>
          </table:table-cell>
          <table:table-cell office:value-type="float" office:value="4751946" table:style-name="ce1">
            <text:p>4751946</text:p>
          </table:table-cell>
          <table:table-cell office:value-type="float" office:value="198216" table:style-name="ce1">
            <text:p>198216</text:p>
          </table:table-cell>
          <table:table-cell office:value-type="float" office:value="4" table:style-name="ce1">
            <text:p>4</text:p>
          </table:table-cell>
          <table:table-cell office:value-type="float" office:value="25.44" table:style-name="ce1">
            <text:p>25.44</text:p>
          </table:table-cell>
          <table:table-cell office:value-type="float" office:value="2.4301613399302091E-3" table:style-name="ce1">
            <text:p>0.002430161</text:p>
          </table:table-cell>
          <table:table-cell office:value-type="float" office:value="-8.9598753408648389E-3" table:style-name="ce1">
            <text:p>-0.008959875</text:p>
          </table:table-cell>
          <table:table-cell office:value-type="float" office:value="0" table:style-name="ce1">
            <text:p>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Pre-COVID</text:p>
          </table:table-cell>
          <table:table-cell office:value-type="float" office:value="2.4301613399302369E-3" table:style-name="ce1">
            <text:p>0.002430161</text:p>
          </table:table-cell>
          <table:table-cell office:value-type="float" office:value="-8.9598753408648424E-3" table:style-name="ce1">
            <text:p>-0.008959875</text:p>
          </table:table-cell>
          <table:table-cell table:number-columns-repeated="16371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1">
            <text:p>Feb</text:p>
          </table:table-cell>
          <table:table-cell office:value-type="float" office:value="4762008" table:style-name="ce1">
            <text:p>4762008</text:p>
          </table:table-cell>
          <table:table-cell office:value-type="float" office:value="195936" table:style-name="ce1">
            <text:p>195936</text:p>
          </table:table-cell>
          <table:table-cell office:value-type="float" office:value="4" table:style-name="ce1">
            <text:p>4</text:p>
          </table:table-cell>
          <table:table-cell office:value-type="float" office:value="25.34" table:style-name="ce1">
            <text:p>25.34</text:p>
          </table:table-cell>
          <table:table-cell office:value-type="float" office:value="2.117448304336792E-3" table:style-name="ce1">
            <text:p>0.002117448</text:p>
          </table:table-cell>
          <table:table-cell office:value-type="float" office:value="-3.9308176100629486E-3" table:style-name="ce1">
            <text:p>-0.003930818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Pre-COVID</text:p>
          </table:table-cell>
          <table:table-cell office:value-type="float" office:value="2.1174483043366892E-3" table:style-name="ce1">
            <text:p>0.002117448</text:p>
          </table:table-cell>
          <table:table-cell office:value-type="float" office:value="-3.9308176100629746E-3" table:style-name="ce1">
            <text:p>-0.003930818</text:p>
          </table:table-cell>
          <table:table-cell table:number-columns-repeated="16371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1">
            <text:p>Mar</text:p>
          </table:table-cell>
          <table:table-cell office:value-type="float" office:value="4769753" table:style-name="ce1">
            <text:p>4769753</text:p>
          </table:table-cell>
          <table:table-cell office:value-type="float" office:value="193366" table:style-name="ce1">
            <text:p>193366</text:p>
          </table:table-cell>
          <table:table-cell office:value-type="float" office:value="3.9" table:style-name="ce1">
            <text:p>3.9</text:p>
          </table:table-cell>
          <table:table-cell office:value-type="float" office:value="25.23" table:style-name="ce1">
            <text:p>25.23</text:p>
          </table:table-cell>
          <table:table-cell office:value-type="float" office:value="1.626414739328451E-3" table:style-name="ce1">
            <text:p>0.001626415</text:p>
          </table:table-cell>
          <table:table-cell office:value-type="float" office:value="-4.3409629044987939E-3" table:style-name="ce1">
            <text:p>-0.004340963</text:p>
          </table:table-cell>
          <table:table-cell office:value-type="float" office:value="-0.1000000000000001" table:style-name="ce1">
            <text:p>-0.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Pre-COVID</text:p>
          </table:table-cell>
          <table:table-cell office:value-type="float" office:value="1.626414739328341E-3" table:style-name="ce1">
            <text:p>0.001626415</text:p>
          </table:table-cell>
          <table:table-cell office:value-type="float" office:value="-4.3409629044988129E-3" table:style-name="ce1">
            <text:p>-0.004340963</text:p>
          </table:table-cell>
          <table:table-cell table:number-columns-repeated="16371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1">
            <text:p>Apr</text:p>
          </table:table-cell>
          <table:table-cell office:value-type="float" office:value="4775947" table:style-name="ce1">
            <text:p>4775947</text:p>
          </table:table-cell>
          <table:table-cell office:value-type="float" office:value="191471" table:style-name="ce1">
            <text:p>191471</text:p>
          </table:table-cell>
          <table:table-cell office:value-type="float" office:value="3.9" table:style-name="ce1">
            <text:p>3.9</text:p>
          </table:table-cell>
          <table:table-cell office:value-type="float" office:value="25.24" table:style-name="ce1">
            <text:p>25.24</text:p>
          </table:table-cell>
          <table:table-cell office:value-type="float" office:value="1.2985997388124709E-3" table:style-name="ce1">
            <text:p>0.0012986</text:p>
          </table:table-cell>
          <table:table-cell office:value-type="float" office:value="3.9635354736417011E-4" table:style-name="ce1">
            <text:p>0.000396354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Pre-COVID</text:p>
          </table:table-cell>
          <table:table-cell office:value-type="float" office:value="1.298599738812412E-3" table:style-name="ce1">
            <text:p>0.0012986</text:p>
          </table:table-cell>
          <table:table-cell office:value-type="float" office:value="3.9635354736411438E-4" table:style-name="ce1">
            <text:p>0.000396354</text:p>
          </table:table-cell>
          <table:table-cell table:number-columns-repeated="4"/>
          <table:table-cell table:style-name="ce1">
            <draw:frame draw:z-index="1" draw:id="id0" draw:style-name="a0" draw:name="Picture 1" svg:x="0.17708in" svg:y="0.19792in" svg:width="16.3125in" svg:height="12.65625in" style:rel-width="scale" style:rel-height="scale">
              <draw:image xlink:href="media/image1.tmp" xlink:type="simple" xlink:show="embed" xlink:actuate="onLoad"/>
              <svg:title/>
              <svg:desc>A graph of a graph showing the difference between employment and wage

AI-generated content may be incorrect.</svg:desc>
            </draw:frame>
          </table:table-cell>
          <table:table-cell table:number-columns-repeated="16366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1">
            <text:p>May</text:p>
          </table:table-cell>
          <table:table-cell office:value-type="float" office:value="4781384" table:style-name="ce1">
            <text:p>4781384</text:p>
          </table:table-cell>
          <table:table-cell office:value-type="float" office:value="190923" table:style-name="ce1">
            <text:p>190923</text:p>
          </table:table-cell>
          <table:table-cell office:value-type="float" office:value="3.8" table:style-name="ce1">
            <text:p>3.8</text:p>
          </table:table-cell>
          <table:table-cell office:value-type="float" office:value="25.2" table:style-name="ce1">
            <text:p>25.2</text:p>
          </table:table-cell>
          <table:table-cell office:value-type="float" office:value="1.1384129681506099E-3" table:style-name="ce1">
            <text:p>0.001138413</text:p>
          </table:table-cell>
          <table:table-cell office:value-type="float" office:value="-1.5847860538826921E-3" table:style-name="ce1">
            <text:p>-0.001584786</text:p>
          </table:table-cell>
          <table:table-cell office:value-type="float" office:value="-0.1000000000000001" table:style-name="ce1">
            <text:p>-0.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Pre-COVID</text:p>
          </table:table-cell>
          <table:table-cell office:value-type="float" office:value="1.1384129681506481E-3" table:style-name="ce1">
            <text:p>0.001138413</text:p>
          </table:table-cell>
          <table:table-cell office:value-type="float" office:value="-1.584786053882681E-3" table:style-name="ce1">
            <text:p>-0.001584786</text:p>
          </table:table-cell>
          <table:table-cell table:number-columns-repeated="16371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1">
            <text:p>Jun</text:p>
          </table:table-cell>
          <table:table-cell office:value-type="float" office:value="4786799" table:style-name="ce1">
            <text:p>4786799</text:p>
          </table:table-cell>
          <table:table-cell office:value-type="float" office:value="191786" table:style-name="ce1">
            <text:p>191786</text:p>
          </table:table-cell>
          <table:table-cell office:value-type="float" office:value="3.9" table:style-name="ce1">
            <text:p>3.9</text:p>
          </table:table-cell>
          <table:table-cell office:value-type="float" office:value="25.29" table:style-name="ce1">
            <text:p>25.29</text:p>
          </table:table-cell>
          <table:table-cell office:value-type="float" office:value="1.132517279515722E-3" table:style-name="ce1">
            <text:p>0.001132517</text:p>
          </table:table-cell>
          <table:table-cell office:value-type="float" office:value="3.5714285714285661E-3" table:style-name="ce1">
            <text:p>0.003571429</text:p>
          </table:table-cell>
          <table:table-cell office:value-type="float" office:value="0.1000000000000001" table:style-name="ce1">
            <text:p>0.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Pre-COVID</text:p>
          </table:table-cell>
          <table:table-cell office:value-type="float" office:value="1.1325172795157989E-3" table:style-name="ce1">
            <text:p>0.001132517</text:p>
          </table:table-cell>
          <table:table-cell office:value-type="float" office:value="3.5714285714285592E-3" table:style-name="ce1">
            <text:p>0.003571429</text:p>
          </table:table-cell>
          <table:table-cell table:number-columns-repeated="16371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1">
            <text:p>Jul</text:p>
          </table:table-cell>
          <table:table-cell office:value-type="float" office:value="4792965" table:style-name="ce1">
            <text:p>4792965</text:p>
          </table:table-cell>
          <table:table-cell office:value-type="float" office:value="193401" table:style-name="ce1">
            <text:p>193401</text:p>
          </table:table-cell>
          <table:table-cell office:value-type="float" office:value="3.9" table:style-name="ce1">
            <text:p>3.9</text:p>
          </table:table-cell>
          <table:table-cell office:value-type="float" office:value="25.18" table:style-name="ce1">
            <text:p>25.18</text:p>
          </table:table-cell>
          <table:table-cell office:value-type="float" office:value="1.288125948050043E-3" table:style-name="ce1">
            <text:p>0.001288126</text:p>
          </table:table-cell>
          <table:table-cell office:value-type="float" office:value="-4.3495452748121563E-3" table:style-name="ce1">
            <text:p>-0.004349545</text:p>
          </table:table-cell>
          <table:table-cell office:value-type="float" office:value="0" table:style-name="ce1">
            <text:p>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Pre-COVID</text:p>
          </table:table-cell>
          <table:table-cell office:value-type="float" office:value="1.288125948049945E-3" table:style-name="ce1">
            <text:p>0.001288126</text:p>
          </table:table-cell>
          <table:table-cell office:value-type="float" office:value="-4.3495452748121277E-3" table:style-name="ce1">
            <text:p>-0.004349545</text:p>
          </table:table-cell>
          <table:table-cell table:number-columns-repeated="16371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1">
            <text:p>Aug</text:p>
          </table:table-cell>
          <table:table-cell office:value-type="float" office:value="4800148" table:style-name="ce1">
            <text:p>4800148</text:p>
          </table:table-cell>
          <table:table-cell office:value-type="float" office:value="194507" table:style-name="ce1">
            <text:p>194507</text:p>
          </table:table-cell>
          <table:table-cell office:value-type="float" office:value="3.9" table:style-name="ce1">
            <text:p>3.9</text:p>
          </table:table-cell>
          <table:table-cell office:value-type="float" office:value="25.39" table:style-name="ce1">
            <text:p>25.39</text:p>
          </table:table-cell>
          <table:table-cell office:value-type="float" office:value="1.498654799273519E-3" table:style-name="ce1">
            <text:p>0.001498655</text:p>
          </table:table-cell>
          <table:table-cell office:value-type="float" office:value="8.3399523431295017E-3" table:style-name="ce1">
            <text:p>0.008339952</text:p>
          </table:table-cell>
          <table:table-cell office:value-type="float" office:value="0" table:style-name="ce1">
            <text:p>0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Pre-COVID</text:p>
          </table:table-cell>
          <table:table-cell office:value-type="float" office:value="1.4986547992734689E-3" table:style-name="ce1">
            <text:p>0.001498655</text:p>
          </table:table-cell>
          <table:table-cell office:value-type="float" office:value="8.3399523431295641E-3" table:style-name="ce1">
            <text:p>0.008339952</text:p>
          </table:table-cell>
          <table:table-cell table:number-columns-repeated="16371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1">
            <text:p>Sep</text:p>
          </table:table-cell>
          <table:table-cell office:value-type="float" office:value="4809111" table:style-name="ce1">
            <text:p>4809111</text:p>
          </table:table-cell>
          <table:table-cell office:value-type="float" office:value="193538" table:style-name="ce1">
            <text:p>193538</text:p>
          </table:table-cell>
          <table:table-cell office:value-type="float" office:value="3.9" table:style-name="ce1">
            <text:p>3.9</text:p>
          </table:table-cell>
          <table:table-cell office:value-type="float" office:value="25.53" table:style-name="ce1">
            <text:p>25.53</text:p>
          </table:table-cell>
          <table:table-cell office:value-type="float" office:value="1.8672340936154469E-3" table:style-name="ce1">
            <text:p>0.001867234</text:p>
          </table:table-cell>
          <table:table-cell office:value-type="float" office:value="5.513981882630979E-3" table:style-name="ce1">
            <text:p>0.005513982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Pre-COVID</text:p>
          </table:table-cell>
          <table:table-cell office:value-type="float" office:value="1.8672340936154439E-3" table:style-name="ce1">
            <text:p>0.001867234</text:p>
          </table:table-cell>
          <table:table-cell office:value-type="float" office:value="5.5139818826310796E-3" table:style-name="ce1">
            <text:p>0.005513982</text:p>
          </table:table-cell>
          <table:table-cell table:number-columns-repeated="16371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1">
            <text:p>Oct</text:p>
          </table:table-cell>
          <table:table-cell office:value-type="float" office:value="4818362" table:style-name="ce1">
            <text:p>4818362</text:p>
          </table:table-cell>
          <table:table-cell office:value-type="float" office:value="191252" table:style-name="ce1">
            <text:p>191252</text:p>
          </table:table-cell>
          <table:table-cell office:value-type="float" office:value="3.8" table:style-name="ce1">
            <text:p>3.8</text:p>
          </table:table-cell>
          <table:table-cell office:value-type="float" office:value="25.47" table:style-name="ce1">
            <text:p>25.47</text:p>
          </table:table-cell>
          <table:table-cell office:value-type="float" office:value="1.923640356814388E-3" table:style-name="ce1">
            <text:p>0.00192364</text:p>
          </table:table-cell>
          <table:table-cell office:value-type="float" office:value="-2.3501762632198299E-3" table:style-name="ce1">
            <text:p>-0.002350176</text:p>
          </table:table-cell>
          <table:table-cell office:value-type="float" office:value="-0.1000000000000001" table:style-name="ce1">
            <text:p>-0.1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Pre-COVID</text:p>
          </table:table-cell>
          <table:table-cell office:value-type="float" office:value="1.9236403568143601E-3" table:style-name="ce1">
            <text:p>0.00192364</text:p>
          </table:table-cell>
          <table:table-cell office:value-type="float" office:value="-2.3501762632198719E-3" table:style-name="ce1">
            <text:p>-0.002350176</text:p>
          </table:table-cell>
          <table:table-cell table:number-columns-repeated="16371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1">
            <text:p>Nov</text:p>
          </table:table-cell>
          <table:table-cell office:value-type="float" office:value="4826118" table:style-name="ce1">
            <text:p>4826118</text:p>
          </table:table-cell>
          <table:table-cell office:value-type="float" office:value="188926" table:style-name="ce1">
            <text:p>188926</text:p>
          </table:table-cell>
          <table:table-cell office:value-type="float" office:value="3.8" table:style-name="ce1">
            <text:p>3.8</text:p>
          </table:table-cell>
          <table:table-cell office:value-type="float" office:value="25.89" table:style-name="ce1">
            <text:p>25.89</text:p>
          </table:table-cell>
          <table:table-cell office:value-type="float" office:value="1.6096756532614201E-3" table:style-name="ce1">
            <text:p>0.001609676</text:p>
          </table:table-cell>
          <table:table-cell office:value-type="float" office:value="1.648998822143705E-2" table:style-name="ce1">
            <text:p>0.016489988</text:p>
          </table:table-cell>
          <table:table-cell office:value-type="float" office:value="0" table:style-name="ce1">
            <text:p>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Pre-COVID</text:p>
          </table:table-cell>
          <table:table-cell office:value-type="float" office:value="1.609675653261311E-3" table:style-name="ce1">
            <text:p>0.001609676</text:p>
          </table:table-cell>
          <table:table-cell office:value-type="float" office:value="1.6489988221437098E-2" table:style-name="ce1">
            <text:p>0.016489988</text:p>
          </table:table-cell>
          <table:table-cell table:number-columns-repeated="16371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1">
            <text:p>Dec</text:p>
          </table:table-cell>
          <table:table-cell office:value-type="float" office:value="4828806" table:style-name="ce1">
            <text:p>4828806</text:p>
          </table:table-cell>
          <table:table-cell office:value-type="float" office:value="187776" table:style-name="ce1">
            <text:p>187776</text:p>
          </table:table-cell>
          <table:table-cell office:value-type="float" office:value="3.7" table:style-name="ce1">
            <text:p>3.7</text:p>
          </table:table-cell>
          <table:table-cell office:value-type="float" office:value="26" table:style-name="ce1">
            <text:p>26</text:p>
          </table:table-cell>
          <table:table-cell office:value-type="float" office:value="5.5696939030500288E-4" table:style-name="ce1">
            <text:p>0.000556969</text:p>
          </table:table-cell>
          <table:table-cell office:value-type="float" office:value="4.2487446890691156E-3" table:style-name="ce1">
            <text:p>0.004248745</text:p>
          </table:table-cell>
          <table:table-cell office:value-type="float" office:value="-9.9999999999999645E-2" table:style-name="ce1">
            <text:p>-0.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Pre-COVID</text:p>
          </table:table-cell>
          <table:table-cell office:value-type="float" office:value="5.5696939030491777E-4" table:style-name="ce1">
            <text:p>0.000556969</text:p>
          </table:table-cell>
          <table:table-cell office:value-type="float" office:value="4.2487446890691061E-3" table:style-name="ce1">
            <text:p>0.004248745</text:p>
          </table:table-cell>
          <table:table-cell table:number-columns-repeated="16371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1">
            <text:p>Jan</text:p>
          </table:table-cell>
          <table:table-cell office:value-type="float" office:value="4825728" table:style-name="ce1">
            <text:p>4825728</text:p>
          </table:table-cell>
          <table:table-cell office:value-type="float" office:value="188048" table:style-name="ce1">
            <text:p>188048</text:p>
          </table:table-cell>
          <table:table-cell office:value-type="float" office:value="3.8" table:style-name="ce1">
            <text:p>3.8</text:p>
          </table:table-cell>
          <table:table-cell office:value-type="float" office:value="25.89" table:style-name="ce1">
            <text:p>25.89</text:p>
          </table:table-cell>
          <table:table-cell office:value-type="float" office:value="-6.3742465528745617E-4" table:style-name="ce1">
            <text:p>-0.000637425</text:p>
          </table:table-cell>
          <table:table-cell office:value-type="float" office:value="-4.230769230769209E-3" table:style-name="ce1">
            <text:p>-0.004230769</text:p>
          </table:table-cell>
          <table:table-cell office:value-type="float" office:value="9.9999999999999645E-2" table:style-name="ce1">
            <text:p>0.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COVID</text:p>
          </table:table-cell>
          <table:table-cell office:value-type="float" office:value="-6.3742465528748848E-4" table:style-name="ce1">
            <text:p>-0.000637425</text:p>
          </table:table-cell>
          <table:table-cell office:value-type="float" office:value="-4.2307692307692601E-3" table:style-name="ce1">
            <text:p>-0.004230769</text:p>
          </table:table-cell>
          <table:table-cell table:number-columns-repeated="16371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1">
            <text:p>Feb</text:p>
          </table:table-cell>
          <table:table-cell office:value-type="float" office:value="4819159" table:style-name="ce1">
            <text:p>4819159</text:p>
          </table:table-cell>
          <table:table-cell office:value-type="float" office:value="189758" table:style-name="ce1">
            <text:p>189758</text:p>
          </table:table-cell>
          <table:table-cell office:value-type="float" office:value="3.8" table:style-name="ce1">
            <text:p>3.8</text:p>
          </table:table-cell>
          <table:table-cell office:value-type="float" office:value="26.11" table:style-name="ce1">
            <text:p>26.11</text:p>
          </table:table-cell>
          <table:table-cell office:value-type="float" office:value="-1.3612453913689291E-3" table:style-name="ce1">
            <text:p>-0.001361245</text:p>
          </table:table-cell>
          <table:table-cell office:value-type="float" office:value="8.497489378138233E-3" table:style-name="ce1">
            <text:p>0.008497489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OVID</text:p>
          </table:table-cell>
          <table:table-cell office:value-type="float" office:value="-1.361245391368948E-3" table:style-name="ce1">
            <text:p>-0.001361245</text:p>
          </table:table-cell>
          <table:table-cell office:value-type="float" office:value="8.4974893781382121E-3" table:style-name="ce1">
            <text:p>0.008497489</text:p>
          </table:table-cell>
          <table:table-cell table:number-columns-repeated="16371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1">
            <text:p>Mar</text:p>
          </table:table-cell>
          <table:table-cell office:value-type="float" office:value="4594402" table:style-name="ce1">
            <text:p>4594402</text:p>
          </table:table-cell>
          <table:table-cell office:value-type="float" office:value="190616" table:style-name="ce1">
            <text:p>190616</text:p>
          </table:table-cell>
          <table:table-cell office:value-type="float" office:value="4" table:style-name="ce1">
            <text:p>4</text:p>
          </table:table-cell>
          <table:table-cell office:value-type="float" office:value="26.05" table:style-name="ce1">
            <text:p>26.05</text:p>
          </table:table-cell>
          <table:table-cell office:value-type="float" office:value="-4.6638220486188563E-2" table:style-name="ce1">
            <text:p>-0.04663822</text:p>
          </table:table-cell>
          <table:table-cell office:value-type="float" office:value="-2.2979701263883081E-3" table:style-name="ce1">
            <text:p>-0.00229797</text:p>
          </table:table-cell>
          <table:table-cell office:value-type="float" office:value="0.20000000000000021" table:style-name="ce1">
            <text:p>0.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COVID</text:p>
          </table:table-cell>
          <table:table-cell office:value-type="float" office:value="-4.6638220486188597E-2" table:style-name="ce1">
            <text:p>-0.04663822</text:p>
          </table:table-cell>
          <table:table-cell office:value-type="float" office:value="-2.2979701263883272E-3" table:style-name="ce1">
            <text:p>-0.00229797</text:p>
          </table:table-cell>
          <table:table-cell table:number-columns-repeated="16371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1">
            <text:p>Apr</text:p>
          </table:table-cell>
          <table:table-cell office:value-type="float" office:value="3969148" table:style-name="ce1">
            <text:p>3969148</text:p>
          </table:table-cell>
          <table:table-cell office:value-type="float" office:value="655990" table:style-name="ce1">
            <text:p>655990</text:p>
          </table:table-cell>
          <table:table-cell office:value-type="float" office:value="14.2" table:style-name="ce1">
            <text:p>14.2</text:p>
          </table:table-cell>
          <table:table-cell office:value-type="float" office:value="26.98" table:style-name="ce1">
            <text:p>26.98</text:p>
          </table:table-cell>
          <table:table-cell office:value-type="float" office:value="-0.13609039870694811" table:style-name="ce1">
            <text:p>-0.136090399</text:p>
          </table:table-cell>
          <table:table-cell office:value-type="float" office:value="3.5700575815738947E-2" table:style-name="ce1">
            <text:p>0.035700576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COVID</text:p>
          </table:table-cell>
          <table:table-cell office:value-type="float" office:value="-0.1360903987069482" table:style-name="ce1">
            <text:p>-0.136090399</text:p>
          </table:table-cell>
          <table:table-cell office:value-type="float" office:value="3.5700575815738933E-2" table:style-name="ce1">
            <text:p>0.035700576</text:p>
          </table:table-cell>
          <table:table-cell table:number-columns-repeated="16371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1">
            <text:p>May</text:p>
          </table:table-cell>
          <table:table-cell office:value-type="float" office:value="4208981" table:style-name="ce1">
            <text:p>4208981</text:p>
          </table:table-cell>
          <table:table-cell office:value-type="float" office:value="554524" table:style-name="ce1">
            <text:p>554524</text:p>
          </table:table-cell>
          <table:table-cell office:value-type="float" office:value="11.6" table:style-name="ce1">
            <text:p>11.6</text:p>
          </table:table-cell>
          <table:table-cell office:value-type="float" office:value="26.5" table:style-name="ce1">
            <text:p>26.5</text:p>
          </table:table-cell>
          <table:table-cell office:value-type="float" office:value="6.0424302646310997E-2" table:style-name="ce1">
            <text:p>0.060424303</text:p>
          </table:table-cell>
          <table:table-cell office:value-type="float" office:value="-1.7790956263899201E-2" table:style-name="ce1">
            <text:p>-0.017790956</text:p>
          </table:table-cell>
          <table:table-cell office:value-type="float" office:value="-2.6" table:style-name="ce1">
            <text:p>-2.6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COVID</text:p>
          </table:table-cell>
          <table:table-cell office:value-type="float" office:value="6.0424302646310928E-2" table:style-name="ce1">
            <text:p>0.060424303</text:p>
          </table:table-cell>
          <table:table-cell office:value-type="float" office:value="-1.7790956263899149E-2" table:style-name="ce1">
            <text:p>-0.017790956</text:p>
          </table:table-cell>
          <table:table-cell table:number-columns-repeated="16371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1">
            <text:p>Jun</text:p>
          </table:table-cell>
          <table:table-cell office:value-type="float" office:value="4299641" table:style-name="ce1">
            <text:p>4299641</text:p>
          </table:table-cell>
          <table:table-cell office:value-type="float" office:value="465189" table:style-name="ce1">
            <text:p>465189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26.04" table:style-name="ce1">
            <text:p>26.04</text:p>
          </table:table-cell>
          <table:table-cell office:value-type="float" office:value="2.1539655322749141E-2" table:style-name="ce1">
            <text:p>0.021539655</text:p>
          </table:table-cell>
          <table:table-cell office:value-type="float" office:value="-1.7358490566037769E-2" table:style-name="ce1">
            <text:p>-0.017358491</text:p>
          </table:table-cell>
          <table:table-cell office:value-type="float" office:value="-1.7999999999999989" table:style-name="ce1">
            <text:p>-1.8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COVID</text:p>
          </table:table-cell>
          <table:table-cell office:value-type="float" office:value="2.1539655322749152E-2" table:style-name="ce1">
            <text:p>0.021539655</text:p>
          </table:table-cell>
          <table:table-cell office:value-type="float" office:value="-1.735849056603778E-2" table:style-name="ce1">
            <text:p>-0.017358491</text:p>
          </table:table-cell>
          <table:table-cell table:number-columns-repeated="16371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1">
            <text:p>Jul</text:p>
          </table:table-cell>
          <table:table-cell office:value-type="float" office:value="4388197" table:style-name="ce1">
            <text:p>4388197</text:p>
          </table:table-cell>
          <table:table-cell office:value-type="float" office:value="419450" table:style-name="ce1">
            <text:p>419450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26.42" table:style-name="ce1">
            <text:p>26.42</text:p>
          </table:table-cell>
          <table:table-cell office:value-type="float" office:value="2.0596138142696101E-2" table:style-name="ce1">
            <text:p>0.020596138</text:p>
          </table:table-cell>
          <table:table-cell office:value-type="float" office:value="1.459293394777276E-2" table:style-name="ce1">
            <text:p>0.014592934</text:p>
          </table:table-cell>
          <table:table-cell office:value-type="float" office:value="-1.100000000000001" table:style-name="ce1">
            <text:p>-1.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COVID</text:p>
          </table:table-cell>
          <table:table-cell office:value-type="float" office:value="2.0596138142696011E-2" table:style-name="ce1">
            <text:p>0.020596138</text:p>
          </table:table-cell>
          <table:table-cell office:value-type="float" office:value="1.459293394777283E-2" table:style-name="ce1">
            <text:p>0.014592934</text:p>
          </table:table-cell>
          <table:table-cell table:number-columns-repeated="16371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1">
            <text:p>Aug</text:p>
          </table:table-cell>
          <table:table-cell office:value-type="float" office:value="4456139" table:style-name="ce1">
            <text:p>4456139</text:p>
          </table:table-cell>
          <table:table-cell office:value-type="float" office:value="354082" table:style-name="ce1">
            <text:p>354082</text:p>
          </table:table-cell>
          <table:table-cell office:value-type="float" office:value="7.4" table:style-name="ce1">
            <text:p>7.4</text:p>
          </table:table-cell>
          <table:table-cell office:value-type="float" office:value="26.71" table:style-name="ce1">
            <text:p>26.71</text:p>
          </table:table-cell>
          <table:table-cell office:value-type="float" office:value="1.548289650624163E-2" table:style-name="ce1">
            <text:p>0.015482897</text:p>
          </table:table-cell>
          <table:table-cell office:value-type="float" office:value="1.097653292959876E-2" table:style-name="ce1">
            <text:p>0.010976533</text:p>
          </table:table-cell>
          <table:table-cell office:value-type="float" office:value="-1.2999999999999989" table:style-name="ce1">
            <text:p>-1.3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COVID</text:p>
          </table:table-cell>
          <table:table-cell office:value-type="float" office:value="1.548289650624168E-2" table:style-name="ce1">
            <text:p>0.015482897</text:p>
          </table:table-cell>
          <table:table-cell office:value-type="float" office:value="1.097653292959877E-2" table:style-name="ce1">
            <text:p>0.010976533</text:p>
          </table:table-cell>
          <table:table-cell table:number-columns-repeated="16371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1">
            <text:p>Sep</text:p>
          </table:table-cell>
          <table:table-cell office:value-type="float" office:value="4511928" table:style-name="ce1">
            <text:p>4511928</text:p>
          </table:table-cell>
          <table:table-cell office:value-type="float" office:value="328890" table:style-name="ce1">
            <text:p>328890</text:p>
          </table:table-cell>
          <table:table-cell office:value-type="float" office:value="6.8" table:style-name="ce1">
            <text:p>6.8</text:p>
          </table:table-cell>
          <table:table-cell office:value-type="float" office:value="26.69" table:style-name="ce1">
            <text:p>26.69</text:p>
          </table:table-cell>
          <table:table-cell office:value-type="float" office:value="1.2519582535464001E-2" table:style-name="ce1">
            <text:p>0.012519583</text:p>
          </table:table-cell>
          <table:table-cell office:value-type="float" office:value="-7.4878322725569347E-4" table:style-name="ce1">
            <text:p>-0.000748783</text:p>
          </table:table-cell>
          <table:table-cell office:value-type="float" office:value="-0.60000000000000053" table:style-name="ce1">
            <text:p>-0.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COVID</text:p>
          </table:table-cell>
          <table:table-cell office:value-type="float" office:value="1.2519582535464041E-2" table:style-name="ce1">
            <text:p>0.012519583</text:p>
          </table:table-cell>
          <table:table-cell office:value-type="float" office:value="-7.4878322725568935E-4" table:style-name="ce1">
            <text:p>-0.000748783</text:p>
          </table:table-cell>
          <table:table-cell table:number-columns-repeated="16371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1">
            <text:p>Oct</text:p>
          </table:table-cell>
          <table:table-cell office:value-type="float" office:value="4546022" table:style-name="ce1">
            <text:p>4546022</text:p>
          </table:table-cell>
          <table:table-cell office:value-type="float" office:value="295007" table:style-name="ce1">
            <text:p>295007</text:p>
          </table:table-cell>
          <table:table-cell office:value-type="float" office:value="6.1" table:style-name="ce1">
            <text:p>6.1</text:p>
          </table:table-cell>
          <table:table-cell office:value-type="float" office:value="26.84" table:style-name="ce1">
            <text:p>26.84</text:p>
          </table:table-cell>
          <table:table-cell office:value-type="float" office:value="7.5564149073300817E-3" table:style-name="ce1">
            <text:p>0.007556415</text:p>
          </table:table-cell>
          <table:table-cell office:value-type="float" office:value="5.6200824278755564E-3" table:style-name="ce1">
            <text:p>0.005620082</text:p>
          </table:table-cell>
          <table:table-cell office:value-type="float" office:value="-0.70000000000000018" table:style-name="ce1">
            <text:p>-0.7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COVID</text:p>
          </table:table-cell>
          <table:table-cell office:value-type="float" office:value="7.5564149073301667E-3" table:style-name="ce1">
            <text:p>0.007556415</text:p>
          </table:table-cell>
          <table:table-cell office:value-type="float" office:value="5.6200824278755954E-3" table:style-name="ce1">
            <text:p>0.005620082</text:p>
          </table:table-cell>
          <table:table-cell table:number-columns-repeated="16371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1">
            <text:p>Nov</text:p>
          </table:table-cell>
          <table:table-cell office:value-type="float" office:value="4568785" table:style-name="ce1">
            <text:p>4568785</text:p>
          </table:table-cell>
          <table:table-cell office:value-type="float" office:value="284107" table:style-name="ce1">
            <text:p>284107</text:p>
          </table:table-cell>
          <table:table-cell office:value-type="float" office:value="5.9" table:style-name="ce1">
            <text:p>5.9</text:p>
          </table:table-cell>
          <table:table-cell office:value-type="float" office:value="27.19" table:style-name="ce1">
            <text:p>27.19</text:p>
          </table:table-cell>
          <table:table-cell office:value-type="float" office:value="5.0072348967954844E-3" table:style-name="ce1">
            <text:p>0.005007235</text:p>
          </table:table-cell>
          <table:table-cell office:value-type="float" office:value="1.304023845007457E-2" table:style-name="ce1">
            <text:p>0.013040238</text:p>
          </table:table-cell>
          <table:table-cell office:value-type="float" office:value="-0.19999999999999929" table:style-name="ce1">
            <text:p>-0.2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COVID</text:p>
          </table:table-cell>
          <table:table-cell office:value-type="float" office:value="5.0072348967955538E-3" table:style-name="ce1">
            <text:p>0.005007235</text:p>
          </table:table-cell>
          <table:table-cell office:value-type="float" office:value="1.304023845007451E-2" table:style-name="ce1">
            <text:p>0.013040238</text:p>
          </table:table-cell>
          <table:table-cell table:number-columns-repeated="16371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1">
            <text:p>Dec</text:p>
          </table:table-cell>
          <table:table-cell office:value-type="float" office:value="4581569" table:style-name="ce1">
            <text:p>4581569</text:p>
          </table:table-cell>
          <table:table-cell office:value-type="float" office:value="284412" table:style-name="ce1">
            <text:p>284412</text:p>
          </table:table-cell>
          <table:table-cell office:value-type="float" office:value="5.8" table:style-name="ce1">
            <text:p>5.8</text:p>
          </table:table-cell>
          <table:table-cell office:value-type="float" office:value="27.2" table:style-name="ce1">
            <text:p>27.2</text:p>
          </table:table-cell>
          <table:table-cell office:value-type="float" office:value="2.798118099232071E-3" table:style-name="ce1">
            <text:p>0.002798118</text:p>
          </table:table-cell>
          <table:table-cell office:value-type="float" office:value="3.6778227289437331E-4" table:style-name="ce1">
            <text:p>0.000367782</text:p>
          </table:table-cell>
          <table:table-cell office:value-type="float" office:value="-0.10000000000000051" table:style-name="ce1">
            <text:p>-0.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OVID</text:p>
          </table:table-cell>
          <table:table-cell office:value-type="float" office:value="2.798118099232028E-3" table:style-name="ce1">
            <text:p>0.002798118</text:p>
          </table:table-cell>
          <table:table-cell office:value-type="float" office:value="3.6778227289446802E-4" table:style-name="ce1">
            <text:p>0.000367782</text:p>
          </table:table-cell>
          <table:table-cell table:number-columns-repeated="16371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1">
            <text:p>Jan</text:p>
          </table:table-cell>
          <table:table-cell office:value-type="float" office:value="4598477" table:style-name="ce1">
            <text:p>4598477</text:p>
          </table:table-cell>
          <table:table-cell office:value-type="float" office:value="274707" table:style-name="ce1">
            <text:p>274707</text:p>
          </table:table-cell>
          <table:table-cell office:value-type="float" office:value="5.6" table:style-name="ce1">
            <text:p>5.6</text:p>
          </table:table-cell>
          <table:table-cell office:value-type="float" office:value="27.24" table:style-name="ce1">
            <text:p>27.24</text:p>
          </table:table-cell>
          <table:table-cell office:value-type="float" office:value="3.690438799459312E-3" table:style-name="ce1">
            <text:p>0.003690439</text:p>
          </table:table-cell>
          <table:table-cell office:value-type="float" office:value="1.470588235294086E-3" table:style-name="ce1">
            <text:p>0.001470588</text:p>
          </table:table-cell>
          <table:table-cell office:value-type="float" office:value="-0.20000000000000021" table:style-name="ce1">
            <text:p>-0.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Recovery</text:p>
          </table:table-cell>
          <table:table-cell office:value-type="float" office:value="3.6904387994594061E-3" table:style-name="ce1">
            <text:p>0.003690439</text:p>
          </table:table-cell>
          <table:table-cell office:value-type="float" office:value="1.470588235294112E-3" table:style-name="ce1">
            <text:p>0.001470588</text:p>
          </table:table-cell>
          <table:table-cell table:number-columns-repeated="16371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1">
            <text:p>Feb</text:p>
          </table:table-cell>
          <table:table-cell office:value-type="float" office:value="4604632" table:style-name="ce1">
            <text:p>4604632</text:p>
          </table:table-cell>
          <table:table-cell office:value-type="float" office:value="268651" table:style-name="ce1">
            <text:p>268651</text:p>
          </table:table-cell>
          <table:table-cell office:value-type="float" office:value="5.5" table:style-name="ce1">
            <text:p>5.5</text:p>
          </table:table-cell>
          <table:table-cell office:value-type="float" office:value="27.36" table:style-name="ce1">
            <text:p>27.36</text:p>
          </table:table-cell>
          <table:table-cell office:value-type="float" office:value="1.3384866337267749E-3" table:style-name="ce1">
            <text:p>0.001338487</text:p>
          </table:table-cell>
          <table:table-cell office:value-type="float" office:value="4.4052863436123716E-3" table:style-name="ce1">
            <text:p>0.004405286</text:p>
          </table:table-cell>
          <table:table-cell office:value-type="float" office:value="-9.9999999999999645E-2" table:style-name="ce1">
            <text:p>-0.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Recovery</text:p>
          </table:table-cell>
          <table:table-cell office:value-type="float" office:value="1.3384866337267101E-3" table:style-name="ce1">
            <text:p>0.001338487</text:p>
          </table:table-cell>
          <table:table-cell office:value-type="float" office:value="4.405286343612369E-3" table:style-name="ce1">
            <text:p>0.004405286</text:p>
          </table:table-cell>
          <table:table-cell table:number-columns-repeated="16371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1">
            <text:p>Mar</text:p>
          </table:table-cell>
          <table:table-cell office:value-type="float" office:value="4613408" table:style-name="ce1">
            <text:p>4613408</text:p>
          </table:table-cell>
          <table:table-cell office:value-type="float" office:value="263940" table:style-name="ce1">
            <text:p>263940</text:p>
          </table:table-cell>
          <table:table-cell office:value-type="float" office:value="5.4" table:style-name="ce1">
            <text:p>5.4</text:p>
          </table:table-cell>
          <table:table-cell office:value-type="float" office:value="26.92" table:style-name="ce1">
            <text:p>26.92</text:p>
          </table:table-cell>
          <table:table-cell office:value-type="float" office:value="1.9059069215520369E-3" table:style-name="ce1">
            <text:p>0.001905907</text:p>
          </table:table-cell>
          <table:table-cell office:value-type="float" office:value="-1.6081871345029159E-2" table:style-name="ce1">
            <text:p>-0.016081871</text:p>
          </table:table-cell>
          <table:table-cell office:value-type="float" office:value="-9.9999999999999645E-2" table:style-name="ce1">
            <text:p>-0.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Recovery</text:p>
          </table:table-cell>
          <table:table-cell office:value-type="float" office:value="1.9059069215521249E-3" table:style-name="ce1">
            <text:p>0.001905907</text:p>
          </table:table-cell>
          <table:table-cell office:value-type="float" office:value="-1.6081871345029142E-2" table:style-name="ce1">
            <text:p>-0.016081871</text:p>
          </table:table-cell>
          <table:table-cell table:number-columns-repeated="16371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1">
            <text:p>Apr</text:p>
          </table:table-cell>
          <table:table-cell office:value-type="float" office:value="4623125" table:style-name="ce1">
            <text:p>4623125</text:p>
          </table:table-cell>
          <table:table-cell office:value-type="float" office:value="258355" table:style-name="ce1">
            <text:p>258355</text:p>
          </table:table-cell>
          <table:table-cell office:value-type="float" office:value="5.3" table:style-name="ce1">
            <text:p>5.3</text:p>
          </table:table-cell>
          <table:table-cell office:value-type="float" office:value="27.32" table:style-name="ce1">
            <text:p>27.32</text:p>
          </table:table-cell>
          <table:table-cell office:value-type="float" office:value="2.1062520375392771E-3" table:style-name="ce1">
            <text:p>0.002106252</text:p>
          </table:table-cell>
          <table:table-cell office:value-type="float" office:value="1.4858841010401131E-2" table:style-name="ce1">
            <text:p>0.014858841</text:p>
          </table:table-cell>
          <table:table-cell office:value-type="float" office:value="-0.10000000000000051" table:style-name="ce1">
            <text:p>-0.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Recovery</text:p>
          </table:table-cell>
          <table:table-cell office:value-type="float" office:value="2.1062520375392251E-3" table:style-name="ce1">
            <text:p>0.002106252</text:p>
          </table:table-cell>
          <table:table-cell office:value-type="float" office:value="1.4858841010401139E-2" table:style-name="ce1">
            <text:p>0.014858841</text:p>
          </table:table-cell>
          <table:table-cell table:number-columns-repeated="16371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1">
            <text:p>May</text:p>
          </table:table-cell>
          <table:table-cell office:value-type="float" office:value="4633224" table:style-name="ce1">
            <text:p>4633224</text:p>
          </table:table-cell>
          <table:table-cell office:value-type="float" office:value="251475" table:style-name="ce1">
            <text:p>251475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27.81" table:style-name="ce1">
            <text:p>27.81</text:p>
          </table:table-cell>
          <table:table-cell office:value-type="float" office:value="2.184453156685143E-3" table:style-name="ce1">
            <text:p>0.002184453</text:p>
          </table:table-cell>
          <table:table-cell office:value-type="float" office:value="1.793557833089306E-2" table:style-name="ce1">
            <text:p>0.017935578</text:p>
          </table:table-cell>
          <table:table-cell office:value-type="float" office:value="-0.20000000000000021" table:style-name="ce1">
            <text:p>-0.2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Recovery</text:p>
          </table:table-cell>
          <table:table-cell office:value-type="float" office:value="2.184453156685251E-3" table:style-name="ce1">
            <text:p>0.002184453</text:p>
          </table:table-cell>
          <table:table-cell office:value-type="float" office:value="1.7935578330892991E-2" table:style-name="ce1">
            <text:p>0.017935578</text:p>
          </table:table-cell>
          <table:table-cell table:number-columns-repeated="16371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1">
            <text:p>Jun</text:p>
          </table:table-cell>
          <table:table-cell office:value-type="float" office:value="4668688" table:style-name="ce1">
            <text:p>4668688</text:p>
          </table:table-cell>
          <table:table-cell office:value-type="float" office:value="248450" table:style-name="ce1">
            <text:p>248450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27.73" table:style-name="ce1">
            <text:p>27.73</text:p>
          </table:table-cell>
          <table:table-cell office:value-type="float" office:value="7.6542813384373387E-3" table:style-name="ce1">
            <text:p>0.007654281</text:p>
          </table:table-cell>
          <table:table-cell office:value-type="float" office:value="-2.8766630708377669E-3" table:style-name="ce1">
            <text:p>-0.002876663</text:p>
          </table:table-cell>
          <table:table-cell office:value-type="float" office:value="0" table:style-name="ce1">
            <text:p>0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Recovery</text:p>
          </table:table-cell>
          <table:table-cell office:value-type="float" office:value="7.6542813384372632E-3" table:style-name="ce1">
            <text:p>0.007654281</text:p>
          </table:table-cell>
          <table:table-cell office:value-type="float" office:value="-2.876663070837782E-3" table:style-name="ce1">
            <text:p>-0.002876663</text:p>
          </table:table-cell>
          <table:table-cell table:number-columns-repeated="16371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1">
            <text:p>Jul</text:p>
          </table:table-cell>
          <table:table-cell office:value-type="float" office:value="4703754" table:style-name="ce1">
            <text:p>4703754</text:p>
          </table:table-cell>
          <table:table-cell office:value-type="float" office:value="240458" table:style-name="ce1">
            <text:p>240458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28.05" table:style-name="ce1">
            <text:p>28.05</text:p>
          </table:table-cell>
          <table:table-cell office:value-type="float" office:value="7.5108895689752668E-3" table:style-name="ce1">
            <text:p>0.00751089</text:p>
          </table:table-cell>
          <table:table-cell office:value-type="float" office:value="1.153984853948793E-2" table:style-name="ce1">
            <text:p>0.011539849</text:p>
          </table:table-cell>
          <table:table-cell office:value-type="float" office:value="-0.19999999999999929" table:style-name="ce1">
            <text:p>-0.2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Recovery</text:p>
          </table:table-cell>
          <table:table-cell office:value-type="float" office:value="7.5108895689752764E-3" table:style-name="ce1">
            <text:p>0.00751089</text:p>
          </table:table-cell>
          <table:table-cell office:value-type="float" office:value="1.153984853948797E-2" table:style-name="ce1">
            <text:p>0.011539849</text:p>
          </table:table-cell>
          <table:table-cell table:number-columns-repeated="16371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1">
            <text:p>Aug</text:p>
          </table:table-cell>
          <table:table-cell office:value-type="float" office:value="4741545" table:style-name="ce1">
            <text:p>4741545</text:p>
          </table:table-cell>
          <table:table-cell office:value-type="float" office:value="233532" table:style-name="ce1">
            <text:p>233532</text:p>
          </table:table-cell>
          <table:table-cell office:value-type="float" office:value="4.7" table:style-name="ce1">
            <text:p>4.7</text:p>
          </table:table-cell>
          <table:table-cell office:value-type="float" office:value="28.54" table:style-name="ce1">
            <text:p>28.54</text:p>
          </table:table-cell>
          <table:table-cell office:value-type="float" office:value="8.0342211773830018E-3" table:style-name="ce1">
            <text:p>0.008034221</text:p>
          </table:table-cell>
          <table:table-cell office:value-type="float" office:value="1.7468805704099769E-2" table:style-name="ce1">
            <text:p>0.017468806</text:p>
          </table:table-cell>
          <table:table-cell office:value-type="float" office:value="-0.20000000000000021" table:style-name="ce1">
            <text:p>-0.2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Recovery</text:p>
          </table:table-cell>
          <table:table-cell office:value-type="float" office:value="8.0342211773829497E-3" table:style-name="ce1">
            <text:p>0.008034221</text:p>
          </table:table-cell>
          <table:table-cell office:value-type="float" office:value="1.7468805704099699E-2" table:style-name="ce1">
            <text:p>0.017468806</text:p>
          </table:table-cell>
          <table:table-cell table:number-columns-repeated="16371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1">
            <text:p>Sep</text:p>
          </table:table-cell>
          <table:table-cell office:value-type="float" office:value="4781795" table:style-name="ce1">
            <text:p>4781795</text:p>
          </table:table-cell>
          <table:table-cell office:value-type="float" office:value="223116" table:style-name="ce1">
            <text:p>223116</text:p>
          </table:table-cell>
          <table:table-cell office:value-type="float" office:value="4.5" table:style-name="ce1">
            <text:p>4.5</text:p>
          </table:table-cell>
          <table:table-cell office:value-type="float" office:value="28.48" table:style-name="ce1">
            <text:p>28.48</text:p>
          </table:table-cell>
          <table:table-cell office:value-type="float" office:value="8.4887942643168002E-3" table:style-name="ce1">
            <text:p>0.008488794</text:p>
          </table:table-cell>
          <table:table-cell office:value-type="float" office:value="-2.1023125437981331E-3" table:style-name="ce1">
            <text:p>-0.002102313</text:p>
          </table:table-cell>
          <table:table-cell office:value-type="float" office:value="-0.20000000000000021" table:style-name="ce1">
            <text:p>-0.2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Recovery</text:p>
          </table:table-cell>
          <table:table-cell office:value-type="float" office:value="8.4887942643168124E-3" table:style-name="ce1">
            <text:p>0.008488794</text:p>
          </table:table-cell>
          <table:table-cell office:value-type="float" office:value="-2.1023125437981132E-3" table:style-name="ce1">
            <text:p>-0.002102313</text:p>
          </table:table-cell>
          <table:table-cell table:number-columns-repeated="16371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1">
            <text:p>Oct</text:p>
          </table:table-cell>
          <table:table-cell office:value-type="float" office:value="4826655" table:style-name="ce1">
            <text:p>4826655</text:p>
          </table:table-cell>
          <table:table-cell office:value-type="float" office:value="214212" table:style-name="ce1">
            <text:p>214212</text:p>
          </table:table-cell>
          <table:table-cell office:value-type="float" office:value="4.2" table:style-name="ce1">
            <text:p>4.2</text:p>
          </table:table-cell>
          <table:table-cell office:value-type="float" office:value="28.68" table:style-name="ce1">
            <text:p>28.68</text:p>
          </table:table-cell>
          <table:table-cell office:value-type="float" office:value="9.381414301533211E-3" table:style-name="ce1">
            <text:p>0.009381414</text:p>
          </table:table-cell>
          <table:table-cell office:value-type="float" office:value="7.0224719101123342E-3" table:style-name="ce1">
            <text:p>0.007022472</text:p>
          </table:table-cell>
          <table:table-cell office:value-type="float" office:value="-0.29999999999999982" table:style-name="ce1">
            <text:p>-0.3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Recovery</text:p>
          </table:table-cell>
          <table:table-cell office:value-type="float" office:value="9.3814143015331641E-3" table:style-name="ce1">
            <text:p>0.009381414</text:p>
          </table:table-cell>
          <table:table-cell office:value-type="float" office:value="7.0224719101124036E-3" table:style-name="ce1">
            <text:p>0.007022472</text:p>
          </table:table-cell>
          <table:table-cell table:number-columns-repeated="16371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1">
            <text:p>Nov</text:p>
          </table:table-cell>
          <table:table-cell office:value-type="float" office:value="4873013" table:style-name="ce1">
            <text:p>4873013</text:p>
          </table:table-cell>
          <table:table-cell office:value-type="float" office:value="205268" table:style-name="ce1">
            <text:p>205268</text:p>
          </table:table-cell>
          <table:table-cell office:value-type="float" office:value="4" table:style-name="ce1">
            <text:p>4</text:p>
          </table:table-cell>
          <table:table-cell office:value-type="float" office:value="28.99" table:style-name="ce1">
            <text:p>28.99</text:p>
          </table:table-cell>
          <table:table-cell office:value-type="float" office:value="9.6045812265430196E-3" table:style-name="ce1">
            <text:p>0.009604581</text:p>
          </table:table-cell>
          <table:table-cell office:value-type="float" office:value="1.080892608089256E-2" table:style-name="ce1">
            <text:p>0.010808926</text:p>
          </table:table-cell>
          <table:table-cell office:value-type="float" office:value="-0.20000000000000021" table:style-name="ce1">
            <text:p>-0.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Recovery</text:p>
          </table:table-cell>
          <table:table-cell office:value-type="float" office:value="9.604581226543063E-3" table:style-name="ce1">
            <text:p>0.009604581</text:p>
          </table:table-cell>
          <table:table-cell office:value-type="float" office:value="1.080892608089257E-2" table:style-name="ce1">
            <text:p>0.010808926</text:p>
          </table:table-cell>
          <table:table-cell table:number-columns-repeated="16371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1">
            <text:p>Dec</text:p>
          </table:table-cell>
          <table:table-cell office:value-type="float" office:value="4919430" table:style-name="ce1">
            <text:p>4919430</text:p>
          </table:table-cell>
          <table:table-cell office:value-type="float" office:value="196514" table:style-name="ce1">
            <text:p>196514</text:p>
          </table:table-cell>
          <table:table-cell office:value-type="float" office:value="3.8" table:style-name="ce1">
            <text:p>3.8</text:p>
          </table:table-cell>
          <table:table-cell office:value-type="float" office:value="29.17" table:style-name="ce1">
            <text:p>29.17</text:p>
          </table:table-cell>
          <table:table-cell office:value-type="float" office:value="9.5253183194873477E-3" table:style-name="ce1">
            <text:p>0.009525318</text:p>
          </table:table-cell>
          <table:table-cell office:value-type="float" office:value="6.2090375991722411E-3" table:style-name="ce1">
            <text:p>0.006209038</text:p>
          </table:table-cell>
          <table:table-cell office:value-type="float" office:value="-0.20000000000000021" table:style-name="ce1">
            <text:p>-0.2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Recovery</text:p>
          </table:table-cell>
          <table:table-cell office:value-type="float" office:value="9.5253183194874413E-3" table:style-name="ce1">
            <text:p>0.009525318</text:p>
          </table:table-cell>
          <table:table-cell office:value-type="float" office:value="6.2090375991723512E-3" table:style-name="ce1">
            <text:p>0.006209038</text:p>
          </table:table-cell>
          <table:table-cell table:number-columns-repeated="16371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string" table:style-name="ce1">
            <text:p>Jan</text:p>
          </table:table-cell>
          <table:table-cell office:value-type="float" office:value="4963886" table:style-name="ce1">
            <text:p>4963886</text:p>
          </table:table-cell>
          <table:table-cell office:value-type="float" office:value="192197" table:style-name="ce1">
            <text:p>192197</text:p>
          </table:table-cell>
          <table:table-cell office:value-type="float" office:value="3.7" table:style-name="ce1">
            <text:p>3.7</text:p>
          </table:table-cell>
          <table:table-cell office:value-type="float" office:value="29.82" table:style-name="ce1">
            <text:p>29.82</text:p>
          </table:table-cell>
          <table:table-cell office:value-type="float" office:value="9.0368193063017459E-3" table:style-name="ce1">
            <text:p>0.009036819</text:p>
          </table:table-cell>
          <table:table-cell office:value-type="float" office:value="2.2283167637984179E-2" table:style-name="ce1">
            <text:p>0.022283168</text:p>
          </table:table-cell>
          <table:table-cell office:value-type="float" office:value="-9.9999999999999645E-2" table:style-name="ce1">
            <text:p>-0.1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Recovery</text:p>
          </table:table-cell>
          <table:table-cell office:value-type="float" office:value="9.0368193063017355E-3" table:style-name="ce1">
            <text:p>0.009036819</text:p>
          </table:table-cell>
          <table:table-cell office:value-type="float" office:value="2.228316763798421E-2" table:style-name="ce1">
            <text:p>0.022283168</text:p>
          </table:table-cell>
          <table:table-cell table:number-columns-repeated="16371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string" table:style-name="ce1">
            <text:p>Feb</text:p>
          </table:table-cell>
          <table:table-cell office:value-type="float" office:value="4977770" table:style-name="ce1">
            <text:p>4977770</text:p>
          </table:table-cell>
          <table:table-cell office:value-type="float" office:value="187842" table:style-name="ce1">
            <text:p>187842</text:p>
          </table:table-cell>
          <table:table-cell office:value-type="float" office:value="3.6" table:style-name="ce1">
            <text:p>3.6</text:p>
          </table:table-cell>
          <table:table-cell office:value-type="float" office:value="29.42" table:style-name="ce1">
            <text:p>29.42</text:p>
          </table:table-cell>
          <table:table-cell office:value-type="float" office:value="2.7970021873991459E-3" table:style-name="ce1">
            <text:p>0.002797002</text:p>
          </table:table-cell>
          <table:table-cell office:value-type="float" office:value="-1.3413816230717589E-2" table:style-name="ce1">
            <text:p>-0.013413816</text:p>
          </table:table-cell>
          <table:table-cell office:value-type="float" office:value="-0.1000000000000001" table:style-name="ce1">
            <text:p>-0.1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Recovery</text:p>
          </table:table-cell>
          <table:table-cell office:value-type="float" office:value="2.7970021873990891E-3" table:style-name="ce1">
            <text:p>0.002797002</text:p>
          </table:table-cell>
          <table:table-cell office:value-type="float" office:value="-1.3413816230717581E-2" table:style-name="ce1">
            <text:p>-0.013413816</text:p>
          </table:table-cell>
          <table:table-cell table:number-columns-repeated="16371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string" table:style-name="ce1">
            <text:p>Mar</text:p>
          </table:table-cell>
          <table:table-cell office:value-type="float" office:value="4987806" table:style-name="ce1">
            <text:p>4987806</text:p>
          </table:table-cell>
          <table:table-cell office:value-type="float" office:value="186004" table:style-name="ce1">
            <text:p>186004</text:p>
          </table:table-cell>
          <table:table-cell office:value-type="float" office:value="3.6" table:style-name="ce1">
            <text:p>3.6</text:p>
          </table:table-cell>
          <table:table-cell office:value-type="float" office:value="29.57" table:style-name="ce1">
            <text:p>29.57</text:p>
          </table:table-cell>
          <table:table-cell office:value-type="float" office:value="2.0161638645417521E-3" table:style-name="ce1">
            <text:p>0.002016164</text:p>
          </table:table-cell>
          <table:table-cell office:value-type="float" office:value="5.0985723997280276E-3" table:style-name="ce1">
            <text:p>0.005098572</text:p>
          </table:table-cell>
          <table:table-cell office:value-type="float" office:value="0" table:style-name="ce1">
            <text:p>0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Recovery</text:p>
          </table:table-cell>
          <table:table-cell office:value-type="float" office:value="2.0161638645417308E-3" table:style-name="ce1">
            <text:p>0.002016164</text:p>
          </table:table-cell>
          <table:table-cell office:value-type="float" office:value="5.0985723997281074E-3" table:style-name="ce1">
            <text:p>0.005098572</text:p>
          </table:table-cell>
          <table:table-cell table:number-columns-repeated="16371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string" table:style-name="ce1">
            <text:p>Apr</text:p>
          </table:table-cell>
          <table:table-cell office:value-type="float" office:value="4995004" table:style-name="ce1">
            <text:p>4995004</text:p>
          </table:table-cell>
          <table:table-cell office:value-type="float" office:value="186150" table:style-name="ce1">
            <text:p>186150</text:p>
          </table:table-cell>
          <table:table-cell office:value-type="float" office:value="3.6" table:style-name="ce1">
            <text:p>3.6</text:p>
          </table:table-cell>
          <table:table-cell office:value-type="float" office:value="29.32" table:style-name="ce1">
            <text:p>29.32</text:p>
          </table:table-cell>
          <table:table-cell office:value-type="float" office:value="1.443119479787305E-3" table:style-name="ce1">
            <text:p>0.001443119</text:p>
          </table:table-cell>
          <table:table-cell office:value-type="float" office:value="-8.4545147108555964E-3" table:style-name="ce1">
            <text:p>-0.008454515</text:p>
          </table:table-cell>
          <table:table-cell office:value-type="float" office:value="0" table:style-name="ce1">
            <text:p>0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Recovery</text:p>
          </table:table-cell>
          <table:table-cell office:value-type="float" office:value="1.443119479787258E-3" table:style-name="ce1">
            <text:p>0.001443119</text:p>
          </table:table-cell>
          <table:table-cell office:value-type="float" office:value="-8.4545147108555652E-3" table:style-name="ce1">
            <text:p>-0.008454515</text:p>
          </table:table-cell>
          <table:table-cell table:number-columns-repeated="16371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string" table:style-name="ce1">
            <text:p>May</text:p>
          </table:table-cell>
          <table:table-cell office:value-type="float" office:value="5000217" table:style-name="ce1">
            <text:p>5000217</text:p>
          </table:table-cell>
          <table:table-cell office:value-type="float" office:value="187901" table:style-name="ce1">
            <text:p>187901</text:p>
          </table:table-cell>
          <table:table-cell office:value-type="float" office:value="3.6" table:style-name="ce1">
            <text:p>3.6</text:p>
          </table:table-cell>
          <table:table-cell office:value-type="float" office:value="29.63" table:style-name="ce1">
            <text:p>29.63</text:p>
          </table:table-cell>
          <table:table-cell office:value-type="float" office:value="1.043642807893647E-3" table:style-name="ce1">
            <text:p>0.001043643</text:p>
          </table:table-cell>
          <table:table-cell office:value-type="float" office:value="1.0572987721691631E-2" table:style-name="ce1">
            <text:p>0.010572988</text:p>
          </table:table-cell>
          <table:table-cell office:value-type="float" office:value="0" table:style-name="ce1">
            <text:p>0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Recovery</text:p>
          </table:table-cell>
          <table:table-cell office:value-type="float" office:value="1.0436428078937081E-3" table:style-name="ce1">
            <text:p>0.001043643</text:p>
          </table:table-cell>
          <table:table-cell office:value-type="float" office:value="1.057298772169157E-2" table:style-name="ce1">
            <text:p>0.010572988</text:p>
          </table:table-cell>
          <table:table-cell table:number-columns-repeated="16371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string" table:style-name="ce1">
            <text:p>Jun</text:p>
          </table:table-cell>
          <table:table-cell office:value-type="float" office:value="5002915" table:style-name="ce1">
            <text:p>5002915</text:p>
          </table:table-cell>
          <table:table-cell office:value-type="float" office:value="190408" table:style-name="ce1">
            <text:p>190408</text:p>
          </table:table-cell>
          <table:table-cell office:value-type="float" office:value="3.7" table:style-name="ce1">
            <text:p>3.7</text:p>
          </table:table-cell>
          <table:table-cell office:value-type="float" office:value="29.3" table:style-name="ce1">
            <text:p>29.3</text:p>
          </table:table-cell>
          <table:table-cell office:value-type="float" office:value="5.3957658237632484E-4" table:style-name="ce1">
            <text:p>0.000539577</text:p>
          </table:table-cell>
          <table:table-cell office:value-type="float" office:value="-1.1137360782990159E-2" table:style-name="ce1">
            <text:p>-0.011137361</text:p>
          </table:table-cell>
          <table:table-cell office:value-type="float" office:value="0.1000000000000001" table:style-name="ce1">
            <text:p>0.1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Recovery</text:p>
          </table:table-cell>
          <table:table-cell office:value-type="float" office:value="5.3957658237635542E-4" table:style-name="ce1">
            <text:p>0.000539577</text:p>
          </table:table-cell>
          <table:table-cell office:value-type="float" office:value="-1.1137360782990101E-2" table:style-name="ce1">
            <text:p>-0.011137361</text:p>
          </table:table-cell>
          <table:table-cell table:number-columns-repeated="16371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string" table:style-name="ce1">
            <text:p>Jul</text:p>
          </table:table-cell>
          <table:table-cell office:value-type="float" office:value="5002637" table:style-name="ce1">
            <text:p>5002637</text:p>
          </table:table-cell>
          <table:table-cell office:value-type="float" office:value="192935" table:style-name="ce1">
            <text:p>192935</text:p>
          </table:table-cell>
          <table:table-cell office:value-type="float" office:value="3.7" table:style-name="ce1">
            <text:p>3.7</text:p>
          </table:table-cell>
          <table:table-cell office:value-type="float" office:value="29.96" table:style-name="ce1">
            <text:p>29.96</text:p>
          </table:table-cell>
          <table:table-cell office:value-type="float" office:value="-5.5567604086817378E-5" table:style-name="ce1">
            <text:p>-5.55676E-05</text:p>
          </table:table-cell>
          <table:table-cell office:value-type="float" office:value="2.2525597269624581E-2" table:style-name="ce1">
            <text:p>0.022525597</text:p>
          </table:table-cell>
          <table:table-cell office:value-type="float" office:value="0" table:style-name="ce1">
            <text:p>0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Recovery</text:p>
          </table:table-cell>
          <table:table-cell office:value-type="float" office:value="-5.5567604086870233E-5" table:style-name="ce1">
            <text:p>-5.55676E-05</text:p>
          </table:table-cell>
          <table:table-cell office:value-type="float" office:value="2.252559726962455E-2" table:style-name="ce1">
            <text:p>0.022525597</text:p>
          </table:table-cell>
          <table:table-cell table:number-columns-repeated="16371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string" table:style-name="ce1">
            <text:p>Aug</text:p>
          </table:table-cell>
          <table:table-cell office:value-type="float" office:value="5001656" table:style-name="ce1">
            <text:p>5001656</text:p>
          </table:table-cell>
          <table:table-cell office:value-type="float" office:value="195403" table:style-name="ce1">
            <text:p>195403</text:p>
          </table:table-cell>
          <table:table-cell office:value-type="float" office:value="3.8" table:style-name="ce1">
            <text:p>3.8</text:p>
          </table:table-cell>
          <table:table-cell office:value-type="float" office:value="30.21" table:style-name="ce1">
            <text:p>30.21</text:p>
          </table:table-cell>
          <table:table-cell office:value-type="float" office:value="-1.9609657866441241E-4" table:style-name="ce1">
            <text:p>-0.000196097</text:p>
          </table:table-cell>
          <table:table-cell office:value-type="float" office:value="8.3444592790387177E-3" table:style-name="ce1">
            <text:p>0.008344459</text:p>
          </table:table-cell>
          <table:table-cell office:value-type="float" office:value="9.9999999999999645E-2" table:style-name="ce1">
            <text:p>0.1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Recovery</text:p>
          </table:table-cell>
          <table:table-cell office:value-type="float" office:value="-1.9609657866437311E-4" table:style-name="ce1">
            <text:p>-0.000196097</text:p>
          </table:table-cell>
          <table:table-cell office:value-type="float" office:value="8.3444592790387073E-3" table:style-name="ce1">
            <text:p>0.008344459</text:p>
          </table:table-cell>
          <table:table-cell table:number-columns-repeated="16371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string" table:style-name="ce1">
            <text:p>Sep</text:p>
          </table:table-cell>
          <table:table-cell office:value-type="float" office:value="5003001" table:style-name="ce1">
            <text:p>5003001</text:p>
          </table:table-cell>
          <table:table-cell office:value-type="float" office:value="195556" table:style-name="ce1">
            <text:p>195556</text:p>
          </table:table-cell>
          <table:table-cell office:value-type="float" office:value="3.8" table:style-name="ce1">
            <text:p>3.8</text:p>
          </table:table-cell>
          <table:table-cell office:value-type="float" office:value="30.22" table:style-name="ce1">
            <text:p>30.22</text:p>
          </table:table-cell>
          <table:table-cell office:value-type="float" office:value="2.6891093669776571E-4" table:style-name="ce1">
            <text:p>0.000268911</text:p>
          </table:table-cell>
          <table:table-cell office:value-type="float" office:value="3.3101621979470409E-4" table:style-name="ce1">
            <text:p>0.000331016</text:p>
          </table:table-cell>
          <table:table-cell office:value-type="float" office:value="0" table:style-name="ce1">
            <text:p>0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Recovery</text:p>
          </table:table-cell>
          <table:table-cell office:value-type="float" office:value="2.6891093669778598E-4" table:style-name="ce1">
            <text:p>0.000268911</text:p>
          </table:table-cell>
          <table:table-cell office:value-type="float" office:value="3.3101621979469981E-4" table:style-name="ce1">
            <text:p>0.000331016</text:p>
          </table:table-cell>
          <table:table-cell table:number-columns-repeated="16371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string" table:style-name="ce1">
            <text:p>Oct</text:p>
          </table:table-cell>
          <table:table-cell office:value-type="float" office:value="5008217" table:style-name="ce1">
            <text:p>5008217</text:p>
          </table:table-cell>
          <table:table-cell office:value-type="float" office:value="194928" table:style-name="ce1">
            <text:p>194928</text:p>
          </table:table-cell>
          <table:table-cell office:value-type="float" office:value="3.7" table:style-name="ce1">
            <text:p>3.7</text:p>
          </table:table-cell>
          <table:table-cell office:value-type="float" office:value="30.8" table:style-name="ce1">
            <text:p>30.8</text:p>
          </table:table-cell>
          <table:table-cell office:value-type="float" office:value="1.0425742469369881E-3" table:style-name="ce1">
            <text:p>0.001042574</text:p>
          </table:table-cell>
          <table:table-cell office:value-type="float" office:value="1.919258769027141E-2" table:style-name="ce1">
            <text:p>0.019192588</text:p>
          </table:table-cell>
          <table:table-cell office:value-type="float" office:value="-9.9999999999999645E-2" table:style-name="ce1">
            <text:p>-0.1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Recovery</text:p>
          </table:table-cell>
          <table:table-cell office:value-type="float" office:value="1.042574246936878E-3" table:style-name="ce1">
            <text:p>0.001042574</text:p>
          </table:table-cell>
          <table:table-cell office:value-type="float" office:value="1.9192587690271431E-2" table:style-name="ce1">
            <text:p>0.019192588</text:p>
          </table:table-cell>
          <table:table-cell table:number-columns-repeated="16371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string" table:style-name="ce1">
            <text:p>Nov</text:p>
          </table:table-cell>
          <table:table-cell office:value-type="float" office:value="5017693" table:style-name="ce1">
            <text:p>5017693</text:p>
          </table:table-cell>
          <table:table-cell office:value-type="float" office:value="192694" table:style-name="ce1">
            <text:p>192694</text:p>
          </table:table-cell>
          <table:table-cell office:value-type="float" office:value="3.7" table:style-name="ce1">
            <text:p>3.7</text:p>
          </table:table-cell>
          <table:table-cell office:value-type="float" office:value="30.49" table:style-name="ce1">
            <text:p>30.49</text:p>
          </table:table-cell>
          <table:table-cell office:value-type="float" office:value="1.8920905384091781E-3" table:style-name="ce1">
            <text:p>0.001892091</text:p>
          </table:table-cell>
          <table:table-cell office:value-type="float" office:value="-1.0064935064935139E-2" table:style-name="ce1">
            <text:p>-0.010064935</text:p>
          </table:table-cell>
          <table:table-cell office:value-type="float" office:value="0" table:style-name="ce1">
            <text:p>0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Recovery</text:p>
          </table:table-cell>
          <table:table-cell office:value-type="float" office:value="1.892090538409219E-3" table:style-name="ce1">
            <text:p>0.001892091</text:p>
          </table:table-cell>
          <table:table-cell office:value-type="float" office:value="-1.006493506493511E-2" table:style-name="ce1">
            <text:p>-0.010064935</text:p>
          </table:table-cell>
          <table:table-cell table:number-columns-repeated="16371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string" table:style-name="ce1">
            <text:p>Dec</text:p>
          </table:table-cell>
          <table:table-cell office:value-type="float" office:value="5030574" table:style-name="ce1">
            <text:p>5030574</text:p>
          </table:table-cell>
          <table:table-cell office:value-type="float" office:value="189474" table:style-name="ce1">
            <text:p>189474</text:p>
          </table:table-cell>
          <table:table-cell office:value-type="float" office:value="3.6" table:style-name="ce1">
            <text:p>3.6</text:p>
          </table:table-cell>
          <table:table-cell office:value-type="float" office:value="30.62" table:style-name="ce1">
            <text:p>30.62</text:p>
          </table:table-cell>
          <table:table-cell office:value-type="float" office:value="2.567116003310685E-3" table:style-name="ce1">
            <text:p>0.002567116</text:p>
          </table:table-cell>
          <table:table-cell office:value-type="float" office:value="4.2636930141030684E-3" table:style-name="ce1">
            <text:p>0.004263693</text:p>
          </table:table-cell>
          <table:table-cell office:value-type="float" office:value="-0.1000000000000001" table:style-name="ce1">
            <text:p>-0.1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Recovery</text:p>
          </table:table-cell>
          <table:table-cell office:value-type="float" office:value="2.567116003310721E-3" table:style-name="ce1">
            <text:p>0.002567116</text:p>
          </table:table-cell>
          <table:table-cell office:value-type="float" office:value="4.2636930141031204E-3" table:style-name="ce1">
            <text:p>0.004263693</text:p>
          </table:table-cell>
          <table:table-cell table:number-columns-repeated="16371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string" table:style-name="ce1">
            <text:p>Jan</text:p>
          </table:table-cell>
          <table:table-cell office:value-type="float" office:value="5045218" table:style-name="ce1">
            <text:p>5045218</text:p>
          </table:table-cell>
          <table:table-cell office:value-type="float" office:value="186396" table:style-name="ce1">
            <text:p>186396</text:p>
          </table:table-cell>
          <table:table-cell office:value-type="float" office:value="3.6" table:style-name="ce1">
            <text:p>3.6</text:p>
          </table:table-cell>
          <table:table-cell office:value-type="float" office:value="31.11" table:style-name="ce1">
            <text:p>31.11</text:p>
          </table:table-cell>
          <table:table-cell office:value-type="float" office:value="2.9109998183109919E-3" table:style-name="ce1">
            <text:p>0.002911</text:p>
          </table:table-cell>
          <table:table-cell office:value-type="float" office:value="1.6002612671456511E-2" table:style-name="ce1">
            <text:p>0.016002613</text:p>
          </table:table-cell>
          <table:table-cell office:value-type="float" office:value="0" table:style-name="ce1">
            <text:p>0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Post_Recovery</text:p>
          </table:table-cell>
          <table:table-cell office:value-type="float" office:value="2.9109998183110002E-3" table:style-name="ce1">
            <text:p>0.002911</text:p>
          </table:table-cell>
          <table:table-cell office:value-type="float" office:value="1.6002612671456529E-2" table:style-name="ce1">
            <text:p>0.016002613</text:p>
          </table:table-cell>
          <table:table-cell table:number-columns-repeated="16371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string" table:style-name="ce1">
            <text:p>Feb</text:p>
          </table:table-cell>
          <table:table-cell office:value-type="float" office:value="5060084" table:style-name="ce1">
            <text:p>5060084</text:p>
          </table:table-cell>
          <table:table-cell office:value-type="float" office:value="183865" table:style-name="ce1">
            <text:p>183865</text:p>
          </table:table-cell>
          <table:table-cell office:value-type="float" office:value="3.5" table:style-name="ce1">
            <text:p>3.5</text:p>
          </table:table-cell>
          <table:table-cell office:value-type="float" office:value="31.07" table:style-name="ce1">
            <text:p>31.07</text:p>
          </table:table-cell>
          <table:table-cell office:value-type="float" office:value="2.9465525572928658E-3" table:style-name="ce1">
            <text:p>0.002946553</text:p>
          </table:table-cell>
          <table:table-cell office:value-type="float" office:value="-1.2857602057216051E-3" table:style-name="ce1">
            <text:p>-0.00128576</text:p>
          </table:table-cell>
          <table:table-cell office:value-type="float" office:value="-0.1000000000000001" table:style-name="ce1">
            <text:p>-0.1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Post_Recovery</text:p>
          </table:table-cell>
          <table:table-cell office:value-type="float" office:value="2.9465525572929252E-3" table:style-name="ce1">
            <text:p>0.002946553</text:p>
          </table:table-cell>
          <table:table-cell office:value-type="float" office:value="-1.285760205721576E-3" table:style-name="ce1">
            <text:p>-0.00128576</text:p>
          </table:table-cell>
          <table:table-cell table:number-columns-repeated="16371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string" table:style-name="ce1">
            <text:p>Mar</text:p>
          </table:table-cell>
          <table:table-cell office:value-type="float" office:value="5072643" table:style-name="ce1">
            <text:p>5072643</text:p>
          </table:table-cell>
          <table:table-cell office:value-type="float" office:value="181986" table:style-name="ce1">
            <text:p>181986</text:p>
          </table:table-cell>
          <table:table-cell office:value-type="float" office:value="3.5" table:style-name="ce1">
            <text:p>3.5</text:p>
          </table:table-cell>
          <table:table-cell office:value-type="float" office:value="30.8" table:style-name="ce1">
            <text:p>30.8</text:p>
          </table:table-cell>
          <table:table-cell office:value-type="float" office:value="2.481974607536159E-3" table:style-name="ce1">
            <text:p>0.002481975</text:p>
          </table:table-cell>
          <table:table-cell office:value-type="float" office:value="-8.6900547151593042E-3" table:style-name="ce1">
            <text:p>-0.008690055</text:p>
          </table:table-cell>
          <table:table-cell office:value-type="float" office:value="0" table:style-name="ce1">
            <text:p>0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Post_Recovery</text:p>
          </table:table-cell>
          <table:table-cell office:value-type="float" office:value="2.4819746075361859E-3" table:style-name="ce1">
            <text:p>0.002481975</text:p>
          </table:table-cell>
          <table:table-cell office:value-type="float" office:value="-8.6900547151592678E-3" table:style-name="ce1">
            <text:p>-0.008690055</text:p>
          </table:table-cell>
          <table:table-cell table:number-columns-repeated="16371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string" table:style-name="ce1">
            <text:p>Apr</text:p>
          </table:table-cell>
          <table:table-cell office:value-type="float" office:value="5081770" table:style-name="ce1">
            <text:p>5081770</text:p>
          </table:table-cell>
          <table:table-cell office:value-type="float" office:value="180785" table:style-name="ce1">
            <text:p>180785</text:p>
          </table:table-cell>
          <table:table-cell office:value-type="float" office:value="3.4" table:style-name="ce1">
            <text:p>3.4</text:p>
          </table:table-cell>
          <table:table-cell office:value-type="float" office:value="31.25" table:style-name="ce1">
            <text:p>31.25</text:p>
          </table:table-cell>
          <table:table-cell office:value-type="float" office:value="1.799259281601327E-3" table:style-name="ce1">
            <text:p>0.001799259</text:p>
          </table:table-cell>
          <table:table-cell office:value-type="float" office:value="1.4610389610389589E-2" table:style-name="ce1">
            <text:p>0.01461039</text:p>
          </table:table-cell>
          <table:table-cell office:value-type="float" office:value="-0.1000000000000001" table:style-name="ce1">
            <text:p>-0.1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Post_Recovery</text:p>
          </table:table-cell>
          <table:table-cell office:value-type="float" office:value="1.7992592816014059E-3" table:style-name="ce1">
            <text:p>0.001799259</text:p>
          </table:table-cell>
          <table:table-cell office:value-type="float" office:value="1.461038961038952E-2" table:style-name="ce1">
            <text:p>0.01461039</text:p>
          </table:table-cell>
          <table:table-cell table:number-columns-repeated="16371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string" table:style-name="ce1">
            <text:p>May</text:p>
          </table:table-cell>
          <table:table-cell office:value-type="float" office:value="5087440" table:style-name="ce1">
            <text:p>5087440</text:p>
          </table:table-cell>
          <table:table-cell office:value-type="float" office:value="180740" table:style-name="ce1">
            <text:p>180740</text:p>
          </table:table-cell>
          <table:table-cell office:value-type="float" office:value="3.4" table:style-name="ce1">
            <text:p>3.4</text:p>
          </table:table-cell>
          <table:table-cell office:value-type="float" office:value="30.69" table:style-name="ce1">
            <text:p>30.69</text:p>
          </table:table-cell>
          <table:table-cell office:value-type="float" office:value="1.1157529758332231E-3" table:style-name="ce1">
            <text:p>0.001115753</text:p>
          </table:table-cell>
          <table:table-cell office:value-type="float" office:value="-1.791999999999996E-2" table:style-name="ce1">
            <text:p>-0.01792</text:p>
          </table:table-cell>
          <table:table-cell office:value-type="float" office:value="0" table:style-name="ce1">
            <text:p>0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Post_Recovery</text:p>
          </table:table-cell>
          <table:table-cell office:value-type="float" office:value="1.115752975833217E-3" table:style-name="ce1">
            <text:p>0.001115753</text:p>
          </table:table-cell>
          <table:table-cell office:value-type="float" office:value="-1.7919999999999939E-2" table:style-name="ce1">
            <text:p>-0.01792</text:p>
          </table:table-cell>
          <table:table-cell table:number-columns-repeated="16371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string" table:style-name="ce1">
            <text:p>Jun</text:p>
          </table:table-cell>
          <table:table-cell office:value-type="float" office:value="5091631" table:style-name="ce1">
            <text:p>5091631</text:p>
          </table:table-cell>
          <table:table-cell office:value-type="float" office:value="181124" table:style-name="ce1">
            <text:p>181124</text:p>
          </table:table-cell>
          <table:table-cell office:value-type="float" office:value="3.4" table:style-name="ce1">
            <text:p>3.4</text:p>
          </table:table-cell>
          <table:table-cell office:value-type="float" office:value="30.51" table:style-name="ce1">
            <text:p>30.51</text:p>
          </table:table-cell>
          <table:table-cell office:value-type="float" office:value="8.2379349928451246E-4" table:style-name="ce1">
            <text:p>0.000823793</text:p>
          </table:table-cell>
          <table:table-cell office:value-type="float" office:value="-5.8651026392961781E-3" table:style-name="ce1">
            <text:p>-0.005865103</text:p>
          </table:table-cell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Post_Recovery</text:p>
          </table:table-cell>
          <table:table-cell office:value-type="float" office:value="8.2379349928451973E-4" table:style-name="ce1">
            <text:p>0.000823793</text:p>
          </table:table-cell>
          <table:table-cell office:value-type="float" office:value="-5.8651026392961816E-3" table:style-name="ce1">
            <text:p>-0.005865103</text:p>
          </table:table-cell>
          <table:table-cell table:number-columns-repeated="16371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string" table:style-name="ce1">
            <text:p>Jul</text:p>
          </table:table-cell>
          <table:table-cell office:value-type="float" office:value="5095803" table:style-name="ce1">
            <text:p>5095803</text:p>
          </table:table-cell>
          <table:table-cell office:value-type="float" office:value="182081" table:style-name="ce1">
            <text:p>182081</text:p>
          </table:table-cell>
          <table:table-cell office:value-type="float" office:value="3.4" table:style-name="ce1">
            <text:p>3.4</text:p>
          </table:table-cell>
          <table:table-cell office:value-type="float" office:value="31.35" table:style-name="ce1">
            <text:p>31.35</text:p>
          </table:table-cell>
          <table:table-cell office:value-type="float" office:value="8.1938380844959115E-4" table:style-name="ce1">
            <text:p>0.000819384</text:p>
          </table:table-cell>
          <table:table-cell office:value-type="float" office:value="2.7531956735496549E-2" table:style-name="ce1">
            <text:p>0.027531957</text:p>
          </table:table-cell>
          <table:table-cell office:value-type="float" office:value="0" table:style-name="ce1">
            <text:p>0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Post_Recovery</text:p>
          </table:table-cell>
          <table:table-cell office:value-type="float" office:value="8.1938380844959191E-4" table:style-name="ce1">
            <text:p>0.000819384</text:p>
          </table:table-cell>
          <table:table-cell office:value-type="float" office:value="2.753195673549658E-2" table:style-name="ce1">
            <text:p>0.027531957</text:p>
          </table:table-cell>
          <table:table-cell table:number-columns-repeated="16371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string" table:style-name="ce1">
            <text:p>Aug</text:p>
          </table:table-cell>
          <table:table-cell office:value-type="float" office:value="5099611" table:style-name="ce1">
            <text:p>5099611</text:p>
          </table:table-cell>
          <table:table-cell office:value-type="float" office:value="183552" table:style-name="ce1">
            <text:p>183552</text:p>
          </table:table-cell>
          <table:table-cell office:value-type="float" office:value="3.5" table:style-name="ce1">
            <text:p>3.5</text:p>
          </table:table-cell>
          <table:table-cell office:value-type="float" office:value="31.38" table:style-name="ce1">
            <text:p>31.38</text:p>
          </table:table-cell>
          <table:table-cell office:value-type="float" office:value="7.4728163549493578E-4" table:style-name="ce1">
            <text:p>0.000747282</text:p>
          </table:table-cell>
          <table:table-cell office:value-type="float" office:value="9.5693779904298514E-4" table:style-name="ce1">
            <text:p>0.000956938</text:p>
          </table:table-cell>
          <table:table-cell office:value-type="float" office:value="0.1000000000000001" table:style-name="ce1">
            <text:p>0.1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Post_Recovery</text:p>
          </table:table-cell>
          <table:table-cell office:value-type="float" office:value="7.472816354949785E-4" table:style-name="ce1">
            <text:p>0.000747282</text:p>
          </table:table-cell>
          <table:table-cell office:value-type="float" office:value="9.5693779904304499E-4" table:style-name="ce1">
            <text:p>0.000956938</text:p>
          </table:table-cell>
          <table:table-cell table:number-columns-repeated="16371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string" table:style-name="ce1">
            <text:p>Sep</text:p>
          </table:table-cell>
          <table:table-cell office:value-type="float" office:value="5102232" table:style-name="ce1">
            <text:p>5102232</text:p>
          </table:table-cell>
          <table:table-cell office:value-type="float" office:value="184916" table:style-name="ce1">
            <text:p>184916</text:p>
          </table:table-cell>
          <table:table-cell office:value-type="float" office:value="3.5" table:style-name="ce1">
            <text:p>3.5</text:p>
          </table:table-cell>
          <table:table-cell office:value-type="float" office:value="31.56" table:style-name="ce1">
            <text:p>31.56</text:p>
          </table:table-cell>
          <table:table-cell office:value-type="float" office:value="5.1396077073329711E-4" table:style-name="ce1">
            <text:p>0.000513961</text:p>
          </table:table-cell>
          <table:table-cell office:value-type="float" office:value="5.7361376673040068E-3" table:style-name="ce1">
            <text:p>0.005736138</text:p>
          </table:table-cell>
          <table:table-cell office:value-type="float" office:value="0" table:style-name="ce1">
            <text:p>0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Post_Recovery</text:p>
          </table:table-cell>
          <table:table-cell office:value-type="float" office:value="5.1396077073340152E-4" table:style-name="ce1">
            <text:p>0.000513961</text:p>
          </table:table-cell>
          <table:table-cell office:value-type="float" office:value="5.7361376673039643E-3" table:style-name="ce1">
            <text:p>0.005736138</text:p>
          </table:table-cell>
          <table:table-cell table:number-columns-repeated="16371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string" table:style-name="ce1">
            <text:p>Oct</text:p>
          </table:table-cell>
          <table:table-cell office:value-type="float" office:value="5103422" table:style-name="ce1">
            <text:p>5103422</text:p>
          </table:table-cell>
          <table:table-cell office:value-type="float" office:value="186049" table:style-name="ce1">
            <text:p>186049</text:p>
          </table:table-cell>
          <table:table-cell office:value-type="float" office:value="3.5" table:style-name="ce1">
            <text:p>3.5</text:p>
          </table:table-cell>
          <table:table-cell office:value-type="float" office:value="31.82" table:style-name="ce1">
            <text:p>31.82</text:p>
          </table:table-cell>
          <table:table-cell office:value-type="float" office:value="2.3323126035821191E-4" table:style-name="ce1">
            <text:p>0.000233231</text:p>
          </table:table-cell>
          <table:table-cell office:value-type="float" office:value="8.23827629911285E-3" table:style-name="ce1">
            <text:p>0.008238276</text:p>
          </table:table-cell>
          <table:table-cell office:value-type="float" office:value="0" table:style-name="ce1">
            <text:p>0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Post_Recovery</text:p>
          </table:table-cell>
          <table:table-cell office:value-type="float" office:value="2.3323126035812441E-4" table:style-name="ce1">
            <text:p>0.000233231</text:p>
          </table:table-cell>
          <table:table-cell office:value-type="float" office:value="8.2382762991128899E-3" table:style-name="ce1">
            <text:p>0.008238276</text:p>
          </table:table-cell>
          <table:table-cell table:number-columns-repeated="16371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string" table:style-name="ce1">
            <text:p>Nov</text:p>
          </table:table-cell>
          <table:table-cell office:value-type="float" office:value="5103535" table:style-name="ce1">
            <text:p>5103535</text:p>
          </table:table-cell>
          <table:table-cell office:value-type="float" office:value="186898" table:style-name="ce1">
            <text:p>186898</text:p>
          </table:table-cell>
          <table:table-cell office:value-type="float" office:value="3.5" table:style-name="ce1">
            <text:p>3.5</text:p>
          </table:table-cell>
          <table:table-cell office:value-type="float" office:value="31.49" table:style-name="ce1">
            <text:p>31.49</text:p>
          </table:table-cell>
          <table:table-cell office:value-type="float" office:value="2.214200589330061E-5" table:style-name="ce1">
            <text:p>2.2142E-05</text:p>
          </table:table-cell>
          <table:table-cell office:value-type="float" office:value="-1.037083595223136E-2" table:style-name="ce1">
            <text:p>-0.010370836</text:p>
          </table:table-cell>
          <table:table-cell office:value-type="float" office:value="0" table:style-name="ce1">
            <text:p>0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Post_Recovery</text:p>
          </table:table-cell>
          <table:table-cell office:value-type="float" office:value="2.2142005893233119E-5" table:style-name="ce1">
            <text:p>2.2142E-05</text:p>
          </table:table-cell>
          <table:table-cell office:value-type="float" office:value="-1.037083595223132E-2" table:style-name="ce1">
            <text:p>-0.010370836</text:p>
          </table:table-cell>
          <table:table-cell table:number-columns-repeated="16371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string" table:style-name="ce1">
            <text:p>Dec</text:p>
          </table:table-cell>
          <table:table-cell office:value-type="float" office:value="5103571" table:style-name="ce1">
            <text:p>5103571</text:p>
          </table:table-cell>
          <table:table-cell office:value-type="float" office:value="187400" table:style-name="ce1">
            <text:p>187400</text:p>
          </table:table-cell>
          <table:table-cell office:value-type="float" office:value="3.5" table:style-name="ce1">
            <text:p>3.5</text:p>
          </table:table-cell>
          <table:table-cell office:value-type="float" office:value="31.92" table:style-name="ce1">
            <text:p>31.92</text:p>
          </table:table-cell>
          <table:table-cell office:value-type="float" office:value="7.0539341848346297E-6" table:style-name="ce1">
            <text:p>7.05393E-06</text:p>
          </table:table-cell>
          <table:table-cell office:value-type="float" office:value="1.365512861225796E-2" table:style-name="ce1">
            <text:p>0.013655129</text:p>
          </table:table-cell>
          <table:table-cell office:value-type="float" office:value="0" table:style-name="ce1">
            <text:p>0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Post_Recovery</text:p>
          </table:table-cell>
          <table:table-cell office:value-type="float" office:value="7.0539341847641879E-6" table:style-name="ce1">
            <text:p>7.05393E-06</text:p>
          </table:table-cell>
          <table:table-cell office:value-type="float" office:value="1.3655128612257929E-2" table:style-name="ce1">
            <text:p>0.013655129</text:p>
          </table:table-cell>
          <table:table-cell table:number-columns-repeated="16371"/>
        </table:table-row>
        <table:table-row table:style-name="ro1">
          <table:table-cell office:value-type="float" office:value="2024" table:style-name="ce1">
            <text:p>2024</text:p>
          </table:table-cell>
          <table:table-cell office:value-type="string" table:style-name="ce1">
            <text:p>Jan</text:p>
          </table:table-cell>
          <table:table-cell office:value-type="float" office:value="5104015" table:style-name="ce1">
            <text:p>5104015</text:p>
          </table:table-cell>
          <table:table-cell office:value-type="float" office:value="187388" table:style-name="ce1">
            <text:p>187388</text:p>
          </table:table-cell>
          <table:table-cell office:value-type="float" office:value="3.5" table:style-name="ce1">
            <text:p>3.5</text:p>
          </table:table-cell>
          <table:table-cell office:value-type="float" office:value="32.1" table:style-name="ce1">
            <text:p>32.1</text:p>
          </table:table-cell>
          <table:table-cell office:value-type="float" office:value="8.6997907935443632E-5" table:style-name="ce1">
            <text:p>8.69979E-05</text:p>
          </table:table-cell>
          <table:table-cell office:value-type="float" office:value="5.6390977443608933E-3" table:style-name="ce1">
            <text:p>0.005639098</text:p>
          </table:table-cell>
          <table:table-cell office:value-type="float" office:value="0" table:style-name="ce1">
            <text:p>0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Post_Recovery</text:p>
          </table:table-cell>
          <table:table-cell office:value-type="float" office:value="8.699790793542661E-5" table:style-name="ce1">
            <text:p>8.69979E-05</text:p>
          </table:table-cell>
          <table:table-cell office:value-type="float" office:value="5.6390977443609991E-3" table:style-name="ce1">
            <text:p>0.005639098</text:p>
          </table:table-cell>
          <table:table-cell table:number-columns-repeated="16371"/>
        </table:table-row>
        <table:table-row table:style-name="ro1">
          <table:table-cell office:value-type="float" office:value="2024" table:style-name="ce1">
            <text:p>2024</text:p>
          </table:table-cell>
          <table:table-cell office:value-type="string" table:style-name="ce1">
            <text:p>Feb</text:p>
          </table:table-cell>
          <table:table-cell office:value-type="float" office:value="5104873" table:style-name="ce1">
            <text:p>5104873</text:p>
          </table:table-cell>
          <table:table-cell office:value-type="float" office:value="187706" table:style-name="ce1">
            <text:p>187706</text:p>
          </table:table-cell>
          <table:table-cell office:value-type="float" office:value="3.5" table:style-name="ce1">
            <text:p>3.5</text:p>
          </table:table-cell>
          <table:table-cell office:value-type="float" office:value="31.93" table:style-name="ce1">
            <text:p>31.93</text:p>
          </table:table-cell>
          <table:table-cell office:value-type="float" office:value="1.6810295424288531E-4" table:style-name="ce1">
            <text:p>0.000168103</text:p>
          </table:table-cell>
          <table:table-cell office:value-type="float" office:value="-5.2959501557632927E-3" table:style-name="ce1">
            <text:p>-0.00529595</text:p>
          </table:table-cell>
          <table:table-cell office:value-type="float" office:value="0" table:style-name="ce1">
            <text:p>0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Post_Recovery</text:p>
          </table:table-cell>
          <table:table-cell office:value-type="float" office:value="1.6810295424285471E-4" table:style-name="ce1">
            <text:p>0.000168103</text:p>
          </table:table-cell>
          <table:table-cell office:value-type="float" office:value="-5.2959501557633404E-3" table:style-name="ce1">
            <text:p>-0.00529595</text:p>
          </table:table-cell>
          <table:table-cell table:number-columns-repeated="16371"/>
        </table:table-row>
        <table:table-row table:style-name="ro1">
          <table:table-cell office:value-type="float" office:value="2024" table:style-name="ce1">
            <text:p>2024</text:p>
          </table:table-cell>
          <table:table-cell office:value-type="string" table:style-name="ce1">
            <text:p>Mar</text:p>
          </table:table-cell>
          <table:table-cell office:value-type="float" office:value="5105813" table:style-name="ce1">
            <text:p>5105813</text:p>
          </table:table-cell>
          <table:table-cell office:value-type="float" office:value="188977" table:style-name="ce1">
            <text:p>188977</text:p>
          </table:table-cell>
          <table:table-cell office:value-type="float" office:value="3.6" table:style-name="ce1">
            <text:p>3.6</text:p>
          </table:table-cell>
          <table:table-cell office:value-type="float" office:value="31.85" table:style-name="ce1">
            <text:p>31.85</text:p>
          </table:table-cell>
          <table:table-cell office:value-type="float" office:value="1.8413778364319739E-4" table:style-name="ce1">
            <text:p>0.000184138</text:p>
          </table:table-cell>
          <table:table-cell office:value-type="float" office:value="-2.5054807391167648E-3" table:style-name="ce1">
            <text:p>-0.002505481</text:p>
          </table:table-cell>
          <table:table-cell office:value-type="float" office:value="0.1000000000000001" table:style-name="ce1">
            <text:p>0.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Post_Recovery</text:p>
          </table:table-cell>
          <table:table-cell office:value-type="float" office:value="1.841377836431235E-4" table:style-name="ce1">
            <text:p>0.000184138</text:p>
          </table:table-cell>
          <table:table-cell office:value-type="float" office:value="-2.5054807391167171E-3" table:style-name="ce1">
            <text:p>-0.002505481</text:p>
          </table:table-cell>
          <table:table-cell table:number-columns-repeated="16371"/>
        </table:table-row>
        <table:table-row table:style-name="ro1">
          <table:table-cell office:value-type="float" office:value="2024" table:style-name="ce1">
            <text:p>2024</text:p>
          </table:table-cell>
          <table:table-cell office:value-type="string" table:style-name="ce1">
            <text:p>Apr</text:p>
          </table:table-cell>
          <table:table-cell office:value-type="float" office:value="5106738" table:style-name="ce1">
            <text:p>5106738</text:p>
          </table:table-cell>
          <table:table-cell office:value-type="float" office:value="190718" table:style-name="ce1">
            <text:p>190718</text:p>
          </table:table-cell>
          <table:table-cell office:value-type="float" office:value="3.6" table:style-name="ce1">
            <text:p>3.6</text:p>
          </table:table-cell>
          <table:table-cell office:value-type="float" office:value="32.29" table:style-name="ce1">
            <text:p>32.29</text:p>
          </table:table-cell>
          <table:table-cell office:value-type="float" office:value="1.8116605523939091E-4" table:style-name="ce1">
            <text:p>0.000181166</text:p>
          </table:table-cell>
          <table:table-cell office:value-type="float" office:value="1.3814756671899461E-2" table:style-name="ce1">
            <text:p>0.013814757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Post_Recovery</text:p>
          </table:table-cell>
          <table:table-cell office:value-type="float" office:value="1.811660552393235E-4" table:style-name="ce1">
            <text:p>0.000181166</text:p>
          </table:table-cell>
          <table:table-cell office:value-type="float" office:value="1.381475667189935E-2" table:style-name="ce1">
            <text:p>0.013814757</text:p>
          </table:table-cell>
          <table:table-cell table:number-columns-repeated="16371"/>
        </table:table-row>
        <table:table-row table:style-name="ro1">
          <table:table-cell office:value-type="float" office:value="2024" table:style-name="ce1">
            <text:p>2024</text:p>
          </table:table-cell>
          <table:table-cell office:value-type="string" table:style-name="ce1">
            <text:p>May</text:p>
          </table:table-cell>
          <table:table-cell office:value-type="float" office:value="5107755" table:style-name="ce1">
            <text:p>5107755</text:p>
          </table:table-cell>
          <table:table-cell office:value-type="float" office:value="192267" table:style-name="ce1">
            <text:p>192267</text:p>
          </table:table-cell>
          <table:table-cell office:value-type="float" office:value="3.6" table:style-name="ce1">
            <text:p>3.6</text:p>
          </table:table-cell>
          <table:table-cell office:value-type="float" office:value="32.24" table:style-name="ce1">
            <text:p>32.24</text:p>
          </table:table-cell>
          <table:table-cell office:value-type="float" office:value="1.9914865418981751E-4" table:style-name="ce1">
            <text:p>0.000199149</text:p>
          </table:table-cell>
          <table:table-cell office:value-type="float" office:value="-1.5484670176524359E-3" table:style-name="ce1">
            <text:p>-0.001548467</text:p>
          </table:table-cell>
          <table:table-cell office:value-type="float" office:value="0" table:style-name="ce1">
            <text:p>0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Post_Recovery</text:p>
          </table:table-cell>
          <table:table-cell office:value-type="float" office:value="1.9914865418990679E-4" table:style-name="ce1">
            <text:p>0.000199149</text:p>
          </table:table-cell>
          <table:table-cell office:value-type="float" office:value="-1.5484670176524331E-3" table:style-name="ce1">
            <text:p>-0.001548467</text:p>
          </table:table-cell>
          <table:table-cell table:number-columns-repeated="16371"/>
        </table:table-row>
        <table:table-row table:style-name="ro1">
          <table:table-cell office:value-type="float" office:value="2024" table:style-name="ce1">
            <text:p>2024</text:p>
          </table:table-cell>
          <table:table-cell office:value-type="string" table:style-name="ce1">
            <text:p>Jun</text:p>
          </table:table-cell>
          <table:table-cell office:value-type="float" office:value="5107962" table:style-name="ce1">
            <text:p>5107962</text:p>
          </table:table-cell>
          <table:table-cell office:value-type="float" office:value="193449" table:style-name="ce1">
            <text:p>193449</text:p>
          </table:table-cell>
          <table:table-cell office:value-type="float" office:value="3.6" table:style-name="ce1">
            <text:p>3.6</text:p>
          </table:table-cell>
          <table:table-cell office:value-type="float" office:value="32.409999999999997" table:style-name="ce1">
            <text:p>32.41</text:p>
          </table:table-cell>
          <table:table-cell office:value-type="float" office:value="4.0526611006205271E-5" table:style-name="ce1">
            <text:p>4.05266E-05</text:p>
          </table:table-cell>
          <table:table-cell office:value-type="float" office:value="5.2729528535978469E-3" table:style-name="ce1">
            <text:p>0.005272953</text:p>
          </table:table-cell>
          <table:table-cell office:value-type="float" office:value="0" table:style-name="ce1">
            <text:p>0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Post_Recovery</text:p>
          </table:table-cell>
          <table:table-cell office:value-type="float" office:value="4.0526611006175273E-5" table:style-name="ce1">
            <text:p>4.05266E-05</text:p>
          </table:table-cell>
          <table:table-cell office:value-type="float" office:value="5.2729528535977446E-3" table:style-name="ce1">
            <text:p>0.005272953</text:p>
          </table:table-cell>
          <table:table-cell table:number-columns-repeated="16371"/>
        </table:table-row>
        <table:table-row table:style-name="ro1">
          <table:table-cell office:value-type="float" office:value="2024" table:style-name="ce1">
            <text:p>2024</text:p>
          </table:table-cell>
          <table:table-cell office:value-type="string" table:style-name="ce1">
            <text:p>Jul</text:p>
          </table:table-cell>
          <table:table-cell office:value-type="float" office:value="5106269" table:style-name="ce1">
            <text:p>5106269</text:p>
          </table:table-cell>
          <table:table-cell office:value-type="float" office:value="194396" table:style-name="ce1">
            <text:p>194396</text:p>
          </table:table-cell>
          <table:table-cell office:value-type="float" office:value="3.7" table:style-name="ce1">
            <text:p>3.7</text:p>
          </table:table-cell>
          <table:table-cell office:value-type="float" office:value="32.32" table:style-name="ce1">
            <text:p>32.32</text:p>
          </table:table-cell>
          <table:table-cell office:value-type="float" office:value="-3.314433427656666E-4" table:style-name="ce1">
            <text:p>-0.000331443</text:p>
          </table:table-cell>
          <table:table-cell office:value-type="float" office:value="-2.776920703486464E-3" table:style-name="ce1">
            <text:p>-0.002776921</text:p>
          </table:table-cell>
          <table:table-cell office:value-type="float" office:value="0.1000000000000001" table:style-name="ce1">
            <text:p>0.1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Post_Recovery</text:p>
          </table:table-cell>
          <table:table-cell office:value-type="float" office:value="-3.3144334276569149E-4" table:style-name="ce1">
            <text:p>-0.000331443</text:p>
          </table:table-cell>
          <table:table-cell office:value-type="float" office:value="-2.7769207034864518E-3" table:style-name="ce1">
            <text:p>-0.002776921</text:p>
          </table:table-cell>
          <table:table-cell table:number-columns-repeated="16371"/>
        </table:table-row>
        <table:table-row table:style-name="ro1">
          <table:table-cell office:value-type="float" office:value="2024" table:style-name="ce1">
            <text:p>2024</text:p>
          </table:table-cell>
          <table:table-cell office:value-type="string" table:style-name="ce1">
            <text:p>Aug</text:p>
          </table:table-cell>
          <table:table-cell office:value-type="float" office:value="5103539" table:style-name="ce1">
            <text:p>5103539</text:p>
          </table:table-cell>
          <table:table-cell office:value-type="float" office:value="195254" table:style-name="ce1">
            <text:p>195254</text:p>
          </table:table-cell>
          <table:table-cell office:value-type="float" office:value="3.7" table:style-name="ce1">
            <text:p>3.7</text:p>
          </table:table-cell>
          <table:table-cell office:value-type="float" office:value="32.53" table:style-name="ce1">
            <text:p>32.53</text:p>
          </table:table-cell>
          <table:table-cell office:value-type="float" office:value="-5.3463693354188747E-4" table:style-name="ce1">
            <text:p>-0.000534637</text:p>
          </table:table-cell>
          <table:table-cell office:value-type="float" office:value="6.4975247524752741E-3" table:style-name="ce1">
            <text:p>0.006497525</text:p>
          </table:table-cell>
          <table:table-cell office:value-type="float" office:value="0" table:style-name="ce1">
            <text:p>0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Post_Recovery</text:p>
          </table:table-cell>
          <table:table-cell office:value-type="float" office:value="-5.3463693354183217E-4" table:style-name="ce1">
            <text:p>-0.000534637</text:p>
          </table:table-cell>
          <table:table-cell office:value-type="float" office:value="6.4975247524752264E-3" table:style-name="ce1">
            <text:p>0.006497525</text:p>
          </table:table-cell>
          <table:table-cell table:number-columns-repeated="16371"/>
        </table:table-row>
        <table:table-row table:style-name="ro1">
          <table:table-cell office:value-type="float" office:value="2024" table:style-name="ce1">
            <text:p>2024</text:p>
          </table:table-cell>
          <table:table-cell office:value-type="string" table:style-name="ce1">
            <text:p>Sep</text:p>
          </table:table-cell>
          <table:table-cell office:value-type="float" office:value="5100699" table:style-name="ce1">
            <text:p>5100699</text:p>
          </table:table-cell>
          <table:table-cell office:value-type="float" office:value="196213" table:style-name="ce1">
            <text:p>196213</text:p>
          </table:table-cell>
          <table:table-cell office:value-type="float" office:value="3.7" table:style-name="ce1">
            <text:p>3.7</text:p>
          </table:table-cell>
          <table:table-cell office:value-type="float" office:value="33.119999999999997" table:style-name="ce1">
            <text:p>33.12</text:p>
          </table:table-cell>
          <table:table-cell office:value-type="float" office:value="-5.5647659398703531E-4" table:style-name="ce1">
            <text:p>-0.000556477</text:p>
          </table:table-cell>
          <table:table-cell office:value-type="float" office:value="1.813710421149697E-2" table:style-name="ce1">
            <text:p>0.018137104</text:p>
          </table:table-cell>
          <table:table-cell office:value-type="float" office:value="0" table:style-name="ce1">
            <text:p>0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Post_Recovery</text:p>
          </table:table-cell>
          <table:table-cell office:value-type="float" office:value="-5.5647659398705418E-4" table:style-name="ce1">
            <text:p>-0.000556477</text:p>
          </table:table-cell>
          <table:table-cell office:value-type="float" office:value="1.8137104211497061E-2" table:style-name="ce1">
            <text:p>0.018137104</text:p>
          </table:table-cell>
          <table:table-cell table:number-columns-repeated="16371"/>
        </table:table-row>
        <table:table-row table:style-name="ro1">
          <table:table-cell office:value-type="float" office:value="2024" table:style-name="ce1">
            <text:p>2024</text:p>
          </table:table-cell>
          <table:table-cell office:value-type="string" table:style-name="ce1">
            <text:p>Oct</text:p>
          </table:table-cell>
          <table:table-cell office:value-type="float" office:value="5097624" table:style-name="ce1">
            <text:p>5097624</text:p>
          </table:table-cell>
          <table:table-cell office:value-type="float" office:value="197111" table:style-name="ce1">
            <text:p>197111</text:p>
          </table:table-cell>
          <table:table-cell office:value-type="float" office:value="3.7" table:style-name="ce1">
            <text:p>3.7</text:p>
          </table:table-cell>
          <table:table-cell office:value-type="float" office:value="33.15" table:style-name="ce1">
            <text:p>33.15</text:p>
          </table:table-cell>
          <table:table-cell office:value-type="float" office:value="-6.0285854938705457E-4" table:style-name="ce1">
            <text:p>-0.000602859</text:p>
          </table:table-cell>
          <table:table-cell office:value-type="float" office:value="9.0579710144930974E-4" table:style-name="ce1">
            <text:p>0.000905797</text:p>
          </table:table-cell>
          <table:table-cell office:value-type="float" office:value="0" table:style-name="ce1">
            <text:p>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Post_Recovery</text:p>
          </table:table-cell>
          <table:table-cell office:value-type="float" office:value="-6.0285854938701977E-4" table:style-name="ce1">
            <text:p>-0.000602859</text:p>
          </table:table-cell>
          <table:table-cell office:value-type="float" office:value="9.0579710144922387E-4" table:style-name="ce1">
            <text:p>0.000905797</text:p>
          </table:table-cell>
          <table:table-cell table:number-columns-repeated="16371"/>
        </table:table-row>
        <table:table-row table:style-name="ro1">
          <table:table-cell office:value-type="float" office:value="2024" table:style-name="ce1">
            <text:p>2024</text:p>
          </table:table-cell>
          <table:table-cell office:value-type="string" table:style-name="ce1">
            <text:p>Nov</text:p>
          </table:table-cell>
          <table:table-cell office:value-type="float" office:value="5094520" table:style-name="ce1">
            <text:p>5094520</text:p>
          </table:table-cell>
          <table:table-cell office:value-type="float" office:value="198055" table:style-name="ce1">
            <text:p>198055</text:p>
          </table:table-cell>
          <table:table-cell office:value-type="float" office:value="3.7" table:style-name="ce1">
            <text:p>3.7</text:p>
          </table:table-cell>
          <table:table-cell office:value-type="float" office:value="32.93" table:style-name="ce1">
            <text:p>32.93</text:p>
          </table:table-cell>
          <table:table-cell office:value-type="float" office:value="-6.0891113193126838E-4" table:style-name="ce1">
            <text:p>-0.000608911</text:p>
          </table:table-cell>
          <table:table-cell office:value-type="float" office:value="-6.636500754147779E-3" table:style-name="ce1">
            <text:p>-0.006636501</text:p>
          </table:table-cell>
          <table:table-cell office:value-type="float" office:value="0" table:style-name="ce1">
            <text:p>0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Post_Recovery</text:p>
          </table:table-cell>
          <table:table-cell office:value-type="float" office:value="-6.0891113193128898E-4" table:style-name="ce1">
            <text:p>-0.000608911</text:p>
          </table:table-cell>
          <table:table-cell office:value-type="float" office:value="-6.6365007541477894E-3" table:style-name="ce1">
            <text:p>-0.006636501</text:p>
          </table:table-cell>
          <table:table-cell table:number-columns-repeated="16371"/>
        </table:table-row>
        <table:table-row table:style-name="ro1">
          <table:table-cell office:value-type="float" office:value="2024" table:style-name="ce1">
            <text:p>2024</text:p>
          </table:table-cell>
          <table:table-cell office:value-type="string" table:style-name="ce1">
            <text:p>Dec</text:p>
          </table:table-cell>
          <table:table-cell office:value-type="float" office:value="5091859" table:style-name="ce1">
            <text:p>5091859</text:p>
          </table:table-cell>
          <table:table-cell office:value-type="float" office:value="199305" table:style-name="ce1">
            <text:p>199305</text:p>
          </table:table-cell>
          <table:table-cell office:value-type="float" office:value="3.8" table:style-name="ce1">
            <text:p>3.8</text:p>
          </table:table-cell>
          <table:table-cell office:value-type="float" office:value="33.299999999999997" table:style-name="ce1">
            <text:p>33.3</text:p>
          </table:table-cell>
          <table:table-cell office:value-type="float" office:value="-5.2232595023672494E-4" table:style-name="ce1">
            <text:p>-0.000522326</text:p>
          </table:table-cell>
          <table:table-cell office:value-type="float" office:value="1.12359550561797E-2" table:style-name="ce1">
            <text:p>0.011235955</text:p>
          </table:table-cell>
          <table:table-cell office:value-type="float" office:value="9.9999999999999645E-2" table:style-name="ce1">
            <text:p>0.1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Post_Recovery</text:p>
          </table:table-cell>
          <table:table-cell office:value-type="float" office:value="-5.223259502367128E-4" table:style-name="ce1">
            <text:p>-0.000522326</text:p>
          </table:table-cell>
          <table:table-cell office:value-type="float" office:value="1.1235955056179799E-2" table:style-name="ce1">
            <text:p>0.011235955</text:p>
          </table:table-cell>
          <table:table-cell table:number-columns-repeated="16371"/>
        </table:table-row>
        <table:table-row table:style-name="ro1">
          <table:table-cell office:value-type="float" office:value="2025" table:style-name="ce1">
            <text:p>2025</text:p>
          </table:table-cell>
          <table:table-cell office:value-type="string" table:style-name="ce1">
            <text:p>Jan</text:p>
          </table:table-cell>
          <table:table-cell office:value-type="float" office:value="5089862" table:style-name="ce1">
            <text:p>5089862</text:p>
          </table:table-cell>
          <table:table-cell office:value-type="float" office:value="200605" table:style-name="ce1">
            <text:p>200605</text:p>
          </table:table-cell>
          <table:table-cell office:value-type="float" office:value="3.8" table:style-name="ce1">
            <text:p>3.8</text:p>
          </table:table-cell>
          <table:table-cell office:value-type="float" office:value="33.409999999999997" table:style-name="ce1">
            <text:p>33.41</text:p>
          </table:table-cell>
          <table:table-cell office:value-type="float" office:value="-3.921946778180621E-4" table:style-name="ce1">
            <text:p>-0.000392195</text:p>
          </table:table-cell>
          <table:table-cell office:value-type="float" office:value="3.3033033033032871E-3" table:style-name="ce1">
            <text:p>0.003303303</text:p>
          </table:table-cell>
          <table:table-cell office:value-type="float" office:value="0" table:style-name="ce1">
            <text:p>0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Post_Recovery</text:p>
          </table:table-cell>
          <table:table-cell office:value-type="float" office:value="-3.921946778180363E-4" table:style-name="ce1">
            <text:p>-0.000392195</text:p>
          </table:table-cell>
          <table:table-cell office:value-type="float" office:value="3.303303303303196E-3" table:style-name="ce1">
            <text:p>0.003303303</text:p>
          </table:table-cell>
          <table:table-cell table:number-columns-repeated="16371"/>
        </table:table-row>
        <table:table-row table:style-name="ro1">
          <table:table-cell office:value-type="float" office:value="2025" table:style-name="ce1">
            <text:p>2025</text:p>
          </table:table-cell>
          <table:table-cell office:value-type="string" table:style-name="ce1">
            <text:p>Feb</text:p>
          </table:table-cell>
          <table:table-cell office:value-type="float" office:value="5088869" table:style-name="ce1">
            <text:p>5088869</text:p>
          </table:table-cell>
          <table:table-cell office:value-type="float" office:value="201344" table:style-name="ce1">
            <text:p>201344</text:p>
          </table:table-cell>
          <table:table-cell office:value-type="float" office:value="3.8" table:style-name="ce1">
            <text:p>3.8</text:p>
          </table:table-cell>
          <table:table-cell office:value-type="float" office:value="33.659999999999997" table:style-name="ce1">
            <text:p>33.66</text:p>
          </table:table-cell>
          <table:table-cell office:value-type="float" office:value="-1.9509369802167521E-4" table:style-name="ce1">
            <text:p>-0.000195094</text:p>
          </table:table-cell>
          <table:table-cell office:value-type="float" office:value="7.4827895839569003E-3" table:style-name="ce1">
            <text:p>0.00748279</text:p>
          </table:table-cell>
          <table:table-cell office:value-type="float" office:value="0" table:style-name="ce1">
            <text:p>0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Post_Recovery</text:p>
          </table:table-cell>
          <table:table-cell office:value-type="float" office:value="-1.9509369802161999E-4" table:style-name="ce1">
            <text:p>-0.000195094</text:p>
          </table:table-cell>
          <table:table-cell office:value-type="float" office:value="7.4827895839568734E-3" table:style-name="ce1">
            <text:p>0.00748279</text:p>
          </table:table-cell>
          <table:table-cell table:number-columns-repeated="16371"/>
        </table:table-row>
        <table:table-row table:style-name="ro1">
          <table:table-cell office:value-type="float" office:value="2025" table:style-name="ce1">
            <text:p>2025</text:p>
          </table:table-cell>
          <table:table-cell office:value-type="string" table:style-name="ce1">
            <text:p>Mar</text:p>
          </table:table-cell>
          <table:table-cell office:value-type="float" office:value="5088852" table:style-name="ce1">
            <text:p>5088852</text:p>
          </table:table-cell>
          <table:table-cell office:value-type="float" office:value="201222" table:style-name="ce1">
            <text:p>201222</text:p>
          </table:table-cell>
          <table:table-cell office:value-type="float" office:value="3.8" table:style-name="ce1">
            <text:p>3.8</text:p>
          </table:table-cell>
          <table:table-cell office:value-type="float" office:value="33.6" table:style-name="ce1">
            <text:p>33.6</text:p>
          </table:table-cell>
          <table:table-cell office:value-type="float" office:value="-3.3406244098639598E-6" table:style-name="ce1">
            <text:p>-3.34062E-06</text:p>
          </table:table-cell>
          <table:table-cell office:value-type="float" office:value="-1.782531194295757E-3" table:style-name="ce1">
            <text:p>-0.001782531</text:p>
          </table:table-cell>
          <table:table-cell office:value-type="float" office:value="0" table:style-name="ce1">
            <text:p>0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Post_Recovery</text:p>
          </table:table-cell>
          <table:table-cell office:value-type="float" office:value="-3.3406244098754811E-6" table:style-name="ce1">
            <text:p>-3.34062E-06</text:p>
          </table:table-cell>
          <table:table-cell office:value-type="float" office:value="-1.782531194295722E-3" table:style-name="ce1">
            <text:p>-0.001782531</text:p>
          </table:table-cell>
          <table:table-cell table:number-columns-repeated="16371"/>
        </table:table-row>
        <table:table-row table:style-name="ro1">
          <table:table-cell office:value-type="float" office:value="2025" table:style-name="ce1">
            <text:p>2025</text:p>
          </table:table-cell>
          <table:table-cell office:value-type="string" table:style-name="ce1">
            <text:p>Apr</text:p>
          </table:table-cell>
          <table:table-cell office:value-type="float" office:value="5088805" table:style-name="ce1">
            <text:p>5088805</text:p>
          </table:table-cell>
          <table:table-cell office:value-type="float" office:value="201150" table:style-name="ce1">
            <text:p>201150</text:p>
          </table:table-cell>
          <table:table-cell office:value-type="float" office:value="3.8" table:style-name="ce1">
            <text:p>3.8</text:p>
          </table:table-cell>
          <table:table-cell office:value-type="float" office:value="33.67" table:style-name="ce1">
            <text:p>33.67</text:p>
          </table:table-cell>
          <table:table-cell office:value-type="float" office:value="-9.235874810271551E-6" table:style-name="ce1">
            <text:p>-9.23587E-06</text:p>
          </table:table-cell>
          <table:table-cell office:value-type="float" office:value="2.083333333333342E-3" table:style-name="ce1">
            <text:p>0.002083333</text:p>
          </table:table-cell>
          <table:table-cell office:value-type="float" office:value="0" table:style-name="ce1">
            <text:p>0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Post_Recovery</text:p>
          </table:table-cell>
          <table:table-cell office:value-type="float" office:value="-9.2358748102761012E-6" table:style-name="ce1">
            <text:p>-9.23587E-06</text:p>
          </table:table-cell>
          <table:table-cell office:value-type="float" office:value="2.083333333333437E-3" table:style-name="ce1">
            <text:p>0.002083333</text:p>
          </table:table-cell>
          <table:table-cell table:number-columns-repeated="16371"/>
        </table:table-row>
        <table:table-row table:style-name="ro1">
          <table:table-cell office:value-type="float" office:value="2025" table:style-name="ce1">
            <text:p>2025</text:p>
          </table:table-cell>
          <table:table-cell office:value-type="string" table:style-name="ce1">
            <text:p>May</text:p>
          </table:table-cell>
          <table:table-cell office:value-type="float" office:value="5088160" table:style-name="ce1">
            <text:p>5088160</text:p>
          </table:table-cell>
          <table:table-cell office:value-type="float" office:value="201754" table:style-name="ce1">
            <text:p>201754</text:p>
          </table:table-cell>
          <table:table-cell office:value-type="float" office:value="3.8" table:style-name="ce1">
            <text:p>3.8</text:p>
          </table:table-cell>
          <table:table-cell office:value-type="float" office:value="33.57" table:style-name="ce1">
            <text:p>33.57</text:p>
          </table:table-cell>
          <table:table-cell office:value-type="float" office:value="-1.267488143090568E-4" table:style-name="ce1">
            <text:p>-0.000126749</text:p>
          </table:table-cell>
          <table:table-cell office:value-type="float" office:value="-2.9700029700030122E-3" table:style-name="ce1">
            <text:p>-0.002970003</text:p>
          </table:table-cell>
          <table:table-cell office:value-type="float" office:value="0" table:style-name="ce1">
            <text:p>0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Post_Recovery</text:p>
          </table:table-cell>
          <table:table-cell office:value-type="float" office:value="-1.267488143090745E-4" table:style-name="ce1">
            <text:p>-0.000126749</text:p>
          </table:table-cell>
          <table:table-cell office:value-type="float" office:value="-2.970002970003049E-3" table:style-name="ce1">
            <text:p>-0.002970003</text:p>
          </table:table-cell>
          <table:table-cell table:number-columns-repeated="16371"/>
        </table:table-row>
        <table:table-row table:style-name="ro1">
          <table:table-cell office:value-type="float" office:value="2025" table:style-name="ce1">
            <text:p>2025</text:p>
          </table:table-cell>
          <table:table-cell office:value-type="string" table:style-name="ce1">
            <text:p>Jun</text:p>
          </table:table-cell>
          <table:table-cell office:value-type="float" office:value="5088095" table:style-name="ce1">
            <text:p>5088095</text:p>
          </table:table-cell>
          <table:table-cell office:value-type="float" office:value="202847" table:style-name="ce1">
            <text:p>202847</text:p>
          </table:table-cell>
          <table:table-cell office:value-type="float" office:value="3.8" table:style-name="ce1">
            <text:p>3.8</text:p>
          </table:table-cell>
          <table:table-cell office:value-type="float" office:value="33.799999999999997" table:style-name="ce1">
            <text:p>33.8</text:p>
          </table:table-cell>
          <table:table-cell office:value-type="float" office:value="-1.2774755510832991E-5" table:style-name="ce1">
            <text:p>-1.27748E-05</text:p>
          </table:table-cell>
          <table:table-cell office:value-type="float" office:value="6.8513553768244527E-3" table:style-name="ce1">
            <text:p>0.006851355</text:p>
          </table:table-cell>
          <table:table-cell office:value-type="float" office:value="0" table:style-name="ce1">
            <text:p>0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Post_Recovery</text:p>
          </table:table-cell>
          <table:table-cell office:value-type="float" office:value="-1.2774755510869261E-5" table:style-name="ce1">
            <text:p>-1.27748E-05</text:p>
          </table:table-cell>
          <table:table-cell office:value-type="float" office:value="6.8513553768243529E-3" table:style-name="ce1">
            <text:p>0.006851355</text:p>
          </table:table-cell>
          <table:table-cell table:number-columns-repeated="16371"/>
        </table:table-row>
        <table:table-row table:style-name="ro1">
          <table:table-cell office:value-type="float" office:value="2025" table:style-name="ce1">
            <text:p>2025</text:p>
          </table:table-cell>
          <table:table-cell office:value-type="string" table:style-name="ce1">
            <text:p>Jul</text:p>
          </table:table-cell>
          <table:table-cell office:value-type="float" office:value="5090865" table:style-name="ce1">
            <text:p>5090865</text:p>
          </table:table-cell>
          <table:table-cell office:value-type="float" office:value="203872" table:style-name="ce1">
            <text:p>203872</text:p>
          </table:table-cell>
          <table:table-cell office:value-type="float" office:value="3.9" table:style-name="ce1">
            <text:p>3.9</text:p>
          </table:table-cell>
          <table:table-cell office:value-type="float" office:value="33.93" table:style-name="ce1">
            <text:p>33.93</text:p>
          </table:table-cell>
          <table:table-cell office:value-type="float" office:value="5.4440807414169747E-4" table:style-name="ce1">
            <text:p>0.000544408</text:p>
          </table:table-cell>
          <table:table-cell office:value-type="float" office:value="3.8461538461539218E-3" table:style-name="ce1">
            <text:p>0.003846154</text:p>
          </table:table-cell>
          <table:table-cell office:value-type="float" office:value="0.1000000000000001" table:style-name="ce1">
            <text:p>0.1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Post_Recovery</text:p>
          </table:table-cell>
          <table:table-cell office:value-type="float" office:value="5.4440807414168901E-4" table:style-name="ce1">
            <text:p>0.000544408</text:p>
          </table:table-cell>
          <table:table-cell office:value-type="float" office:value="3.8461538461538321E-3" table:style-name="ce1">
            <text:p>0.003846154</text:p>
          </table:table-cell>
          <table:table-cell table:number-columns-repeated="16371"/>
        </table:table-row>
        <table:table-row table:style-name="ro1">
          <table:table-cell office:value-type="float" office:value="2025" table:style-name="ce1">
            <text:p>2025</text:p>
          </table:table-cell>
          <table:table-cell office:value-type="string" table:style-name="ce1">
            <text:p>Aug</text:p>
          </table:table-cell>
          <table:table-cell office:value-type="float" office:value="5096208" table:style-name="ce1">
            <text:p>5096208</text:p>
          </table:table-cell>
          <table:table-cell office:value-type="float" office:value="204464" table:style-name="ce1">
            <text:p>204464</text:p>
          </table:table-cell>
          <table:table-cell office:value-type="float" office:value="3.9" table:style-name="ce1">
            <text:p>3.9</text:p>
          </table:table-cell>
          <table:table-cell office:value-type="float" office:value="34.049999999999997" table:style-name="ce1">
            <text:p>34.05</text:p>
          </table:table-cell>
          <table:table-cell office:value-type="float" office:value="1.049526946795879E-3" table:style-name="ce1">
            <text:p>0.001049527</text:p>
          </table:table-cell>
          <table:table-cell office:value-type="float" office:value="3.53669319186553E-3" table:style-name="ce1">
            <text:p>0.003536693</text:p>
          </table:table-cell>
          <table:table-cell office:value-type="float" office:value="0" table:style-name="ce1">
            <text:p>0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Post_Recovery</text:p>
          </table:table-cell>
          <table:table-cell office:value-type="float" office:value="1.049526946795831E-3" table:style-name="ce1">
            <text:p>0.001049527</text:p>
          </table:table-cell>
          <table:table-cell office:value-type="float" office:value="3.5366931918654481E-3" table:style-name="ce1">
            <text:p>0.003536693</text:p>
          </table:table-cell>
          <table:table-cell table:number-columns-repeated="16371"/>
        </table:table-row>
        <table:table-row table:style-name="ro1">
          <table:table-cell office:value-type="float" office:value="2025" table:style-name="ce1">
            <text:p>2025</text:p>
          </table:table-cell>
          <table:table-cell office:value-type="string" table:style-name="ce1">
            <text:p>Sep</text:p>
          </table:table-cell>
          <table:table-cell office:value-type="float" office:value="5103463" table:style-name="ce1">
            <text:p>5103463</text:p>
          </table:table-cell>
          <table:table-cell office:value-type="float" office:value="204587" table:style-name="ce1">
            <text:p>204587</text:p>
          </table:table-cell>
          <table:table-cell office:value-type="float" office:value="3.9" table:style-name="ce1">
            <text:p>3.9</text:p>
          </table:table-cell>
          <table:table-cell office:value-type="float" office:value="34.15" table:style-name="ce1">
            <text:p>34.15</text:p>
          </table:table-cell>
          <table:table-cell office:value-type="float" office:value="1.423607513665062E-3" table:style-name="ce1">
            <text:p>0.001423608</text:p>
          </table:table-cell>
          <table:table-cell office:value-type="float" office:value="2.9368575624082651E-3" table:style-name="ce1">
            <text:p>0.002936858</text:p>
          </table:table-cell>
          <table:table-cell office:value-type="float" office:value="0" table:style-name="ce1">
            <text:p>0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Post_Recovery</text:p>
          </table:table-cell>
          <table:table-cell office:value-type="float" office:value="1.4236075136651041E-3" table:style-name="ce1">
            <text:p>0.001423608</text:p>
          </table:table-cell>
          <table:table-cell office:value-type="float" office:value="2.936857562408246E-3" table:style-name="ce1">
            <text:p>0.002936858</text:p>
          </table:table-cell>
          <table:table-cell table:number-columns-repeated="16371"/>
        </table:table-row>
        <table:table-row table:style-name="ro1">
          <table:table-cell office:value-type="float" office:value="2025" table:style-name="ce1">
            <text:p>2025</text:p>
          </table:table-cell>
          <table:table-cell office:value-type="string" table:style-name="ce1">
            <text:p>Nov</text:p>
          </table:table-cell>
          <table:table-cell office:value-type="float" office:value="5113393" table:style-name="ce1">
            <text:p>5113393</text:p>
          </table:table-cell>
          <table:table-cell office:value-type="float" office:value="203654" table:style-name="ce1">
            <text:p>203654</text:p>
          </table:table-cell>
          <table:table-cell office:value-type="float" office:value="3.8" table:style-name="ce1">
            <text:p>3.8</text:p>
          </table:table-cell>
          <table:table-cell office:value-type="float" office:value="34.51" table:style-name="ce1">
            <text:p>34.51</text:p>
          </table:table-cell>
          <table:table-cell office:value-type="float" office:value="1.945737629527244E-3" table:style-name="ce1">
            <text:p>0.001945738</text:p>
          </table:table-cell>
          <table:table-cell office:value-type="float" office:value="1.0541727672035119E-2" table:style-name="ce1">
            <text:p>0.010541728</text:p>
          </table:table-cell>
          <table:table-cell office:value-type="float" office:value="-0.1000000000000001" table:style-name="ce1">
            <text:p>-0.1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Post_Recovery</text:p>
          </table:table-cell>
          <table:table-cell office:value-type="float" office:value="1.9457376295273221E-3" table:style-name="ce1">
            <text:p>0.001945738</text:p>
          </table:table-cell>
          <table:table-cell office:value-type="float" office:value="1.0541727672035209E-2" table:style-name="ce1">
            <text:p>0.010541728</text:p>
          </table:table-cell>
          <table:table-cell table:number-columns-repeated="16371"/>
        </table:table-row>
        <table:table-row table:style-name="ro1">
          <table:table-cell office:value-type="float" office:value="2025" table:style-name="ce1">
            <text:p>2025</text:p>
          </table:table-cell>
          <table:table-cell office:value-type="string" table:style-name="ce1">
            <text:p>Dec</text:p>
          </table:table-cell>
          <table:table-cell office:value-type="float" office:value="5113275" table:style-name="ce1">
            <text:p>5113275</text:p>
          </table:table-cell>
          <table:table-cell office:value-type="float" office:value="203385" table:style-name="ce1">
            <text:p>203385</text:p>
          </table:table-cell>
          <table:table-cell office:value-type="float" office:value="3.8" table:style-name="ce1">
            <text:p>3.8</text:p>
          </table:table-cell>
          <table:table-cell office:value-type="float" office:value="34.229999999999997" table:style-name="ce1">
            <text:p>34.23</text:p>
          </table:table-cell>
          <table:table-cell office:value-type="float" office:value="-2.3076653799150582E-5" table:style-name="ce1">
            <text:p>-2.30767E-05</text:p>
          </table:table-cell>
          <table:table-cell office:value-type="float" office:value="-8.1135902636917164E-3" table:style-name="ce1">
            <text:p>-0.00811359</text:p>
          </table:table-cell>
          <table:table-cell office:value-type="float" office:value="0" table:style-name="ce1">
            <text:p>0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Post_Recovery</text:p>
          </table:table-cell>
          <table:table-cell office:value-type="float" office:value="-2.3076653799192212E-5" table:style-name="ce1">
            <text:p>-2.30767E-05</text:p>
          </table:table-cell>
          <table:table-cell office:value-type="float" office:value="-8.113590263691739E-3" table:style-name="ce1">
            <text:p>-0.00811359</text:p>
          </table:table-cell>
          <table:table-cell table:number-columns-repeated="16371"/>
        </table:table-row>
        <table:table-row table:style-name="ro1">
          <table:table-cell office:value-type="float" office:value="2026" table:style-name="ce1">
            <text:p>2026</text:p>
          </table:table-cell>
          <table:table-cell office:value-type="string" table:style-name="ce1">
            <text:p>Jan</text:p>
          </table:table-cell>
          <table:table-cell office:value-type="float" office:value="5109879" table:style-name="ce1">
            <text:p>5109879</text:p>
          </table:table-cell>
          <table:table-cell office:value-type="float" office:value="203452" table:style-name="ce1">
            <text:p>203452</text:p>
          </table:table-cell>
          <table:table-cell office:value-type="float" office:value="3.8" table:style-name="ce1">
            <text:p>3.8</text:p>
          </table:table-cell>
          <table:table-cell office:value-type="float" office:value="34.64" table:style-name="ce1">
            <text:p>34.64</text:p>
          </table:table-cell>
          <table:table-cell office:value-type="float" office:value="-6.6415360018774662E-4" table:style-name="ce1">
            <text:p>-0.000664154</text:p>
          </table:table-cell>
          <table:table-cell office:value-type="float" office:value="1.197779725387098E-2" table:style-name="ce1">
            <text:p>0.011977797</text:p>
          </table:table-cell>
          <table:table-cell office:value-type="float" office:value="0" table:style-name="ce1">
            <text:p>0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Post_Recovery</text:p>
          </table:table-cell>
          <table:table-cell office:value-type="float" office:value="-6.6415360018778902E-4" table:style-name="ce1">
            <text:p>-0.000664154</text:p>
          </table:table-cell>
          <table:table-cell office:value-type="float" office:value="1.1977797253871049E-2" table:style-name="ce1">
            <text:p>0.011977797</text:p>
          </table:table-cell>
          <table:table-cell table:number-columns-repeated="16371"/>
        </table:table-row>
        <table:table-row table:style-name="ro1">
          <table:table-cell office:value-type="float" office:value="2026" table:style-name="ce1">
            <text:p>2026</text:p>
          </table:table-cell>
          <table:table-cell office:value-type="string" table:style-name="ce1">
            <text:p>Feb</text:p>
          </table:table-cell>
          <table:table-cell office:value-type="float" office:value="5110580" table:style-name="ce1">
            <text:p>5110580</text:p>
          </table:table-cell>
          <table:table-cell office:value-type="float" office:value="201100" table:style-name="ce1">
            <text:p>201100</text:p>
          </table:table-cell>
          <table:table-cell office:value-type="float" office:value="3.8" table:style-name="ce1">
            <text:p>3.8</text:p>
          </table:table-cell>
          <table:table-cell office:value-type="float" office:value="34.869999999999997" table:style-name="ce1">
            <text:p>34.87</text:p>
          </table:table-cell>
          <table:table-cell office:value-type="float" office:value="1.3718524450383269E-4" table:style-name="ce1">
            <text:p>0.000137185</text:p>
          </table:table-cell>
          <table:table-cell office:value-type="float" office:value="6.6397228637412493E-3" table:style-name="ce1">
            <text:p>0.006639723</text:p>
          </table:table-cell>
          <table:table-cell office:value-type="float" office:value="0" table:style-name="ce1">
            <text:p>0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Post_Recovery</text:p>
          </table:table-cell>
          <table:table-cell office:value-type="float" office:value="1.3718524450379019E-4" table:style-name="ce1">
            <text:p>0.000137185</text:p>
          </table:table-cell>
          <table:table-cell office:value-type="float" office:value="6.6397228637411487E-3" table:style-name="ce1">
            <text:p>0.006639723</text:p>
          </table:table-cell>
          <table:table-cell table:number-columns-repeated="16371"/>
        </table:table-row>
        <table:table-row table:number-rows-repeated="6" table:style-name="ro1">
          <table:table-cell table:number-columns-repeated="16384"/>
        </table:table-row>
        <table:table-row table:style-name="ro2">
          <table:table-cell table:number-columns-repeated="5"/>
          <table:table-cell office:value-type="string" table:style-name="ce3">
            <text:p> </text:p>
          </table:table-cell>
          <table:table-cell table:number-columns-repeated="16378"/>
        </table:table-row>
        <table:table-row table:number-rows-repeated="1048447" table:style-name="ro1">
          <table:table-cell table:number-columns-repeated="16384"/>
        </table:table-row>
      </table:table>
      <table:table table:name="Correlation" table:style-name="ta1">
        <table:table-column table:style-name="co10" table:default-cell-style-name="ce1"/>
        <table:table-column table:style-name="co11" table:default-cell-style-name="ce1"/>
        <table:table-column table:style-name="co8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16379" table:default-cell-style-name="ce1"/>
        <table:table-row table:style-name="ro1">
          <table:table-cell table:style-name="ce1"/>
          <table:table-cell office:value-type="string" table:style-name="ce2">
            <text:p>Employment</text:p>
          </table:table-cell>
          <table:table-cell office:value-type="string" table:style-name="ce2">
            <text:p>Unemployment</text:p>
          </table:table-cell>
          <table:table-cell office:value-type="string" table:style-name="ce2">
            <text:p>Unemployment_rate</text:p>
          </table:table-cell>
          <table:table-cell office:value-type="string" table:style-name="ce2">
            <text:p>Average_Hourly_Earning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Employment</text:p>
          </table:table-cell>
          <table:table-cell office:value-type="float" office:value="1" table:style-name="ce1">
            <text:p>1</text:p>
          </table:table-cell>
          <table:table-cell office:value-type="float" office:value="-0.70368996510558057" table:style-name="ce1">
            <text:p>-0.703689965</text:p>
          </table:table-cell>
          <table:table-cell office:value-type="float" office:value="-0.76201331826093577" table:style-name="ce1">
            <text:p>-0.762013318</text:p>
          </table:table-cell>
          <table:table-cell office:value-type="float" office:value="0.83293714823169407" table:style-name="ce1">
            <text:p>0.83293714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Unemployment</text:p>
          </table:table-cell>
          <table:table-cell office:value-type="float" office:value="-0.70368996510558057" table:style-name="ce1">
            <text:p>-0.703689965</text:p>
          </table:table-cell>
          <table:table-cell office:value-type="float" office:value="1" table:style-name="ce1">
            <text:p>1</text:p>
          </table:table-cell>
          <table:table-cell office:value-type="float" office:value="0.99586487829064618" table:style-name="ce1">
            <text:p>0.995864878</text:p>
          </table:table-cell>
          <table:table-cell office:value-type="float" office:value="-0.23773984763305839" table:style-name="ce1">
            <text:p>-0.23773984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Unemployment_rate</text:p>
          </table:table-cell>
          <table:table-cell office:value-type="float" office:value="-0.76201331826093577" table:style-name="ce1">
            <text:p>-0.762013318</text:p>
          </table:table-cell>
          <table:table-cell office:value-type="float" office:value="0.99586487829064618" table:style-name="ce1">
            <text:p>0.995864878</text:p>
          </table:table-cell>
          <table:table-cell office:value-type="float" office:value="1" table:style-name="ce1">
            <text:p>1</text:p>
          </table:table-cell>
          <table:table-cell office:value-type="float" office:value="-0.31962558791891987" table:style-name="ce1">
            <text:p>-0.31962558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verage_Hourly_Earnings</text:p>
          </table:table-cell>
          <table:table-cell office:value-type="float" office:value="0.83293714823169407" table:style-name="ce1">
            <text:p>0.832937148</text:p>
          </table:table-cell>
          <table:table-cell office:value-type="float" office:value="-0.23773984763305839" table:style-name="ce1">
            <text:p>-0.237739848</text:p>
          </table:table-cell>
          <table:table-cell office:value-type="float" office:value="-0.31962558791891987" table:style-name="ce1">
            <text:p>-0.319625588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Regression" table:style-name="ta1">
        <table:table-column table:style-name="co14" table:default-cell-style-name="ce1"/>
        <table:table-column table:style-name="co15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2">
            <text:p>Variable</text:p>
          </table:table-cell>
          <table:table-cell office:value-type="string" table:style-name="ce2">
            <text:p>Coeffici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cept</text:p>
          </table:table-cell>
          <table:table-cell office:value-type="float" office:value="3924985.955620572" table:style-name="ce1">
            <text:p>3924985.9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employment</text:p>
          </table:table-cell>
          <table:table-cell office:value-type="float" office:value="-1.969562241222063" table:style-name="ce1">
            <text:p>-1.9695622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verage_Hourly_Earnings</text:p>
          </table:table-cell>
          <table:table-cell office:value-type="float" office:value="47368.481016523241" table:style-name="ce1">
            <text:p>47368.48102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  <table:table table:name="Descriptive_Stats" table:style-name="ta1">
        <table:table-column table:style-name="co16" table:default-cell-style-name="ce1"/>
        <table:table-column table:style-name="co17" table:default-cell-style-name="ce1"/>
        <table:table-column table:style-name="co7" table:default-cell-style-name="ce1"/>
        <table:table-column table:style-name="co11" table:default-cell-style-name="ce1"/>
        <table:table-column table:style-name="co6" table:default-cell-style-name="ce1"/>
        <table:table-column table:style-name="co1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8" table:number-columns-repeated="2" table:default-cell-style-name="ce1"/>
        <table:table-column table:style-name="co1" table:number-columns-repeated="16373" table:default-cell-style-name="ce1"/>
        <table:table-row table:style-name="ro1">
          <table:table-cell table:style-name="ce1"/>
          <table:table-cell office:value-type="string" table:style-name="ce2">
            <text:p>Year</text:p>
          </table:table-cell>
          <table:table-cell office:value-type="string" table:style-name="ce2">
            <text:p>Employment</text:p>
          </table:table-cell>
          <table:table-cell office:value-type="string" table:style-name="ce2">
            <text:p>Unemployment</text:p>
          </table:table-cell>
          <table:table-cell office:value-type="string" table:style-name="ce2">
            <text:p>Average_Hourly_Earnings</text:p>
          </table:table-cell>
          <table:table-cell office:value-type="string" table:style-name="ce2">
            <text:p>Employment_Change_Level</text:p>
          </table:table-cell>
          <table:table-cell office:value-type="string" table:style-name="ce2">
            <text:p>Wage_Growth_Rate</text:p>
          </table:table-cell>
          <table:table-cell office:value-type="string" table:style-name="ce2">
            <text:p>Unemployment_Change</text:p>
          </table:table-cell>
          <table:table-cell office:value-type="string" table:style-name="ce2">
            <text:p>Time_Index</text:p>
          </table:table-cell>
          <table:table-cell office:value-type="string" table:style-name="ce2">
            <text:p>Employment_Growth_%</text:p>
          </table:table-cell>
          <table:table-cell office:value-type="string" table:style-name="ce2">
            <text:p>Wage_Growth_%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ount</text:p>
          </table:table-cell>
          <table:table-cell office:value-type="float" office:value="121" table:style-name="ce1">
            <text:p>121</text:p>
          </table:table-cell>
          <table:table-cell office:value-type="float" office:value="121" table:style-name="ce1">
            <text:p>121</text:p>
          </table:table-cell>
          <table:table-cell office:value-type="float" office:value="121" table:style-name="ce1">
            <text:p>121</text:p>
          </table:table-cell>
          <table:table-cell office:value-type="float" office:value="121" table:style-name="ce1">
            <text:p>121</text:p>
          </table:table-cell>
          <table:table-cell office:value-type="float" office:value="121" table:style-name="ce1">
            <text:p>121</text:p>
          </table:table-cell>
          <table:table-cell office:value-type="float" office:value="121" table:style-name="ce1">
            <text:p>121</text:p>
          </table:table-cell>
          <table:table-cell office:value-type="float" office:value="121" table:style-name="ce1">
            <text:p>121</text:p>
          </table:table-cell>
          <table:table-cell office:value-type="float" office:value="121" table:style-name="ce1">
            <text:p>121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ean</text:p>
          </table:table-cell>
          <table:table-cell office:value-type="float" office:value="2020.5537190082639" table:style-name="ce1">
            <text:p>2020.553719</text:p>
          </table:table-cell>
          <table:table-cell office:value-type="float" office:value="4818279.0991735533" table:style-name="ce1">
            <text:p>4818279.099</text:p>
          </table:table-cell>
          <table:table-cell office:value-type="float" office:value="221376.70247933891" table:style-name="ce1">
            <text:p>221376.7025</text:p>
          </table:table-cell>
          <table:table-cell office:value-type="float" office:value="28.063140495867771" table:style-name="ce1">
            <text:p>28.0631405</text:p>
          </table:table-cell>
          <table:table-cell office:value-type="float" office:value="1.174029221315693E-3" table:style-name="ce1">
            <text:p>0.001174029</text:p>
          </table:table-cell>
          <table:table-cell office:value-type="float" office:value="3.494834645438935E-3" table:style-name="ce1">
            <text:p>0.003494835</text:p>
          </table:table-cell>
          <table:table-cell office:value-type="float" office:value="-1.2396694214876051E-2" table:style-name="ce1">
            <text:p>-0.012396694</text:p>
          </table:table-cell>
          <table:table-cell office:value-type="float" office:value="61" table:style-name="ce1">
            <text:p>61</text:p>
          </table:table-cell>
          <table:table-cell office:value-type="float" office:value="1.1838127981599899E-3" table:style-name="ce1">
            <text:p>0.001183813</text:p>
          </table:table-cell>
          <table:table-cell office:value-type="float" office:value="3.523958267484265E-3" table:style-name="ce1">
            <text:p>0.00352395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td</text:p>
          </table:table-cell>
          <table:table-cell office:value-type="float" office:value="2.9295915904870329" table:style-name="ce1">
            <text:p>2.92959159</text:p>
          </table:table-cell>
          <table:table-cell office:value-type="float" office:value="242334.61610142159" table:style-name="ce1">
            <text:p>242334.6161</text:p>
          </table:table-cell>
          <table:table-cell office:value-type="float" office:value="65944.456794796206" table:style-name="ce1">
            <text:p>65944.45679</text:p>
          </table:table-cell>
          <table:table-cell office:value-type="float" office:value="3.609392615814524" table:style-name="ce1">
            <text:p>3.609392616</text:p>
          </table:table-cell>
          <table:table-cell office:value-type="float" office:value="1.4829329876814601E-2" table:style-name="ce1">
            <text:p>0.01482933</text:p>
          </table:table-cell>
          <table:table-cell office:value-type="float" office:value="1.040219906634021E-2" table:style-name="ce1">
            <text:p>0.010402199</text:p>
          </table:table-cell>
          <table:table-cell office:value-type="float" office:value="0.99428116814224843" table:style-name="ce1">
            <text:p>0.994281168</text:p>
          </table:table-cell>
          <table:table-cell office:value-type="float" office:value="35.073731861133147" table:style-name="ce1">
            <text:p>35.07373186</text:p>
          </table:table-cell>
          <table:table-cell office:value-type="float" office:value="1.4891115483449111E-2" table:style-name="ce1">
            <text:p>0.014891115</text:p>
          </table:table-cell>
          <table:table-cell office:value-type="float" office:value="1.0440859376736659E-2" table:style-name="ce1">
            <text:p>0.010440859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in</text:p>
          </table:table-cell>
          <table:table-cell office:value-type="float" office:value="2016" table:style-name="ce1">
            <text:p>2016</text:p>
          </table:table-cell>
          <table:table-cell office:value-type="float" office:value="3969148" table:style-name="ce1">
            <text:p>3969148</text:p>
          </table:table-cell>
          <table:table-cell office:value-type="float" office:value="180740" table:style-name="ce1">
            <text:p>180740</text:p>
          </table:table-cell>
          <table:table-cell office:value-type="float" office:value="23.01" table:style-name="ce1">
            <text:p>23.01</text:p>
          </table:table-cell>
          <table:table-cell office:value-type="float" office:value="-0.13609039870694811" table:style-name="ce1">
            <text:p>-0.136090399</text:p>
          </table:table-cell>
          <table:table-cell office:value-type="float" office:value="-1.88087774294671E-2" table:style-name="ce1">
            <text:p>-0.018808777</text:p>
          </table:table-cell>
          <table:table-cell office:value-type="float" office:value="-2.6" table:style-name="ce1">
            <text:p>-2.6</text:p>
          </table:table-cell>
          <table:table-cell office:value-type="float" office:value="1" table:style-name="ce1">
            <text:p>1</text:p>
          </table:table-cell>
          <table:table-cell office:value-type="float" office:value="-0.1360903987069482" table:style-name="ce1">
            <text:p>-0.136090399</text:p>
          </table:table-cell>
          <table:table-cell office:value-type="float" office:value="-1.8808777429467068E-2" table:style-name="ce1">
            <text:p>-0.01880877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5%</text:p>
          </table:table-cell>
          <table:table-cell office:value-type="float" office:value="2018" table:style-name="ce1">
            <text:p>2018</text:p>
          </table:table-cell>
          <table:table-cell office:value-type="float" office:value="4630715" table:style-name="ce1">
            <text:p>4630715</text:p>
          </table:table-cell>
          <table:table-cell office:value-type="float" office:value="191786" table:style-name="ce1">
            <text:p>191786</text:p>
          </table:table-cell>
          <table:table-cell office:value-type="float" office:value="24.92" table:style-name="ce1">
            <text:p>24.92</text:p>
          </table:table-cell>
          <table:table-cell office:value-type="float" office:value="1.8116605523939091E-4" table:style-name="ce1">
            <text:p>0.000181166</text:p>
          </table:table-cell>
          <table:table-cell office:value-type="float" office:value="-3.2102728731942952E-3" table:style-name="ce1">
            <text:p>-0.003210273</text:p>
          </table:table-cell>
          <table:table-cell office:value-type="float" office:value="-0.1000000000000001" table:style-name="ce1">
            <text:p>-0.1</text:p>
          </table:table-cell>
          <table:table-cell office:value-type="float" office:value="31" table:style-name="ce1">
            <text:p>31</text:p>
          </table:table-cell>
          <table:table-cell office:value-type="float" office:value="1.833948515421735E-4" table:style-name="ce1">
            <text:p>0.000183395</text:p>
          </table:table-cell>
          <table:table-cell office:value-type="float" office:value="-3.3904090574114749E-3" table:style-name="ce1">
            <text:p>-0.003390409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50%</text:p>
          </table:table-cell>
          <table:table-cell office:value-type="float" office:value="2021" table:style-name="ce1">
            <text:p>2021</text:p>
          </table:table-cell>
          <table:table-cell office:value-type="float" office:value="4786799" table:style-name="ce1">
            <text:p>4786799</text:p>
          </table:table-cell>
          <table:table-cell office:value-type="float" office:value="199172" table:style-name="ce1">
            <text:p>199172</text:p>
          </table:table-cell>
          <table:table-cell office:value-type="float" office:value="27.2" table:style-name="ce1">
            <text:p>27.2</text:p>
          </table:table-cell>
          <table:table-cell office:value-type="float" office:value="1.2985997388124709E-3" table:style-name="ce1">
            <text:p>0.0012986</text:p>
          </table:table-cell>
          <table:table-cell office:value-type="float" office:value="3.53669319186553E-3" table:style-name="ce1">
            <text:p>0.003536693</text:p>
          </table:table-cell>
          <table:table-cell office:value-type="float" office:value="0" table:style-name="ce1">
            <text:p>0</text:p>
          </table:table-cell>
          <table:table-cell office:value-type="float" office:value="61" table:style-name="ce1">
            <text:p>61</text:p>
          </table:table-cell>
          <table:table-cell office:value-type="float" office:value="1.3185431862695609E-3" table:style-name="ce1">
            <text:p>0.001318543</text:p>
          </table:table-cell>
          <table:table-cell office:value-type="float" office:value="3.5540608816470032E-3" table:style-name="ce1">
            <text:p>0.00355406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75%</text:p>
          </table:table-cell>
          <table:table-cell office:value-type="float" office:value="2023" table:style-name="ce1">
            <text:p>2023</text:p>
          </table:table-cell>
          <table:table-cell office:value-type="float" office:value="5088160" table:style-name="ce1">
            <text:p>5088160</text:p>
          </table:table-cell>
          <table:table-cell office:value-type="float" office:value="230611" table:style-name="ce1">
            <text:p>230611</text:p>
          </table:table-cell>
          <table:table-cell office:value-type="float" office:value="31.35" table:style-name="ce1">
            <text:p>31.35</text:p>
          </table:table-cell>
          <table:table-cell office:value-type="float" office:value="2.3101131766263428E-3" table:style-name="ce1">
            <text:p>0.002310113</text:p>
          </table:table-cell>
          <table:table-cell office:value-type="float" office:value="1.0572987721691631E-2" table:style-name="ce1">
            <text:p>0.010572988</text:p>
          </table:table-cell>
          <table:table-cell office:value-type="float" office:value="0" table:style-name="ce1">
            <text:p>0</text:p>
          </table:table-cell>
          <table:table-cell office:value-type="float" office:value="91" table:style-name="ce1">
            <text:p>91</text:p>
          </table:table-cell>
          <table:table-cell office:value-type="float" office:value="2.3158101511377431E-3" table:style-name="ce1">
            <text:p>0.00231581</text:p>
          </table:table-cell>
          <table:table-cell office:value-type="float" office:value="1.063197231149182E-2" table:style-name="ce1">
            <text:p>0.01063197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ax</text:p>
          </table:table-cell>
          <table:table-cell office:value-type="float" office:value="2026" table:style-name="ce1">
            <text:p>2026</text:p>
          </table:table-cell>
          <table:table-cell office:value-type="float" office:value="5113393" table:style-name="ce1">
            <text:p>5113393</text:p>
          </table:table-cell>
          <table:table-cell office:value-type="float" office:value="655990" table:style-name="ce1">
            <text:p>655990</text:p>
          </table:table-cell>
          <table:table-cell office:value-type="float" office:value="34.869999999999997" table:style-name="ce1">
            <text:p>34.87</text:p>
          </table:table-cell>
          <table:table-cell office:value-type="float" office:value="6.0424302646310997E-2" table:style-name="ce1">
            <text:p>0.060424303</text:p>
          </table:table-cell>
          <table:table-cell office:value-type="float" office:value="3.5700575815738947E-2" table:style-name="ce1">
            <text:p>0.035700576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121" table:style-name="ce1">
            <text:p>121</text:p>
          </table:table-cell>
          <table:table-cell office:value-type="float" office:value="6.0424302646310928E-2" table:style-name="ce1">
            <text:p>0.060424303</text:p>
          </table:table-cell>
          <table:table-cell office:value-type="float" office:value="3.5700575815738933E-2" table:style-name="ce1">
            <text:p>0.035700576</text:p>
          </table:table-cell>
          <table:table-cell table:number-columns-repeated="16373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Times" svg:font-family="Times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30006</meta:generator>
    <dc:title/>
    <dc:description/>
    <dc:subject/>
    <meta:initial-creator/>
    <dc:creator>X</dc:creator>
    <meta:creation-date>2026-04-26T20:51:23Z</meta:creation-date>
    <dc:date>2026-04-27T03:08:45Z</dc:date>
  </office:meta>
</office:document-meta>
</file>